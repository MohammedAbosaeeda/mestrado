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6B0000192E000017282704A445.svm"/>
  <manifest:file-entry manifest:media-type="" manifest:full-path="Pictures/200000A2000011FF00000F3F7B6DC0A0.svm"/>
  <manifest:file-entry manifest:media-type="" manifest:full-path="Pictures/200001D800001909000017280EF6941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cccccc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cccccc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5cm" svg:stroke-color="#cccccc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5cm" svg:stroke-color="#008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Arial Narrow'" style:font-family-generic="swiss" style:font-pitch="variable"/>
    </style:style>
    <style:style style:name="P3" style:family="paragraph">
      <style:text-properties fo:color="#008000" fo:font-family="'Arial Narrow'" style:font-family-generic="swiss" style:font-pitch="variable" fo:font-size="10pt" style:font-size-asian="10pt" style:font-size-complex="10pt"/>
    </style:style>
    <style:style style:name="P4" style:family="paragraph">
      <style:text-properties fo:font-family="'Arial Narrow'" style:font-family-generic="swiss" style:font-pitch="variable" fo:font-size="10pt" style:font-size-asian="10pt" style:font-size-complex="10pt"/>
    </style:style>
    <style:style style:name="P5" style:family="paragraph">
      <style:text-properties fo:color="#0000ff"/>
    </style:style>
    <style:style style:name="P6" style:family="paragraph">
      <style:text-properties fo:color="#0000ff" fo:font-family="'Arial Narrow'" style:font-family-generic="swiss" style:font-pitch="variable" fo:font-size="10pt" style:font-size-asian="10pt" style:font-size-complex="10pt"/>
    </style:style>
    <style:style style:name="P7" style:family="paragraph">
      <style:text-properties fo:font-family="'Arial Narrow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8000" fo:font-family="'Arial Narrow'" style:font-family-generic="swiss" style:font-pitch="variable" fo:font-size="10pt" style:font-size-asian="10pt" style:font-size-complex="10pt"/>
    </style:style>
    <style:style style:name="T2" style:family="text">
      <style:text-properties fo:font-family="'Arial Narrow'" style:font-family-generic="swiss" style:font-pitch="variable" fo:font-size="10pt" style:font-size-asian="10pt" style:font-size-complex="10pt"/>
    </style:style>
    <style:style style:name="T3" style:family="text">
      <style:text-properties fo:color="#0000ff" fo:font-family="'Arial Narrow'" style:font-family-generic="swiss" style:font-pitch="variable" fo:font-size="10pt" style:font-size-asian="10pt" style:font-size-complex="10pt"/>
    </style:style>
    <style:style style:name="T4" style:family="text">
      <style:text-properties fo:font-family="'Arial Narrow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connector draw:style-name="gr1" draw:text-style-name="P1" draw:layer="layout" draw:type="line" svg:x1="5.206cm" svg:y1="9.783cm" svg:x2="4.813cm" svg:y2="9.303cm" draw:start-shape="id1" draw:start-glue-point="0" svg:d="m5206 9783-393-480">
              <text:p/>
            </draw:connector>
            <draw:connector draw:style-name="gr1" draw:text-style-name="P1" draw:layer="layout" draw:type="line" svg:x1="7.506cm" svg:y1="5.183cm" svg:x2="7.113cm" svg:y2="4.703cm" draw:start-shape="id2" draw:start-glue-point="0" svg:d="m7506 5183-393-480">
              <text:p/>
            </draw:connector>
            <draw:connector draw:style-name="gr1" draw:text-style-name="P1" draw:layer="layout" draw:type="line" svg:x1="5.206cm" svg:y1="7.283cm" svg:x2="4.813cm" svg:y2="6.803cm" draw:start-shape="id3" draw:start-glue-point="0" svg:d="m5206 7283-393-480">
              <text:p/>
            </draw:connector>
            <draw:circle draw:style-name="gr2" draw:text-style-name="P1" draw:layer="layout" svg:width="0.5cm" svg:height="0.5cm" svg:x="4.46cm" svg:y="8.915cm">
              <text:p/>
            </draw:circle>
            <draw:circle draw:style-name="gr2" draw:text-style-name="P1" draw:layer="layout" svg:width="0.5cm" svg:height="0.5cm" svg:x="4.46cm" svg:y="6.415cm">
              <text:p/>
            </draw:circle>
            <draw:circle draw:style-name="gr2" draw:text-style-name="P1" draw:layer="layout" svg:width="0.5cm" svg:height="0.5cm" svg:x="6.76cm" svg:y="4.315cm">
              <text:p/>
            </draw:circle>
            <draw:ellipse draw:style-name="gr3" draw:text-style-name="P1" draw:layer="layout" svg:width="1.5cm" svg:height="0.5cm" svg:x="7.06cm" svg:y="6.015cm">
              <text:p/>
            </draw:ellipse>
            <draw:connector draw:style-name="gr1" draw:text-style-name="P1" draw:layer="layout" draw:type="line" svg:x1="2.906cm" svg:y1="5.183cm" svg:x2="2.513cm" svg:y2="4.703cm" draw:start-shape="id4" draw:start-glue-point="0" svg:d="m2906 5183-393-480">
              <text:p/>
            </draw:connector>
            <draw:rect draw:style-name="gr4" draw:text-style-name="P1" draw:id="id4" draw:layer="layout" svg:width="0.219cm" svg:height="0.219cm" draw:transform="rotate (0.7853981633973) translate (2.829cm 5.26cm)">
              <text:p/>
            </draw:rect>
            <draw:rect draw:style-name="gr2" draw:text-style-name="P1" draw:id="id5" draw:layer="layout" svg:width="0.5cm" svg:height="0.5cm" svg:x="2.76cm" svg:y="5.015cm">
              <text:p/>
            </draw:rect>
            <draw:connector draw:style-name="gr5" draw:text-style-name="P1" draw:layer="layout" svg:x1="3.011cm" svg:y1="6.016cm" svg:x2="3.008cm" svg:y2="5.528cm" svg:d="m3011 6016v-244h-3v-244">
              <text:p/>
            </draw:connector>
            <draw:connector draw:style-name="gr5" draw:text-style-name="P1" draw:layer="layout" svg:x1="3.26cm" svg:y1="5.265cm" svg:x2="3.739cm" svg:y2="5.267cm" draw:start-shape="id5" draw:start-glue-point="1" svg:d="m3260 5265h501v2h-22">
              <text:p/>
            </draw:connector>
            <draw:connector draw:style-name="gr4" draw:text-style-name="P1" draw:layer="layout" svg:x1="6.861cm" svg:y1="9.865cm" svg:x2="7.34cm" svg:y2="9.867cm" svg:d="m6861 9865h501v2h-22">
              <text:p/>
            </draw:connector>
            <draw:line draw:style-name="gr5" draw:text-style-name="P1" draw:layer="layout" svg:x1="3.01cm" svg:y1="5.815cm" svg:x2="3.01cm" svg:y2="6.815cm">
              <text:p/>
            </draw:line>
            <draw:line draw:style-name="gr4" draw:text-style-name="P1" draw:layer="layout" svg:x1="5.31cm" svg:y1="5.815cm" svg:x2="5.31cm" svg:y2="6.815cm">
              <text:p/>
            </draw:line>
            <draw:line draw:style-name="gr4" draw:text-style-name="P1" draw:layer="layout" svg:x1="7.61cm" svg:y1="5.815cm" svg:x2="7.61cm" svg:y2="6.815cm">
              <text:p/>
            </draw:line>
            <draw:line draw:style-name="gr4" draw:text-style-name="P1" draw:layer="layout" svg:x1="7.61cm" svg:y1="8.115cm" svg:x2="7.61cm" svg:y2="9.115cm">
              <text:p/>
            </draw:line>
            <draw:line draw:style-name="gr4" draw:text-style-name="P1" draw:layer="layout" svg:x1="5.31cm" svg:y1="8.115cm" svg:x2="5.31cm" svg:y2="9.115cm">
              <text:p/>
            </draw:line>
            <draw:line draw:style-name="gr4" draw:text-style-name="P1" draw:layer="layout" svg:x1="3.01cm" svg:y1="8.115cm" svg:x2="3.01cm" svg:y2="9.115cm">
              <text:p/>
            </draw:line>
            <draw:line draw:style-name="gr5" draw:text-style-name="P1" draw:layer="layout" svg:x1="3.56cm" svg:y1="7.365cm" svg:x2="4.56cm" svg:y2="7.365cm">
              <text:p/>
            </draw:line>
            <draw:line draw:style-name="gr4" draw:text-style-name="P1" draw:layer="layout" svg:x1="3.56cm" svg:y1="5.265cm" svg:x2="4.56cm" svg:y2="5.265cm">
              <text:p/>
            </draw:line>
            <draw:line draw:style-name="gr4" draw:text-style-name="P1" draw:layer="layout" svg:x1="3.56cm" svg:y1="9.865cm" svg:x2="4.56cm" svg:y2="9.865cm">
              <text:p/>
            </draw:line>
            <draw:line draw:style-name="gr4" draw:text-style-name="P1" draw:layer="layout" svg:x1="6.06cm" svg:y1="9.865cm" svg:x2="7.06cm" svg:y2="9.865cm">
              <text:p/>
            </draw:line>
            <draw:line draw:style-name="gr5" draw:text-style-name="P1" draw:layer="layout" svg:x1="6.06cm" svg:y1="7.365cm" svg:x2="7.06cm" svg:y2="7.365cm">
              <text:p/>
            </draw:line>
            <draw:line draw:style-name="gr4" draw:text-style-name="P1" draw:layer="layout" svg:x1="6.06cm" svg:y1="5.265cm" svg:x2="7.06cm" svg:y2="5.265cm">
              <text:p/>
            </draw:line>
            <draw:connector draw:style-name="gr1" draw:text-style-name="P1" draw:layer="layout" draw:type="line" svg:x1="2.906cm" svg:y1="7.283cm" svg:x2="2.513cm" svg:y2="6.803cm" draw:start-shape="id6" draw:start-glue-point="0" svg:d="m2906 7283-393-480">
              <text:p/>
            </draw:connector>
            <draw:rect draw:style-name="gr4" draw:text-style-name="P1" draw:id="id6" draw:layer="layout" svg:width="0.219cm" svg:height="0.219cm" draw:transform="rotate (0.7853981633973) translate (2.829cm 7.36cm)">
              <text:p/>
            </draw:rect>
            <draw:rect draw:style-name="gr2" draw:text-style-name="P1" draw:id="id7" draw:layer="layout" svg:width="0.5cm" svg:height="0.5cm" svg:x="2.76cm" svg:y="7.115cm">
              <text:p/>
            </draw:rect>
            <draw:connector draw:style-name="gr5" draw:text-style-name="P1" draw:layer="layout" svg:x1="3.01cm" svg:y1="7.115cm" svg:x2="3.007cm" svg:y2="6.627cm" draw:start-shape="id7" draw:start-glue-point="0" svg:d="m3010 7115v-501h-3v13">
              <text:p/>
            </draw:connector>
            <draw:connector draw:style-name="gr5" draw:text-style-name="P1" draw:layer="layout" svg:x1="3.011cm" svg:y1="8.116cm" svg:x2="3.008cm" svg:y2="7.628cm" svg:d="m3011 8116v-244h-3v-244">
              <text:p/>
            </draw:connector>
            <draw:connector draw:style-name="gr5" draw:text-style-name="P1" draw:layer="layout" svg:x1="3.26cm" svg:y1="7.365cm" svg:x2="3.739cm" svg:y2="7.367cm" draw:start-shape="id7" draw:start-glue-point="1" svg:d="m3260 7365h501v2h-22">
              <text:p/>
            </draw:connector>
            <draw:connector draw:style-name="gr1" draw:text-style-name="P1" draw:layer="layout" draw:type="line" svg:x1="2.906cm" svg:y1="9.783cm" svg:x2="2.513cm" svg:y2="9.303cm" draw:start-shape="id8" draw:start-glue-point="0" svg:d="m2906 9783-393-480">
              <text:p/>
            </draw:connector>
            <draw:rect draw:style-name="gr4" draw:text-style-name="P1" draw:id="id8" draw:layer="layout" svg:width="0.219cm" svg:height="0.219cm" draw:transform="rotate (0.7853981633973) translate (2.829cm 9.86cm)">
              <text:p/>
            </draw:rect>
            <draw:rect draw:style-name="gr2" draw:text-style-name="P1" draw:id="id9" draw:layer="layout" svg:width="0.5cm" svg:height="0.5cm" svg:x="2.76cm" svg:y="9.615cm">
              <text:p/>
            </draw:rect>
            <draw:connector draw:style-name="gr5" draw:text-style-name="P1" draw:layer="layout" svg:x1="3.01cm" svg:y1="9.615cm" svg:x2="3.007cm" svg:y2="9.127cm" draw:start-shape="id9" draw:start-glue-point="0" svg:d="m3010 9615v-501h-3v13">
              <text:p/>
            </draw:connector>
            <draw:connector draw:style-name="gr5" draw:text-style-name="P1" draw:layer="layout" svg:x1="3.26cm" svg:y1="9.865cm" svg:x2="3.739cm" svg:y2="9.867cm" draw:start-shape="id9" draw:start-glue-point="1" svg:d="m3260 9865h501v2h-22">
              <text:p/>
            </draw:connector>
            <draw:rect draw:style-name="gr4" draw:text-style-name="P1" draw:id="id1" draw:layer="layout" svg:width="0.219cm" svg:height="0.219cm" draw:transform="rotate (0.7853981633973) translate (5.129cm 9.86cm)">
              <text:p/>
            </draw:rect>
            <draw:rect draw:style-name="gr2" draw:text-style-name="P1" draw:id="id10" draw:layer="layout" svg:width="0.5cm" svg:height="0.5cm" svg:x="5.06cm" svg:y="9.615cm">
              <text:p/>
            </draw:rect>
            <draw:connector draw:style-name="gr5" draw:text-style-name="P1" draw:layer="layout" svg:x1="5.31cm" svg:y1="9.615cm" svg:x2="5.307cm" svg:y2="9.127cm" draw:start-shape="id10" draw:start-glue-point="0" svg:d="m5310 9615v-501h-3v13">
              <text:p/>
            </draw:connector>
            <draw:connector draw:style-name="gr5" draw:text-style-name="P1" draw:layer="layout" svg:x1="5.56cm" svg:y1="9.865cm" svg:x2="6.039cm" svg:y2="9.867cm" draw:start-shape="id10" draw:start-glue-point="1" svg:d="m5560 9865h501v2h-22">
              <text:p/>
            </draw:connector>
            <draw:connector draw:style-name="gr5" draw:text-style-name="P1" draw:layer="layout" svg:x1="4.561cm" svg:y1="9.865cm" svg:x2="5.04cm" svg:y2="9.867cm" svg:d="m4561 9865h240v2h239">
              <text:p/>
            </draw:connector>
            <draw:rect draw:style-name="gr4" draw:text-style-name="P1" draw:id="id3" draw:layer="layout" svg:width="0.219cm" svg:height="0.219cm" draw:transform="rotate (0.7853981633973) translate (5.129cm 7.36cm)">
              <text:p/>
            </draw:rect>
            <draw:rect draw:style-name="gr2" draw:text-style-name="P1" draw:id="id11" draw:layer="layout" svg:width="0.5cm" svg:height="0.5cm" svg:x="5.06cm" svg:y="7.115cm">
              <text:p/>
            </draw:rect>
            <draw:connector draw:style-name="gr5" draw:text-style-name="P1" draw:layer="layout" svg:x1="5.31cm" svg:y1="7.115cm" svg:x2="5.307cm" svg:y2="6.627cm" draw:start-shape="id11" draw:start-glue-point="0" svg:d="m5310 7115v-501h-3v13">
              <text:p/>
            </draw:connector>
            <draw:connector draw:style-name="gr5" draw:text-style-name="P1" draw:layer="layout" svg:x1="5.311cm" svg:y1="8.116cm" svg:x2="5.308cm" svg:y2="7.628cm" svg:d="m5311 8116v-244h-3v-244">
              <text:p/>
            </draw:connector>
            <draw:connector draw:style-name="gr5" draw:text-style-name="P1" draw:layer="layout" svg:x1="5.56cm" svg:y1="7.365cm" svg:x2="6.039cm" svg:y2="7.367cm" draw:start-shape="id11" draw:start-glue-point="1" svg:d="m5560 7365h501v2h-22">
              <text:p/>
            </draw:connector>
            <draw:connector draw:style-name="gr5" draw:text-style-name="P1" draw:layer="layout" svg:x1="4.561cm" svg:y1="7.365cm" svg:x2="5.04cm" svg:y2="7.367cm" svg:d="m4561 7365h240v2h239">
              <text:p/>
            </draw:connector>
            <draw:connector draw:style-name="gr1" draw:text-style-name="P1" draw:layer="layout" draw:type="line" svg:x1="5.206cm" svg:y1="5.183cm" svg:x2="4.813cm" svg:y2="4.703cm" draw:start-shape="id12" draw:start-glue-point="0" svg:d="m5206 5183-393-480">
              <text:p/>
            </draw:connector>
            <draw:rect draw:style-name="gr4" draw:text-style-name="P1" draw:id="id12" draw:layer="layout" svg:width="0.219cm" svg:height="0.219cm" draw:transform="rotate (0.7853981633973) translate (5.129cm 5.26cm)">
              <text:p/>
            </draw:rect>
            <draw:rect draw:style-name="gr2" draw:text-style-name="P1" draw:id="id13" draw:layer="layout" svg:width="0.5cm" svg:height="0.5cm" svg:x="5.06cm" svg:y="5.015cm">
              <text:p/>
            </draw:rect>
            <draw:connector draw:style-name="gr5" draw:text-style-name="P1" draw:layer="layout" svg:x1="5.311cm" svg:y1="6.016cm" svg:x2="5.308cm" svg:y2="5.528cm" svg:d="m5311 6016v-244h-3v-244">
              <text:p/>
            </draw:connector>
            <draw:connector draw:style-name="gr5" draw:text-style-name="P1" draw:layer="layout" svg:x1="5.56cm" svg:y1="5.265cm" svg:x2="6.039cm" svg:y2="5.267cm" draw:start-shape="id13" draw:start-glue-point="1" svg:d="m5560 5265h501v2h-22">
              <text:p/>
            </draw:connector>
            <draw:connector draw:style-name="gr5" draw:text-style-name="P1" draw:layer="layout" svg:x1="4.561cm" svg:y1="5.265cm" svg:x2="5.04cm" svg:y2="5.267cm" svg:d="m4561 5265h240v2h239">
              <text:p/>
            </draw:connector>
            <draw:rect draw:style-name="gr4" draw:text-style-name="P1" draw:id="id2" draw:layer="layout" svg:width="0.219cm" svg:height="0.219cm" draw:transform="rotate (0.7853981633973) translate (7.429cm 5.26cm)">
              <text:p/>
            </draw:rect>
            <draw:rect draw:style-name="gr2" draw:text-style-name="P1" draw:layer="layout" svg:width="0.5cm" svg:height="0.5cm" svg:x="7.36cm" svg:y="5.015cm">
              <text:p/>
            </draw:rect>
            <draw:connector draw:style-name="gr5" draw:text-style-name="P1" draw:layer="layout" svg:x1="7.611cm" svg:y1="6.016cm" svg:x2="7.608cm" svg:y2="5.528cm" svg:d="m7611 6016v-244h-3v-244">
              <text:p/>
            </draw:connector>
            <draw:connector draw:style-name="gr5" draw:text-style-name="P1" draw:layer="layout" svg:x1="6.861cm" svg:y1="5.265cm" svg:x2="7.34cm" svg:y2="5.267cm" svg:d="m6861 5265h240v2h239">
              <text:p/>
            </draw:connector>
            <draw:connector draw:style-name="gr1" draw:text-style-name="P1" draw:layer="layout" draw:type="line" svg:x1="7.506cm" svg:y1="7.283cm" svg:x2="7.113cm" svg:y2="6.803cm" draw:start-shape="id14" draw:start-glue-point="0" svg:d="m7506 7283-393-480">
              <text:p/>
            </draw:connector>
            <draw:rect draw:style-name="gr4" draw:text-style-name="P1" draw:id="id14" draw:layer="layout" svg:width="0.219cm" svg:height="0.219cm" draw:transform="rotate (0.7853981633973) translate (7.429cm 7.36cm)">
              <text:p/>
            </draw:rect>
            <draw:rect draw:style-name="gr2" draw:text-style-name="P1" draw:id="id15" draw:layer="layout" svg:width="0.5cm" svg:height="0.5cm" svg:x="7.36cm" svg:y="7.115cm">
              <text:p/>
            </draw:rect>
            <draw:connector draw:style-name="gr5" draw:text-style-name="P1" draw:layer="layout" svg:x1="7.61cm" svg:y1="7.115cm" svg:x2="7.607cm" svg:y2="6.627cm" draw:start-shape="id15" draw:start-glue-point="0" svg:d="m7610 7115v-501h-3v13">
              <text:p/>
            </draw:connector>
            <draw:connector draw:style-name="gr5" draw:text-style-name="P1" draw:layer="layout" svg:x1="7.611cm" svg:y1="8.116cm" svg:x2="7.608cm" svg:y2="7.628cm" svg:d="m7611 8116v-244h-3v-244">
              <text:p/>
            </draw:connector>
            <draw:connector draw:style-name="gr5" draw:text-style-name="P1" draw:layer="layout" svg:x1="6.861cm" svg:y1="7.365cm" svg:x2="7.34cm" svg:y2="7.367cm" svg:d="m6861 7365h240v2h239">
              <text:p/>
            </draw:connector>
            <draw:connector draw:style-name="gr1" draw:text-style-name="P1" draw:layer="layout" draw:type="line" svg:x1="7.506cm" svg:y1="9.783cm" svg:x2="7.113cm" svg:y2="9.303cm" draw:start-shape="id16" draw:start-glue-point="0" svg:d="m7506 9783-393-480">
              <text:p/>
            </draw:connector>
            <draw:rect draw:style-name="gr4" draw:text-style-name="P1" draw:id="id16" draw:layer="layout" svg:width="0.219cm" svg:height="0.219cm" draw:transform="rotate (0.7853981633973) translate (7.429cm 9.86cm)">
              <text:p/>
            </draw:rect>
            <draw:rect draw:style-name="gr2" draw:text-style-name="P1" draw:id="id17" draw:layer="layout" svg:width="0.5cm" svg:height="0.5cm" svg:x="7.36cm" svg:y="9.615cm">
              <text:p/>
            </draw:rect>
            <draw:connector draw:style-name="gr5" draw:text-style-name="P1" draw:layer="layout" svg:x1="7.61cm" svg:y1="9.615cm" svg:x2="7.607cm" svg:y2="9.127cm" draw:start-shape="id17" draw:start-glue-point="0" svg:d="m7610 9615v-501h-3v13">
              <text:p/>
            </draw:connector>
            <draw:connector draw:style-name="gr5" draw:text-style-name="P1" draw:layer="layout" svg:x1="6.861cm" svg:y1="9.865cm" svg:x2="7.34cm" svg:y2="9.867cm" svg:d="m6861 9865h240v2h239">
              <text:p/>
            </draw:connector>
            <draw:line draw:style-name="gr5" draw:text-style-name="P1" draw:layer="layout" svg:x1="6.06cm" svg:y1="9.865cm" svg:x2="7.06cm" svg:y2="9.865cm">
              <text:p/>
            </draw:line>
            <draw:line draw:style-name="gr5" draw:text-style-name="P1" draw:layer="layout" svg:x1="3.66cm" svg:y1="9.865cm" svg:x2="4.66cm" svg:y2="9.865cm">
              <text:p/>
            </draw:line>
            <draw:line draw:style-name="gr5" draw:text-style-name="P1" draw:layer="layout" svg:x1="5.96cm" svg:y1="5.265cm" svg:x2="6.96cm" svg:y2="5.265cm">
              <text:p/>
            </draw:line>
            <draw:line draw:style-name="gr5" draw:text-style-name="P1" draw:layer="layout" svg:x1="3.56cm" svg:y1="5.265cm" svg:x2="4.56cm" svg:y2="5.265cm">
              <text:p/>
            </draw:line>
            <draw:line draw:style-name="gr5" draw:text-style-name="P1" draw:layer="layout" svg:x1="5.31cm" svg:y1="5.815cm" svg:x2="5.31cm" svg:y2="6.815cm">
              <text:p/>
            </draw:line>
            <draw:line draw:style-name="gr5" draw:text-style-name="P1" draw:layer="layout" svg:x1="7.61cm" svg:y1="5.815cm" svg:x2="7.61cm" svg:y2="6.815cm">
              <text:p/>
            </draw:line>
            <draw:line draw:style-name="gr5" draw:text-style-name="P1" draw:layer="layout" svg:x1="7.61cm" svg:y1="8.115cm" svg:x2="7.61cm" svg:y2="9.115cm">
              <text:p/>
            </draw:line>
            <draw:line draw:style-name="gr5" draw:text-style-name="P1" draw:layer="layout" svg:x1="5.31cm" svg:y1="8.115cm" svg:x2="5.31cm" svg:y2="9.115cm">
              <text:p/>
            </draw:line>
            <draw:line draw:style-name="gr5" draw:text-style-name="P1" draw:layer="layout" svg:x1="3.01cm" svg:y1="8.115cm" svg:x2="3.01cm" svg:y2="9.115cm">
              <text:p/>
            </draw:line>
            <draw:line draw:style-name="gr6" draw:text-style-name="P1" draw:id="id19" draw:layer="layout" svg:x1="4.86cm" svg:y1="9.715cm" svg:x2="7.86cm" svg:y2="9.715cm">
              <text:p/>
            </draw:line>
            <draw:line draw:style-name="gr6" draw:text-style-name="P1" draw:id="id18" draw:layer="layout" svg:x1="7.96cm" svg:y1="9.715cm" svg:x2="7.96cm" svg:y2="5.215cm">
              <text:p/>
            </draw:line>
            <draw:connector draw:style-name="gr6" draw:text-style-name="P1" draw:layer="layout" draw:type="line" svg:x1="7.381cm" svg:y1="4.409cm" svg:x2="7.96cm" svg:y2="5.215cm" draw:end-shape="id18" draw:end-glue-point="0" svg:d="m7381 4409 579 806">
              <text:p/>
            </draw:connector>
            <draw:connector draw:style-name="gr6" draw:text-style-name="P1" draw:layer="layout" draw:type="line" svg:x1="4.86cm" svg:y1="9.715cm" svg:x2="4.524cm" svg:y2="9.26cm" draw:start-shape="id19" draw:start-glue-point="3" svg:d="m4860 9715-336-455">
              <text:p/>
            </draw:connector>
            <draw:custom-shape draw:style-name="gr7" draw:text-style-name="P1" draw:layer="layout" svg:width="0.2cm" svg:height="0.2cm" draw:transform="rotate (0.6981317007976) translate (7.119cm 4.30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1" draw:id="id20" draw:layer="layout" svg:x1="4.76cm" svg:y1="7.115cm" svg:x2="7.76cm" svg:y2="7.115cm">
              <text:p/>
            </draw:line>
            <draw:connector draw:style-name="gr8" draw:text-style-name="P1" draw:layer="layout" draw:type="line" svg:x1="4.76cm" svg:y1="7.115cm" svg:x2="4.392cm" svg:y2="6.667cm" draw:start-shape="id20" draw:start-glue-point="3" svg:d="m4760 7115-368-448">
              <text:p/>
            </draw:connector>
            <draw:line draw:style-name="gr8" draw:text-style-name="P1" draw:id="id21" draw:layer="layout" svg:x1="7.76cm" svg:y1="7.115cm" svg:x2="7.76cm" svg:y2="5.615cm">
              <text:p/>
            </draw:line>
            <draw:connector draw:style-name="gr8" draw:text-style-name="P1" draw:layer="layout" draw:type="line" svg:x1="7.76cm" svg:y1="5.615cm" svg:x2="7.002cm" svg:y2="4.718cm" draw:start-shape="id21" draw:start-glue-point="0" svg:d="m7760 5615-758-897">
              <text:p/>
            </draw:connector>
            <draw:custom-shape draw:style-name="gr9" draw:text-style-name="P1" draw:layer="layout" svg:width="0.2cm" svg:height="0.2cm" draw:transform="rotate (0.6981317007976) translate (6.819cm 4.70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0" draw:text-style-name="P3" draw:layer="layout" svg:width="0.693cm" svg:height="0.662cm" svg:x="4.06cm" svg:y="6.115cm">
              <draw:text-box>
                <text:p text:style-name="P2"><text:span text:style-name="T1">A</text:span></text:p>
              </draw:text-box>
            </draw:frame>
            <draw:frame draw:style-name="gr10" draw:text-style-name="P4" draw:layer="layout" svg:width="0.693cm" svg:height="0.662cm" svg:x="4.057cm" svg:y="8.761cm">
              <draw:text-box>
                <text:p text:style-name="P2"><text:span text:style-name="T2">B</text:span></text:p>
              </draw:text-box>
            </draw:frame>
            <draw:circle draw:style-name="gr2" draw:text-style-name="P1" draw:layer="layout" svg:width="0.5cm" svg:height="0.5cm" svg:x="2.16cm" svg:y="4.315cm">
              <text:p/>
            </draw:circle>
            <draw:circle draw:style-name="gr2" draw:text-style-name="P1" draw:layer="layout" svg:width="0.5cm" svg:height="0.5cm" svg:x="4.46cm" svg:y="4.315cm">
              <text:p/>
            </draw:circle>
            <draw:circle draw:style-name="gr2" draw:text-style-name="P1" draw:layer="layout" svg:width="0.5cm" svg:height="0.5cm" svg:x="2.16cm" svg:y="6.415cm">
              <text:p/>
            </draw:circle>
            <draw:circle draw:style-name="gr2" draw:text-style-name="P1" draw:layer="layout" svg:width="0.5cm" svg:height="0.5cm" svg:x="2.16cm" svg:y="8.915cm">
              <text:p/>
            </draw:circle>
            <draw:circle draw:style-name="gr2" draw:text-style-name="P1" draw:layer="layout" svg:width="0.5cm" svg:height="0.5cm" svg:x="6.76cm" svg:y="8.915cm">
              <text:p/>
            </draw:circle>
            <draw:circle draw:style-name="gr2" draw:text-style-name="P1" draw:layer="layout" svg:width="0.5cm" svg:height="0.5cm" svg:x="6.76cm" svg:y="6.415cm">
              <text:p/>
            </draw:circle>
            <draw:frame draw:style-name="gr10" draw:text-style-name="P6" draw:layer="layout" svg:width="0.709cm" svg:height="0.662cm" svg:x="6.468cm" svg:y="3.895cm">
              <draw:text-box>
                <text:p text:style-name="P5"><text:span text:style-name="T3">C</text:span></text:p>
              </draw:text-box>
            </draw:frame>
          </draw:g>
          <draw:rect draw:style-name="gr11" draw:text-style-name="P1" draw:layer="layout" svg:width="1.5cm" svg:height="0.5cm" svg:x="4.56cm" svg:y="10.315cm">
            <text:p/>
          </draw:rect>
          <draw:rect draw:style-name="gr11" draw:text-style-name="P1" draw:layer="layout" svg:width="1.5cm" svg:height="0.5cm" svg:x="4.56cm" svg:y="3.715cm">
            <text:p/>
          </draw:rect>
        </draw:g>
        <draw:g>
          <draw:frame draw:style-name="gr12" draw:text-style-name="P1" draw:layer="layout" svg:width="6.445cm" svg:height="5.927cm" svg:x="11.055cm" svg:y="3.5cm">
            <draw:image xlink:href="Pictures/2000026B0000192E000017282704A445.svm" xlink:type="simple" xlink:show="embed" xlink:actuate="onLoad">
              <text:p/>
            </draw:image>
          </draw:frame>
          <draw:frame draw:style-name="gr12" draw:text-style-name="P1" draw:layer="layout" svg:width="6.408cm" svg:height="5.927cm" svg:x="11.024cm" svg:y="10.339cm">
            <draw:image xlink:href="Pictures/200001D800001909000017280EF69417.svm" xlink:type="simple" xlink:show="embed" xlink:actuate="onLoad">
              <text:p/>
            </draw:image>
          </draw:frame>
          <draw:frame draw:style-name="gr10" draw:text-style-name="P7" draw:layer="layout" svg:width="0.904cm" svg:height="0.662cm" svg:x="13.9cm" svg:y="9.6cm">
            <draw:text-box>
              <text:p><text:span text:style-name="T4">(A)</text:span></text:p>
            </draw:text-box>
          </draw:frame>
          <draw:frame draw:style-name="gr10" draw:text-style-name="P7" draw:layer="layout" svg:width="0.904cm" svg:height="0.662cm" svg:x="13.9cm" svg:y="16.4cm">
            <draw:text-box>
              <text:p><text:span text:style-name="T4">(B)</text:span></text:p>
            </draw:text-box>
          </draw:frame>
        </draw:g>
        <draw:frame draw:style-name="gr12" draw:text-style-name="P1" draw:layer="layout" svg:width="4.606cm" svg:height="3.902cm" svg:x="3.894cm" svg:y="16.098cm">
          <draw:image xlink:href="Pictures/200000A2000011FF00000F3F7B6DC0A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elo Berejuck</meta:initial-creator>
    <meta:creation-date>2011-01-09T15:18:49.44</meta:creation-date>
    <dc:date>2011-01-09T17:30:30.49</dc:date>
    <dc:creator>Marcelo Berejuck</dc:creator>
    <meta:editing-duration>PT02H11M36S</meta:editing-duration>
    <meta:editing-cycles>10</meta:editing-cycles>
    <meta:generator>BrOffice.org/3.2$Win32 OpenOffice.org_project/320m12$Build-9483</meta:generator>
    <meta:document-statistic meta:object-count="106"/>
  </office:meta>
</office:document-meta>
</file>