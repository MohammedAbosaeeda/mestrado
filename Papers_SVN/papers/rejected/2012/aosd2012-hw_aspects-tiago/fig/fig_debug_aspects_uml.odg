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1cm" fo:margin-bottom="0.1cm" fo:line-height="100%" fo:text-align="start" fo:text-indent="0cm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-0.681cm" svg:y="5.047cm"/>
          <draw:glue-point draw:id="5" svg:x="-0.681cm" svg:y="-5cm"/>
          <draw:glue-point draw:id="6" svg:x="-0.692cm" svg:y="-4.443cm"/>
          <draw:glue-point draw:id="7" svg:x="3.501cm" svg:y="0.337cm"/>
          <draw:custom-shape draw:style-name="gr1" draw:text-style-name="P2" draw:layer="layout" svg:width="7.5cm" svg:height="1cm" svg:x="16.2cm" svg:y="9.6cm">
            <text:p text:style-name="P1"><text:span text:style-name="T1">DebuggedComm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7.5cm" svg:height="3.5cm" svg:x="16.2cm" svg:y="10.6cm">
            <text:p text:style-name="P3"><text:span text:style-name="T2">+clk_in : sc_in&lt;bool&gt;</text:span></text:p>
            <text:p text:style-name="P3"><text:span text:style-name="T3">+rst_in : sc_in&lt;bool&gt;</text:span></text:p>
            <text:p text:style-name="P3"><text:span text:style-name="T3">+trigger_out : sc_out&lt;bool&gt;</text:span></text:p>
            <text:p text:style-name="P3"><text:span text:style-name="T3">+data_out : sc_out&lt;sc_uint&lt;DATA_SIZE&gt; &gt;</text:span></text:p>
            <text:p text:style-name="P3"><text:span text:style-name="T3">+op_rdy_out : sc_out&lt;bool&gt;</text:span></text:p>
            <text:p text:style-name="P3"><text:span text:style-name="T3">+op_req_in : sc_in&lt;bool&gt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5cm" svg:height="0.5cm" svg:x="16.2cm" svg:y="14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7cm" svg:height="0.5cm" svg:x="21.8cm" svg:y="9.3cm">
            <text:p text:style-name="P5"><text:span text:style-name="T4">DATA_SIZE : int</text:span></text:p>
            <draw:enhanced-geometry svg:viewBox="0 0 21600 21600" draw:type="rectangle" draw:enhanced-path="M 0 0 L 21600 0 21600 21600 0 21600 0 0 Z N"/>
          </draw:custom-shape>
        </draw:g>
        <draw:g draw:id="id4">
          <draw:glue-point draw:id="4" svg:x="-1.019cm" svg:y="4.99cm"/>
          <draw:custom-shape draw:style-name="gr1" draw:text-style-name="P2" draw:layer="layout" svg:width="8.337cm" svg:height="1cm" svg:x="15.762cm" svg:y="3.581cm">
            <text:p text:style-name="P1"><text:span text:style-name="T1">Trace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8.337cm" svg:height="2.991cm" svg:x="15.762cm" svg:y="4.581cm">
            <text:p text:style-name="P3"><text:span text:style-name="T3">+invoc_return_in : sc_in&lt;bool&gt; </text:span></text:p>
            <text:p text:style-name="P3"><text:span text:style-name="T2">+operation_in : </text:span></text:p>
            <text:p text:style-name="P3"><text:span text:style-name="T2"><text:tab/></text:span><text:span text:style-name="T3">sc_in&lt;sc_uint&lt;OPERATION_SIZE&gt; &gt;</text:span></text:p>
            <text:p text:style-name="P3"><text:span text:style-name="T2">+param_return_in : </text:span></text:p>
            <text:p text:style-name="P3"><text:span text:style-name="T2"><text:tab/></text:span><text:span text:style-name="T3">sc_in&lt;sc_uint&lt;PARAM_RETURN_SIZE&gt; 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8.337cm" svg:height="0.7cm" svg:x="15.762cm" svg:y="7.581cm">
            <text:p text:style-name="P5"><text:span text:style-name="T4">+ &lt;&lt;SC_CTHREAD&gt;&gt; action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903cm" svg:height="1cm" svg:x="21.077cm" svg:y="3.081cm">
            <text:p text:style-name="P5"><text:span text:style-name="T4">OPERATION_SIZE : int</text:span></text:p>
            <text:p text:style-name="P1"><text:span text:style-name="T4">PARAM_RETURN_SIZE : int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0.87cm" svg:y="-3.697cm"/>
          <draw:custom-shape draw:style-name="gr1" draw:text-style-name="P2" draw:layer="layout" svg:width="7.356cm" svg:height="1cm" svg:x="12.2cm" svg:y="16.2cm">
            <text:p text:style-name="P1"><text:span text:style-name="T1">Profile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7.356cm" svg:height="1.715cm" svg:x="12.2cm" svg:y="17.2cm">
            <text:p text:style-name="P3"><text:span text:style-name="T3">+start_stop_in : sc_in&lt;bool&gt; </text:span></text:p>
            <text:p text:style-name="P3"><text:span text:style-name="T2">+operation_in : </text:span></text:p>
            <text:p text:style-name="P3"><text:span text:style-name="T2"><text:tab/></text:span><text:span text:style-name="T3">sc_in&lt;sc_uint&lt;OPERATION_SIZE&gt; &gt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7.356cm" svg:height="0.7cm" svg:x="12.2cm" svg:y="18.9cm">
            <text:p text:style-name="P5"><text:span text:style-name="T4">+ &lt;&lt;SC_CTHREAD&gt;&gt; action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981cm" svg:height="1cm" svg:x="16.957cm" svg:y="15.7cm">
            <text:p text:style-name="P5"><text:span text:style-name="T4">OPERATION_SIZE : int</text:span></text:p>
            <text:p text:style-name="P5"><text:span text:style-name="T4">PRECISION : int</text:span></text:p>
            <draw:enhanced-geometry svg:viewBox="0 0 21600 21600" draw:type="rectangle" draw:enhanced-path="M 0 0 L 21600 0 21600 21600 0 21600 0 0 Z N"/>
          </draw:custom-shape>
        </draw:g>
        <draw:g draw:id="id3">
          <draw:glue-point draw:id="4" svg:x="-0.872cm" svg:y="-4.03cm"/>
          <draw:custom-shape draw:style-name="gr1" draw:text-style-name="P2" draw:layer="layout" svg:width="6.384cm" svg:height="1cm" svg:x="21.054cm" svg:y="16.041cm">
            <text:p text:style-name="P1"><text:span text:style-name="T1">Watc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6" draw:layer="layout" svg:width="6.384cm" svg:height="1cm" svg:x="21.054cm" svg:y="17.041cm">
            <text:p text:style-name="P3"><text:span text:style-name="T2">+state_in :</text:span></text:p>
            <text:p text:style-name="P3"><text:span text:style-name="T2"><text:tab/></text:span><text:span text:style-name="T3">sc_in&lt;sc_uint&lt;STATE_SIZE&gt; 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7" draw:layer="layout" svg:width="6.384cm" svg:height="0.7cm" svg:x="21.054cm" svg:y="18.041cm">
            <text:p text:style-name="P5"><text:span text:style-name="T4">+ &lt;&lt;SC_CTHREAD&gt;&gt; a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073cm" svg:height="0.5cm" svg:x="25.265cm" svg:y="15.741cm">
            <text:p text:style-name="P5"><text:span text:style-name="T4">STATE_SIZE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19.785cm" svg:y1="14.6cm" svg:x2="15.809cm" svg:y2="16.209cm" draw:start-shape="id1" draw:start-glue-point="4" draw:end-shape="id2" draw:end-glue-point="4" svg:d="m19785 14600v555h-3976v1054">
          <text:p/>
        </draw:connector>
        <draw:connector draw:style-name="gr5" draw:text-style-name="P8" draw:layer="layout" svg:x1="19.785cm" svg:y1="14.6cm" svg:x2="24.061cm" svg:y2="16.032cm" draw:start-shape="id1" draw:start-glue-point="4" draw:end-shape="id3" draw:end-glue-point="4" svg:d="m19785 14600v576h4276v856">
          <text:p/>
        </draw:connector>
        <draw:connector draw:style-name="gr5" draw:text-style-name="P8" draw:layer="layout" svg:x1="19.776cm" svg:y1="9.596cm" svg:x2="19.83cm" svg:y2="8.275cm" draw:start-shape="id1" draw:start-glue-point="6" draw:end-shape="id4" draw:end-glue-point="4" svg:d="m19776 9596v-800h54v-521">
          <text:p/>
        </draw:connector>
        <draw:g draw:id="id5">
          <draw:custom-shape draw:style-name="gr1" draw:text-style-name="P2" draw:layer="layout" svg:width="2.45cm" svg:height="1cm" svg:x="24.771cm" svg:y="11.343cm">
            <text:p text:style-name="P1"><text:span text:style-name="T1">sc_modu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45cm" svg:height="0.5cm" svg:x="24.771cm" svg:y="12.343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8" draw:layer="layout" svg:x1="24.771cm" svg:y1="12.093cm" svg:x2="23.68cm" svg:y2="12.111cm" draw:start-shape="id5" draw:start-glue-point="3" svg:d="m24771 12093h-808v18h-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trokedTriangle" svg:viewBox="0 0 100 100" svg:d="m0 100 50-100 50 96h-4l-46-92-46 92h96v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4-08T17:17:21</dc:date>
    <meta:editing-duration>PT01H42M01S</meta:editing-duration>
    <meta:editing-cycles>26</meta:editing-cycles>
    <meta:generator>OpenOffice.org/3.0$Linux OpenOffice.org_project/300m15$Build-9379</meta:generator>
    <meta:document-statistic meta:object-count="27"/>
  </office:meta>
</office:document-meta>
</file>