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1" draw:marker-start-width="0.38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3" style:family="text">
      <style:text-properties fo:font-family="Helvetica" style:font-family-generic="swiss" fo:font-size="9pt" style:font-size-asian="9pt" style:font-size-complex="9pt"/>
    </style:style>
    <style:style style:name="T4" style:family="text">
      <style:text-properties fo:color="#000000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5" style:family="text">
      <style:text-properties fo:font-family="Helvetica" style:font-family-generic="swiss" fo:font-size="9pt" style:font-size-asian="9pt" style:font-size-complex="9pt"/>
    </style:style>
    <style:style style:name="T6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787cm" svg:height="0.63cm" svg:x="15.27cm" svg:y="6.59cm">
          <text:p text:style-name="P1"><text:span text:style-name="T1">Scheduling_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.364cm" svg:height="0.63cm" svg:x="15.481cm" svg:y="8.115cm">
          <text:p text:style-name="P1"><text:span text:style-name="T1">Ordered_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.202cm" svg:height="0.63cm" svg:x="16.062cm" svg:y="9.66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27cm" svg:y1="6.905cm" svg:x2="14.219cm" svg:y2="6.91cm" draw:start-shape="id1" draw:start-glue-point="3" draw:end-shape="id2" draw:end-glue-point="4" svg:d="m15270 6905h-521v5h-530">
          <text:p/>
        </draw:connector>
        <draw:connector draw:style-name="gr2" draw:text-style-name="P3" draw:layer="layout" svg:x1="16.663cm" svg:y1="8.115cm" svg:x2="16.663cm" svg:y2="7.22cm" draw:start-shape="id3" draw:start-glue-point="0" draw:end-shape="id1" draw:end-glue-point="2" svg:d="m16663 8115v-895">
          <text:p/>
        </draw:connector>
        <draw:connector draw:style-name="gr2" draw:text-style-name="P3" draw:layer="layout" svg:x1="16.663cm" svg:y1="9.66cm" svg:x2="16.663cm" svg:y2="8.745cm" draw:start-shape="id4" draw:start-glue-point="0" draw:end-shape="id3" draw:end-glue-point="2" svg:d="m16663 9660v-915">
          <text:p/>
        </draw:connector>
        <draw:g draw:id="id2">
          <draw:glue-point draw:id="4" svg:x="4.982cm" svg:y="-3.852cm"/>
          <draw:g>
            <draw:custom-shape draw:style-name="gr3" draw:text-style-name="P2" draw:layer="layout" svg:width="4.978cm" svg:height="0.635cm" svg:x="9.23cm" svg:y="6.652cm">
              <text:p text:style-name="P3"><text:span text:style-name="T1">Schedu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4.978cm" svg:height="0.382cm" svg:x="9.23cm" svg:y="7.28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5cm" svg:height="3.009cm" svg:x="9.23cm" svg:y="7.669cm">
              <text:p text:style-name="P5"><text:span text:style-name="T2">+ insert(obj : List_Link&lt;T&gt;)</text:span></text:p>
              <text:p text:style-name="P5"><text:span text:style-name="T3">+ remove(</text:span><text:span text:style-name="T4">obj : List_Link&lt;T&gt;</text:span><text:span text:style-name="T3">) : T</text:span></text:p>
              <text:p text:style-name="P5"><text:span text:style-name="T3">+ resume(</text:span><text:span text:style-name="T4">obj : List_Link&lt;T&gt;</text:span><text:span text:style-name="T3">)</text:span></text:p>
              <text:p text:style-name="P5"><text:span text:style-name="T5">+ suspend(</text:span><text:span text:style-name="T4">obj : List_Link&lt;T&gt;</text:span><text:span text:style-name="T5">)</text:span></text:p>
              <text:p text:style-name="P5"><text:span text:style-name="T3">+ chosen() : T</text:span></text:p>
              <text:p text:style-name="P5"><text:span text:style-name="T3">+ choose() : T</text:span></text:p>
              <text:p text:style-name="P5"><text:span text:style-name="T3">+ choose_another() : 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8" draw:layer="layout" svg:width="1.844cm" svg:height="0.5cm" svg:x="8.811cm" svg:y="6.421cm">
            <text:p text:style-name="P7"><text:span text:style-name="T6">T : clas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0T16:04:53</dc:date>
    <meta:editing-duration>PT05H38M25S</meta:editing-duration>
    <meta:editing-cycles>60</meta:editing-cycles>
    <meta:generator>OpenOffice.org/3.1$Unix OpenOffice.org_project/310m19$Build-9420</meta:generator>
    <meta:print-date>2011-08-20T15:00:02</meta:print-date>
    <dc:creator>Tiago Mück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