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94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102cm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/>
      <style:text-properties fo:font-family="'Liberation Sans'" style:font-family-generic="swiss" style:font-pitch="variable"/>
    </style:style>
    <style:style style:name="P2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8pt" style:font-size-asian="8pt" style:font-size-complex="8pt"/>
    </style:style>
    <style:style style:name="P3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family="'Liberation Sans'" style:font-family-generic="swiss" style:font-pitch="variable"/>
    </style:style>
    <style:style style:name="P5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2" draw:layer="layout" svg:width="2.399cm" svg:height="0.744cm" svg:x="12.471cm" svg:y="9.046cm">
          <draw:text-box>
            <text:p text:style-name="P1"><text:span text:style-name="T1">Timeout</text:span></text:p>
          </draw:text-box>
        </draw:frame>
        <draw:frame draw:style-name="gr1" draw:text-style-name="P2" draw:layer="layout" svg:width="2.399cm" svg:height="0.887cm" svg:x="9.796cm" svg:y="7.222cm">
          <draw:text-box>
            <text:p text:style-name="P1"><text:span text:style-name="T1">RX</text:span></text:p>
            <text:p text:style-name="P1"><text:span text:style-name="T1">pending</text:span></text:p>
          </draw:text-box>
        </draw:frame>
        <draw:frame draw:style-name="gr1" draw:text-style-name="P2" draw:layer="layout" svg:width="3.175cm" svg:height="1.205cm" svg:x="16.94cm" svg:y="6.866cm">
          <draw:text-box>
            <text:p text:style-name="P1"><text:span text:style-name="T1">RX</text:span></text:p>
            <text:p text:style-name="P1"><text:span text:style-name="T1">Contention</text:span></text:p>
            <text:p text:style-name="P1"><text:span text:style-name="T1">OK</text:span></text:p>
          </draw:text-box>
        </draw:frame>
        <draw:frame draw:style-name="gr1" draw:text-style-name="P2" draw:layer="layout" svg:width="2.399cm" svg:height="0.887cm" svg:x="13.506cm" svg:y="7.315cm">
          <draw:text-box>
            <text:p text:style-name="P1"><text:span text:style-name="T1">RX</text:span></text:p>
            <text:p text:style-name="P1"><text:span text:style-name="T1">end</text:span></text:p>
          </draw:text-box>
        </draw:frame>
        <draw:custom-shape draw:style-name="gr2" draw:text-style-name="P3" xml:id="id2" draw:id="id2" draw:layer="layout" svg:width="1.88cm" svg:height="0.787cm" svg:x="12.136cm" svg:y="7.71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RX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1.88cm" svg:height="0.787cm" svg:x="15.795cm" svg:y="7.71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TX 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88cm" svg:height="0.787cm" svg:x="8.235cm" svg:y="7.774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88cm" svg:height="0.787cm" svg:x="12.112cm" svg:y="10.408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88cm" svg:height="0.787cm" svg:x="19.67cm" svg:y="7.774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0.189cm" svg:y1="8.108cm" svg:x2="12.136cm" svg:y2="8.108cm" draw:start-shape="id1" draw:end-shape="id2" draw:end-glue-point="3" svg:d="m10189 8108h1947">
          <text:p/>
        </draw:connector>
        <draw:connector draw:style-name="gr4" draw:text-style-name="P4" draw:layer="layout" draw:type="curve" svg:x1="14.016cm" svg:y1="8.108cm" svg:x2="15.795cm" svg:y2="8.108cm" draw:start-shape="id2" draw:start-glue-point="1" draw:end-shape="id3" draw:end-glue-point="3" svg:d="m14016 8108h1779">
          <text:p/>
        </draw:connector>
        <draw:connector draw:style-name="gr4" draw:text-style-name="P4" draw:layer="layout" draw:type="curve" svg:x1="17.675cm" svg:y1="8.108cm" svg:x2="19.64cm" svg:y2="8.108cm" draw:start-shape="id3" draw:start-glue-point="1" draw:end-shape="id4" svg:d="m17675 8108h1965">
          <text:p/>
        </draw:connector>
        <draw:connector draw:style-name="gr4" draw:text-style-name="P4" draw:layer="layout" draw:type="curve" svg:x1="13.076cm" svg:y1="8.502cm" svg:x2="13.076cm" svg:y2="10.671cm" draw:start-shape="id2" draw:start-glue-point="2" draw:end-shape="id5" draw:end-glue-point="0" svg:d="m13076 8502v2169">
          <text:p/>
        </draw:connector>
        <draw:custom-shape draw:style-name="gr5" draw:text-style-name="P5" xml:id="id1" draw:id="id1" draw:layer="layout" svg:width="3.175cm" svg:height="1.125cm" svg:x="7.014cm" svg:y="7.54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3">ASYNCHRONOUS</text:span></text:p>
          <text:p text:style-name="P1"><text:span text:style-name="T3">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1.88cm" svg:height="0.787cm" svg:x="12.136cm" svg:y="10.671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3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1.88cm" svg:height="0.78cm" svg:x="19.64cm" svg:y="7.718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3">RX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11-16T18:28:19</meta:creation-date>
    <dc:date>2011-12-11T03:25:23</dc:date>
    <meta:editing-duration>PT3H43M40S</meta:editing-duration>
    <meta:editing-cycles>17</meta:editing-cycles>
    <meta:generator>LibreOffice/3.4$Linux LibreOffice_project/340m1$Build-402</meta:generator>
    <dc:creator>Antônio Augusto Fröhlich</dc:cre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