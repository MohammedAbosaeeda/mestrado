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815cm"/>
    </style:style>
    <style:style style:name="gr4" style:family="graphic" style:parent-style-name="standard">
      <style:graphic-properties draw:stroke="dash" draw:stroke-dash="Fine_20_Dotted" svg:stroke-width="0.076cm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dash" draw:stroke-dash="Ultrafine_20_Dashed" svg:stroke-width="0.02cm" draw:marker-start="StrokedCirc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gr6" style:family="graphic" style:parent-style-name="standard">
      <style:graphic-properties svg:stroke-width="0.02cm" draw:marker-start-width="0.335cm" draw:marker-end="Line_20_Arrow" draw:marker-end-width="0.235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2cm" draw:marker-start="StrokedTriang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gr9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2.934cm" fo:padding-top="0cm" fo:padding-bottom="0cm" fo:padding-left="0cm" fo:padding-right="0cm"/>
    </style:style>
    <style:style style:name="gr11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000000" draw:fill="none" draw:fill-color="#ffffff" fo:min-height="2.734cm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0.815cm" fo:padding-top="0cm" fo:padding-bottom="0cm" fo:padding-left="0cm" fo:padding-right="0cm"/>
    </style:style>
    <style:style style:name="gr1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Helvetica" style:font-family-generic="swiss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family="Helvetica" style:font-family-generic="swiss" fo:font-size="8pt" style:font-size-asian="8pt" style:font-size-complex="8pt"/>
    </style:style>
    <style:style style:name="T2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3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1" draw:layer="layout" svg:width="2.769cm" svg:height="5.512cm" svg:x="14.6cm" svg:y="17cm">
          <text:p/>
          <draw:enhanced-geometry svg:viewBox="0 0 21600 21600" draw:type="rectangle" draw:enhanced-path="M 0 0 L 21600 0 21600 21600 0 21600 0 0 Z N"/>
        </draw:custom-shape>
        <draw:g draw:id="id2">
          <draw:custom-shape draw:style-name="gr2" draw:text-style-name="P1" draw:layer="layout" svg:width="5.1cm" svg:height="2.746cm" draw:transform="rotate (3.1415926535892) translate (22.6cm 24cm)">
            <text:p/>
            <draw:enhanced-geometry svg:viewBox="0 0 21600 21600" draw:mirror-horizontal="true" draw:glue-points="10800 0 0 10800 10800 21600 21600 10800" draw:text-areas="0 0 21600 ?f11" draw:type="paper" draw:modifiers="19334.5618506175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3" draw:text-style-name="P3" draw:layer="layout" svg:width="5.1cm" svg:height="2.743cm" svg:x="17.5cm" svg:y="21.216cm">
            <draw:text-box>
              <text:p text:style-name="P2"><text:span text:style-name="T1">void operation(){</text:span></text:p>
              <text:p text:style-name="P2"><text:span text:style-name="T1"><text:s text:c="2"/>…</text:span></text:p>
              <text:p text:style-name="P2"><text:span text:style-name="T1"><text:s text:c="2"/></text:span><text:span text:style-name="T1">if (Traits&lt;Component&gt;::feature_1) {</text:span></text:p>
              <text:p text:style-name="P2"><text:span text:style-name="T1"><text:s text:c="4"/></text:span><text:span text:style-name="T1">...</text:span></text:p>
              <text:p text:style-name="P2"><text:span text:style-name="T1"><text:s text:c="2"/></text:span><text:span text:style-name="T1">}</text:span></text:p>
              <text:p text:style-name="P2"><text:span text:style-name="T1"><text:s text:c="2"/></text:span><text:span text:style-name="T1">...</text:span></text:p>
              <text:p text:style-name="P2"><text:span text:style-name="T1">}</text:span></text:p>
            </draw:text-box>
          </draw:frame>
        </draw:g>
        <draw:line draw:style-name="gr4" draw:text-style-name="P1" draw:layer="layout" svg:x1="15.9cm" svg:y1="19.616cm" svg:x2="15.9cm" svg:y2="21.116cm">
          <text:p/>
        </draw:line>
        <draw:connector draw:style-name="gr5" draw:text-style-name="P4" draw:layer="layout" svg:x1="20.05cm" svg:y1="19.853cm" svg:x2="20.05cm" svg:y2="21.216cm" draw:start-shape="id1" draw:start-glue-point="2" draw:end-shape="id2" draw:end-glue-point="0" svg:d="m20050 19853v1363">
          <text:p/>
        </draw:connector>
        <draw:connector draw:style-name="gr6" draw:text-style-name="P1" draw:layer="layout" draw:type="line" svg:x1="18.552cm" svg:y1="18.976cm" svg:x2="17.1cm" svg:y2="17.816cm" draw:start-shape="id1" draw:start-glue-point="3" draw:end-shape="id3" draw:end-glue-point="1" svg:d="m18552 18976-1452-1160">
          <text:p/>
        </draw:connector>
        <draw:connector draw:style-name="gr6" draw:text-style-name="P1" draw:layer="layout" draw:type="line" svg:x1="18.552cm" svg:y1="18.976cm" svg:x2="17.1cm" svg:y2="18.976cm" draw:start-shape="id1" draw:start-glue-point="3" draw:end-shape="id4" draw:end-glue-point="1" svg:d="m18552 18976h-1452">
          <text:p/>
        </draw:connector>
        <draw:connector draw:style-name="gr6" draw:text-style-name="P1" draw:layer="layout" draw:type="line" svg:x1="18.552cm" svg:y1="18.976cm" svg:x2="17.1cm" svg:y2="21.416cm" draw:start-shape="id1" draw:start-glue-point="3" draw:end-shape="id5" draw:end-glue-point="1" svg:d="m18552 18976-1452 2440">
          <text:p/>
        </draw:connector>
        <draw:custom-shape draw:style-name="gr7" draw:text-style-name="P1" draw:id="id3" draw:layer="layout" svg:width="2.4cm" svg:height="1cm" svg:x="14.7cm" svg:y="17.316cm">
          <text:p text:style-name="P1"><text:span text:style-name="T2">Config.</text:span></text:p>
          <text:p text:style-name="P1"><text:span text:style-name="T2">Feature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4" draw:layer="layout" svg:width="2.4cm" svg:height="1cm" svg:x="14.7cm" svg:y="18.476cm">
          <text:p text:style-name="P1"><text:span text:style-name="T2">Config.</text:span></text:p>
          <text:p text:style-name="P1"><text:span text:style-name="T2">Feature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5" draw:layer="layout" svg:width="2.4cm" svg:height="1cm" svg:x="14.7cm" svg:y="20.916cm">
          <text:p text:style-name="P1"><text:span text:style-name="T2">Config.</text:span></text:p>
          <text:p text:style-name="P1"><text:span text:style-name="T2">Feature 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8cm" svg:y1="15.786cm" svg:x2="20.05cm" svg:y2="18.1cm" draw:start-shape="id6" draw:start-glue-point="2" draw:end-shape="id1" draw:end-glue-point="0" svg:d="m18000 15786v1156h2050v1158">
          <text:p/>
        </draw:connector>
        <draw:connector draw:style-name="gr8" draw:text-style-name="P4" draw:layer="layout" svg:x1="22cm" svg:y1="15.786cm" svg:x2="20.05cm" svg:y2="18.1cm" draw:start-shape="id7" draw:start-glue-point="2" draw:end-shape="id1" draw:end-glue-point="0" svg:d="m22000 15786v1156h-1950v1158">
          <text:p/>
        </draw:connector>
        <draw:custom-shape draw:style-name="gr9" draw:text-style-name="P1" draw:id="id8" draw:layer="layout" svg:width="0.3cm" svg:height="0.3cm" svg:x="19.9cm" svg:y="1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9">
          <draw:glue-point draw:id="4" svg:x="-3.909cm" svg:y="-0.934cm"/>
          <draw:glue-point draw:id="5" svg:x="-3.909cm" svg:y="-1.488cm"/>
          <draw:glue-point draw:id="6" svg:x="4.272cm" svg:y="-1.488cm"/>
          <draw:custom-shape draw:style-name="gr2" draw:text-style-name="P1" draw:layer="layout" svg:width="5.1cm" svg:height="3.258cm" draw:transform="rotate (3.1415926535892) translate (27.3cm 19.6cm)">
            <text:p/>
            <draw:enhanced-geometry svg:viewBox="0 0 21600 21600" draw:mirror-horizontal="true" draw:mirror-vertical="false" draw:glue-points="10800 0 0 10800 10800 21600 21600 10800" draw:text-areas="0 0 21600 ?f11" draw:type="paper" draw:modifiers="19241.40364634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0" draw:text-style-name="P3" draw:layer="layout" svg:width="4.659cm" svg:height="3.205cm" svg:x="22.32cm" svg:y="16.304cm">
            <draw:text-box>
              <text:p text:style-name="P2"><text:span text:style-name="T1">public Component : </text:span></text:p>
              <text:p text:style-name="P2"><text:span text:style-name="T1"><text:s text:c="4"/></text:span><text:span text:style-name="T1">public sc_module,</text:span></text:p>
              <text:p text:style-name="P2"><text:span text:style-name="T1"><text:s text:c="4"/></text:span><text:span text:style-name="T1">public </text:span></text:p>
              <text:p text:style-name="P2"><text:span text:style-name="T1"><text:s text:c="4"/></text:span><text:span text:style-name="T1">IF&lt;Traits&lt;Component&gt;::feature_n,</text:span></text:p>
              <text:p text:style-name="P2"><text:span text:style-name="T1"><text:s text:c="8"/></text:span><text:span text:style-name="T1">Base_Class_1,</text:span></text:p>
              <text:p text:style-name="P2"><text:span text:style-name="T1"><text:s text:c="8"/></text:span><text:span text:style-name="T1">Base_Class_2&gt;::Result </text:span></text:p>
              <text:p text:style-name="P2"><text:span text:style-name="T1">{</text:span></text:p>
              <text:p text:style-name="P2"><text:span text:style-name="T1"><text:s text:c="3"/></text:span><text:span text:style-name="T1">...</text:span></text:p>
              <text:p text:style-name="P2"><text:span text:style-name="T1">};</text:span></text:p>
            </draw:text-box>
          </draw:frame>
        </draw:g>
        <draw:connector draw:style-name="gr11" draw:text-style-name="P1" draw:layer="layout" draw:type="lines" draw:line-skew="-0.261cm -0.399cm" svg:x1="20.155cm" svg:y1="17.071cm" svg:x2="22.2cm" svg:y2="17.952cm" draw:start-shape="id8" draw:start-glue-point="9" draw:end-shape="id9" svg:d="m20155 17071h304l842 881h899">
          <text:p/>
        </draw:connector>
        <draw:g draw:id="id10">
          <draw:glue-point draw:id="4" svg:x="2.058cm" svg:y="-5.005cm"/>
          <draw:glue-point draw:id="5" svg:x="2.058cm" svg:y="-5.005cm"/>
          <draw:custom-shape draw:style-name="gr2" draw:text-style-name="P1" draw:layer="layout" svg:width="7.5cm" svg:height="3cm" draw:transform="rotate (3.1415926535892) translate (30.2cm 23.4cm)">
            <text:p/>
            <draw:enhanced-geometry svg:viewBox="0 0 21600 21600" draw:mirror-horizontal="true" draw:mirror-vertical="false" draw:glue-points="10800 0 0 10800 10800 21600 21600 10800" draw:text-areas="0 0 21600 ?f11" draw:type="paper" draw:modifiers="19423.01026529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2" draw:text-style-name="P3" draw:layer="layout" svg:width="8cm" svg:height="3.099cm" svg:x="22.6cm" svg:y="20.416cm">
            <draw:text-box>
              <text:p text:style-name="P2"><text:span text:style-name="T1">// IF metaprogram</text:span></text:p>
              <text:p text:style-name="P2"><text:span text:style-name="T1">template&lt;bool condition, typename Then, typename Else&gt;</text:span></text:p>
              <text:p text:style-name="P2"><text:span text:style-name="T1">struct IF </text:span></text:p>
              <text:p text:style-name="P2"><text:span text:style-name="T1">{ typedef Then Result; };</text:span></text:p>
              <text:p text:style-name="P2"><text:span text:style-name="T1"/></text:p>
              <text:p text:style-name="P2"><text:span text:style-name="T1">template&lt;typename Then, typename Else&gt;</text:span></text:p>
              <text:p text:style-name="P2"><text:span text:style-name="T1">struct IF&lt;false, Then, Else&gt;</text:span></text:p>
              <text:p text:style-name="P2"><text:span text:style-name="T1">{ typedef Else Result; };</text:span></text:p>
            </draw:text-box>
          </draw:frame>
        </draw:g>
        <draw:connector draw:style-name="gr5" draw:text-style-name="P4" draw:layer="layout" svg:x1="26.928cm" svg:y1="17.462cm" svg:x2="28.246cm" svg:y2="20.4cm" draw:start-shape="id9" draw:start-glue-point="6" draw:end-shape="id10" draw:end-glue-point="4" svg:d="m26928 17462h1318v2938">
          <text:p/>
        </draw:connector>
        <draw:g draw:id="id12">
          <draw:custom-shape draw:style-name="gr2" draw:text-style-name="P1" draw:layer="layout" svg:width="5.5cm" svg:height="2.762cm" draw:transform="rotate (3.1415926535892) translate (22.8cm 13.6cm)">
            <text:p/>
            <draw:enhanced-geometry svg:viewBox="0 0 21600 21600" draw:mirror-horizontal="true" draw:glue-points="10800 0 0 10800 10800 21600 21600 10800" draw:text-areas="0 0 21600 ?f11" draw:type="paper" draw:modifiers="19624.940919832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3" draw:text-style-name="P3" draw:layer="layout" svg:width="4.841cm" svg:height="2.493cm" svg:x="17.529cm" svg:y="10.9cm">
            <draw:text-box>
              <text:p text:style-name="P2"><text:span text:style-name="T1">template &lt;&gt; struct Traits&lt;Component&gt;</text:span></text:p>
              <text:p text:style-name="P2"><text:span text:style-name="T1">{</text:span></text:p>
              <text:p text:style-name="P2"><text:span text:style-name="T1"><text:s text:c="4"/></text:span><text:span text:style-name="T1">static const bool feature_1 <text:s text:c="2"/>= true;</text:span></text:p>
              <text:p text:style-name="P2"><text:span text:style-name="T1"><text:s text:c="4"/></text:span><text:span text:style-name="T1">static const bool feature_2 <text:s text:c="2"/>= false;</text:span></text:p>
              <text:p text:style-name="P2"><text:span text:style-name="T1"><text:s text:c="4"/></text:span><text:span text:style-name="T1">...</text:span></text:p>
              <text:p text:style-name="P2"><text:span text:style-name="T1"><text:s text:c="4"/></text:span><text:span text:style-name="T1">static const bool feature_n <text:s text:c="2"/>= true;</text:span></text:p>
              <text:p text:style-name="P2"><text:span text:style-name="T1">};</text:span></text:p>
            </draw:text-box>
          </draw:frame>
        </draw:g>
        <draw:g draw:id="id1">
          <draw:glue-point draw:id="4" svg:x="-1.019cm" svg:y="4.99cm"/>
          <draw:glue-point draw:id="5" svg:x="3.168cm" svg:y="1.937cm"/>
          <draw:glue-point draw:id="6" svg:x="2.326cm" svg:y="1.208cm"/>
          <draw:custom-shape draw:style-name="gr7" draw:text-style-name="P5" draw:layer="layout" svg:width="2.983cm" svg:height="0.635cm" svg:x="18.559cm" svg:y="18.1cm">
            <text:p text:style-name="P1"><text:span text:style-name="T2">Compon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2.983cm" svg:height="0.382cm" svg:x="18.559cm" svg:y="18.73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.997cm" svg:height="0.736cm" svg:x="18.552cm" svg:y="19.117cm">
            <text:p text:style-name="P7"><text:span text:style-name="T3">+operation()</text:span></text:p>
            <draw:enhanced-geometry svg:viewBox="0 0 21600 21600" draw:type="rectangle" draw:enhanced-path="M 0 0 L 21600 0 21600 21600 0 21600 0 0 Z N"/>
          </draw:custom-shape>
        </draw:g>
        <draw:g draw:id="id6">
          <draw:glue-point draw:id="4" svg:x="-0.87cm" svg:y="-3.697cm"/>
          <draw:glue-point draw:id="5" svg:x="-0.872cm" svg:y="-3.202cm"/>
          <draw:custom-shape draw:style-name="gr7" draw:text-style-name="P5" draw:layer="layout" svg:width="2.993cm" svg:height="0.635cm" svg:x="16.507cm" svg:y="13.915cm">
            <text:p text:style-name="P1"><text:span text:style-name="T2">Base class 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988cm" svg:height="0.865cm" svg:x="16.507cm" svg:y="14.55cm">
            <text:p text:style-name="P2"><text:span text:style-name="T4">+attribute0 : int</text:span></text:p>
            <text:p text:style-name="P2"><text:span text:style-name="T4">+attribute1 : i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2.993cm" svg:height="0.381cm" svg:x="16.5cm" svg:y="15.405cm">
            <text:p/>
            <draw:enhanced-geometry svg:viewBox="0 0 21600 21600" draw:type="rectangle" draw:enhanced-path="M 0 0 L 21600 0 21600 21600 0 21600 0 0 Z N"/>
          </draw:custom-shape>
        </draw:g>
        <draw:g draw:id="id7">
          <draw:glue-point draw:id="4" svg:x="-0.87cm" svg:y="-3.697cm"/>
          <draw:glue-point draw:id="5" svg:x="-0.872cm" svg:y="-3.202cm"/>
          <draw:custom-shape draw:style-name="gr7" draw:text-style-name="P5" draw:layer="layout" svg:width="2.993cm" svg:height="0.635cm" svg:x="20.507cm" svg:y="13.915cm">
            <text:p text:style-name="P1"><text:span text:style-name="T2">Base class 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988cm" svg:height="0.865cm" svg:x="20.507cm" svg:y="14.55cm">
            <text:p text:style-name="P2"><text:span text:style-name="T4">+attribute0 : i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2.993cm" svg:height="0.381cm" svg:x="20.5cm" svg:y="15.405cm">
            <text:p/>
            <draw:enhanced-geometry svg:viewBox="0 0 21600 21600" draw:type="rectangle" draw:enhanced-path="M 0 0 L 21600 0 21600 21600 0 21600 0 0 Z N"/>
          </draw:custom-shape>
        </draw:g>
        <draw:connector draw:style-name="gr5" draw:text-style-name="P4" draw:layer="layout" svg:x1="15.984cm" svg:y1="17cm" svg:x2="17.3cm" svg:y2="12.219cm" draw:start-shape="id11" draw:end-shape="id12" draw:end-glue-point="3" svg:d="m15984 17000v-4781h13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Triangle" svg:viewBox="0 0 100 100" svg:d="m0 100 50-100 50 96h-4l-46-92-46 92h96v4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08-15T18:06:32</dc:date>
    <meta:editing-duration>PT02H20M04S</meta:editing-duration>
    <meta:editing-cycles>29</meta:editing-cycles>
    <meta:generator>OpenOffice.org/3.0$Linux OpenOffice.org_project/300m15$Build-9379</meta:gener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