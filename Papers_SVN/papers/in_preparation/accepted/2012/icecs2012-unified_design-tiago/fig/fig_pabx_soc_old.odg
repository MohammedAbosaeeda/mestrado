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76cm" draw:marker-start="Arrow" draw:marker-start-width="0.254cm" draw:marker-end="Arrow" draw:marker-end-width="0.254cm" draw:textarea-horizontal-align="center" draw:textarea-vertical-align="middle" fo:padding-top="0.162cm" fo:padding-bottom="0.162cm" fo:padding-left="0.287cm" fo:padding-right="0.287cm"/>
    </style:style>
    <style:style style:name="gr4" style:family="graphic" style:parent-style-name="standard">
      <style:graphic-properties draw:stroke="dash" draw:stroke-dash="Fine_20_Dashed"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Helvetica" style:font-family-generic="swiss" fo:font-size="10pt" style:font-size-asian="10pt" style:font-size-complex="10pt"/>
    </style:style>
    <style:style style:name="P3" style:family="paragraph">
      <style:text-properties fo:font-family="Helvetica" style:font-family-generic="swiss" fo:font-size="12pt" fo:font-weight="bold" style:font-size-asian="12pt" style:font-weight-asian="bold" style:font-size-complex="12pt" style:font-weight-complex="bold"/>
    </style:style>
    <style:style style:name="T1" style:family="text">
      <style:text-properties fo:font-family="Helvetica" style:font-family-generic="swiss" fo:font-size="10pt" style:font-size-asian="10pt" style:font-size-complex="10pt"/>
    </style:style>
    <style:style style:name="T2" style:family="text">
      <style:text-properties fo:font-family="Helvetica" style:font-family-generic="swis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5" draw:layer="layout" svg:width="5.043cm" svg:height="4.988cm" svg:x="14.477cm" svg:y="6.169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2.159cm" svg:height="1.143cm" svg:x="18.786cm" svg:y="5.729cm">
          <text:p text:style-name="P1"><text:span text:style-name="T1">425 Hz</text:span></text:p>
          <text:p text:style-name="P1"><text:span text:style-name="T1">Generat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59cm" svg:height="1.143cm" svg:x="15.919cm" svg:y="5.007cm">
          <text:p text:style-name="P1"><text:span text:style-name="T1">DTMF</text:span></text:p>
          <text:p text:style-name="P1"><text:span text:style-name="T1">Generat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59cm" svg:height="1.143cm" svg:x="18.831cm" svg:y="10.471cm">
          <text:p text:style-name="P1"><text:span text:style-name="T1">DTMF</text:span></text:p>
          <text:p text:style-name="P1"><text:span text:style-name="T1">Detector</text:span></text:p>
          <draw:enhanced-geometry svg:viewBox="0 0 21600 21600" draw:mirror-horizontal="false" draw:mirror-vertical="false" draw:type="rectangle" draw:enhanced-path="M 0 0 L 21600 0 21600 21600 0 21600 0 0 Z N"/>
        </draw:custom-shape>
        <draw:custom-shape draw:style-name="gr2" draw:text-style-name="P2" draw:id="id8" draw:layer="layout" svg:width="2.159cm" svg:height="1.143cm" svg:x="14.746cm" svg:y="13.279cm">
          <text:p text:style-name="P1"><text:span text:style-name="T1">UART</text:span></text:p>
          <draw:enhanced-geometry svg:viewBox="0 0 21600 21600" draw:type="rectangle" draw:enhanced-path="M 0 0 L 21600 0 21600 21600 0 21600 0 0 Z N"/>
        </draw:custom-shape>
        <draw:custom-shape draw:style-name="gr2" draw:text-style-name="P2" draw:id="id9" draw:layer="layout" svg:width="2.159cm" svg:height="1.143cm" svg:x="17.092cm" svg:y="13.279cm">
          <text:p text:style-name="P1"><text:span text:style-name="T1">GPIO</text:span></text:p>
          <draw:enhanced-geometry svg:viewBox="0 0 21600 21600" draw:type="rectangle" draw:enhanced-path="M 0 0 L 21600 0 21600 21600 0 21600 0 0 Z N"/>
        </draw:custom-shape>
        <draw:custom-shape draw:style-name="gr2" draw:text-style-name="P2" draw:id="id10" draw:layer="layout" svg:width="2.159cm" svg:height="1.143cm" svg:x="19.439cm" svg:y="13.279cm">
          <text:p text:style-name="P1"><text:span text:style-name="T1">IC</text:span></text:p>
          <draw:enhanced-geometry svg:viewBox="0 0 21600 21600" draw:type="rectangle" draw:enhanced-path="M 0 0 L 21600 0 21600 21600 0 21600 0 0 Z N"/>
        </draw:custom-shape>
        <draw:custom-shape draw:style-name="gr2" draw:text-style-name="P2" draw:id="id7" draw:layer="layout" svg:width="2.159cm" svg:height="1.143cm" svg:x="12.399cm" svg:y="13.279cm">
          <text:p text:style-name="P1"><text:span text:style-name="T1">Timer</text:span></text:p>
          <draw:enhanced-geometry svg:viewBox="0 0 21600 21600" draw:type="rectangle" draw:enhanced-path="M 0 0 L 21600 0 21600 21600 0 21600 0 0 Z N"/>
        </draw:custom-shape>
        <draw:custom-shape draw:style-name="gr2" draw:text-style-name="P2" draw:id="id6" draw:layer="layout" svg:width="9.612cm" svg:height="0.861cm" svg:x="12.192cm" svg:y="11.84cm">
          <draw:glue-point draw:id="4" svg:x="-3.656cm" svg:y="2.113cm"/>
          <draw:glue-point draw:id="5" svg:x="-1.215cm" svg:y="2.113cm"/>
          <draw:glue-point draw:id="6" svg:x="1.227cm" svg:y="2.055cm"/>
          <draw:glue-point draw:id="7" svg:x="3.669cm" svg:y="1.986cm"/>
          <draw:glue-point draw:id="8" svg:x="-0.007cm" svg:y="-2.392cm"/>
          <text:p text:style-name="P1"><text:span text:style-name="T1">Local bus</text:span></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id="id1" draw:layer="layout" svg:width="2.159cm" svg:height="1.143cm" svg:x="10.126cm" svg:y="5.175cm">
          <text:p text:style-name="P1"><text:span text:style-name="T1">MIPS32</text:span></text:p>
          <text:p text:style-name="P1"><text:span text:style-name="T1">Core</text:span></text:p>
          <draw:enhanced-geometry svg:viewBox="0 0 21600 21600" draw:type="rectangle" draw:enhanced-path="M 0 0 L 21600 0 21600 21600 0 21600 0 0 Z N"/>
        </draw:custom-shape>
        <draw:custom-shape draw:style-name="gr2" draw:text-style-name="P2" draw:id="id2" draw:layer="layout" svg:width="7.628cm" svg:height="0.861cm" svg:x="7.391cm" svg:y="7.001cm">
          <draw:glue-point draw:id="4" svg:x="-3.049cm" svg:y="2.171cm"/>
          <draw:glue-point draw:id="5" svg:x="-3.85cm" svg:y="1.939cm"/>
          <draw:glue-point draw:id="6" svg:x="-3.439cm" svg:y="1.939cm"/>
          <draw:glue-point draw:id="7" svg:x="-2.679cm" svg:y="2.299cm"/>
          <draw:glue-point draw:id="8" svg:x="-2.351cm" svg:y="2.299cm"/>
          <draw:glue-point draw:id="9" svg:x="-1.961cm" svg:y="2.299cm"/>
          <draw:glue-point draw:id="10" svg:x="-1.633cm" svg:y="2.299cm"/>
          <draw:glue-point draw:id="11" svg:x="-1.407cm" svg:y="2.299cm"/>
          <draw:glue-point draw:id="12" svg:x="-0.936cm" svg:y="2.299cm"/>
          <draw:glue-point draw:id="13" svg:x="-0.504cm" svg:y="2.299cm"/>
          <draw:glue-point draw:id="14" svg:x="-0.003cm" svg:y="2.16cm"/>
          <draw:glue-point draw:id="15" svg:x="0.481cm" svg:y="2.299cm"/>
          <draw:glue-point draw:id="16" svg:x="0.891cm" svg:y="2.299cm"/>
          <draw:glue-point draw:id="17" svg:x="1.342cm" svg:y="2.299cm"/>
          <draw:glue-point draw:id="18" svg:x="1.752cm" svg:y="2.299cm"/>
          <draw:glue-point draw:id="19" svg:x="2.205cm" svg:y="2.299cm"/>
          <draw:glue-point draw:id="20" svg:x="2.615cm" svg:y="2.299cm"/>
          <draw:glue-point draw:id="21" svg:x="2.964cm" svg:y="2.299cm"/>
          <draw:glue-point draw:id="22" svg:x="3.234cm" svg:y="2.369cm"/>
          <draw:glue-point draw:id="23" svg:x="3.599cm" svg:y="2.299cm"/>
          <draw:glue-point draw:id="24" svg:x="0.005cm" svg:y="-2.415cm"/>
          <text:p text:style-name="P1"><text:span text:style-name="T1">Local bus</text:span></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id="id3" draw:layer="layout" svg:width="2.159cm" svg:height="1.143cm" svg:x="10.126cm" svg:y="8.507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2" draw:text-style-name="P2" draw:id="id4" draw:layer="layout" svg:width="2.159cm" svg:height="1.143cm" svg:x="7.797cm" svg:y="8.507cm">
          <text:p text:style-name="P1"><text:span text:style-name="T1">DDR RAM</text:span></text:p>
          <text:p text:style-name="P1"><text:span text:style-name="T1">Controller</text:span></text:p>
          <draw:enhanced-geometry svg:viewBox="0 0 21600 21600" draw:type="rectangle" draw:enhanced-path="M 0 0 L 21600 0 21600 21600 0 21600 0 0 Z N"/>
        </draw:custom-shape>
        <draw:connector draw:style-name="gr3" draw:text-style-name="P1" draw:layer="layout" svg:x1="11.205cm" svg:y1="6.318cm" svg:x2="11.208cm" svg:y2="7.224cm" draw:start-shape="id1" draw:start-glue-point="2" draw:end-shape="id2" draw:end-glue-point="24" svg:d="m11205 6318v328h3v578">
          <text:p/>
        </draw:connector>
        <draw:connector draw:style-name="gr3" draw:text-style-name="P1" draw:layer="layout" svg:x1="11.203cm" svg:y1="7.616cm" svg:x2="11.205cm" svg:y2="8.507cm" draw:start-shape="id2" draw:start-glue-point="14" draw:end-shape="id3" draw:end-glue-point="0" svg:d="m11203 7616v580h2v311">
          <text:p/>
        </draw:connector>
        <draw:connector draw:style-name="gr3" draw:text-style-name="P1" draw:layer="layout" svg:x1="8.88cm" svg:y1="7.617cm" svg:x2="8.876cm" svg:y2="8.507cm" draw:start-shape="id2" draw:start-glue-point="4" draw:end-shape="id4" draw:end-glue-point="0" svg:d="m8880 7617v579h-4v311">
          <text:p/>
        </draw:connector>
        <draw:connector draw:style-name="gr3" draw:text-style-name="P1" draw:layer="layout" svg:x1="13.199cm" svg:y1="7.628cm" svg:x2="14.477cm" svg:y2="8.666cm" draw:start-shape="id2" draw:start-glue-point="20" draw:end-shape="id5" draw:end-glue-point="4" svg:d="m13199 7628v1038h1278">
          <text:p/>
        </draw:connector>
        <draw:connector draw:style-name="gr3" draw:text-style-name="P1" draw:layer="layout" svg:x1="13.484cm" svg:y1="12.451cm" svg:x2="13.478cm" svg:y2="13.279cm" draw:start-shape="id6" draw:start-glue-point="4" draw:end-shape="id7" draw:end-glue-point="0" svg:d="m13484 12451v551h-6v277">
          <text:p/>
        </draw:connector>
        <draw:connector draw:style-name="gr3" draw:text-style-name="P1" draw:layer="layout" svg:x1="15.831cm" svg:y1="12.451cm" svg:x2="15.825cm" svg:y2="13.279cm" draw:start-shape="id6" draw:start-glue-point="5" draw:end-shape="id8" draw:end-glue-point="0" svg:d="m15831 12451v551h-6v277">
          <text:p/>
        </draw:connector>
        <draw:connector draw:style-name="gr3" draw:text-style-name="P1" draw:layer="layout" svg:x1="18.177cm" svg:y1="12.446cm" svg:x2="18.171cm" svg:y2="13.279cm" draw:start-shape="id6" draw:start-glue-point="6" draw:end-shape="id9" draw:end-glue-point="0" svg:d="m18177 12446v556h-6v277">
          <text:p/>
        </draw:connector>
        <draw:connector draw:style-name="gr3" draw:text-style-name="P1" draw:layer="layout" svg:x1="20.524cm" svg:y1="12.44cm" svg:x2="20.518cm" svg:y2="13.279cm" draw:start-shape="id6" draw:start-glue-point="7" draw:end-shape="id10" draw:end-glue-point="0" svg:d="m20524 12440v562h-6v277">
          <text:p/>
        </draw:connector>
        <draw:connector draw:style-name="gr3" draw:text-style-name="P1" draw:layer="layout" svg:x1="16.989cm" svg:y1="11.157cm" svg:x2="16.992cm" svg:y2="12.065cm" draw:start-shape="id5" draw:start-glue-point="10" draw:end-shape="id6" draw:end-glue-point="8" svg:d="m16989 11157v367h3v541">
          <text:p/>
        </draw:connector>
        <draw:custom-shape draw:style-name="gr4" draw:text-style-name="P1" draw:layer="layout" svg:width="14.673cm" svg:height="9.77cm" svg:x="7.246cm" svg:y="4.915cm">
          <text:p/>
          <draw:enhanced-geometry svg:viewBox="0 0 21600 21600" draw:type="rectangle" draw:enhanced-path="M 0 0 L 21600 0 21600 21600 0 21600 0 0 Z N"/>
        </draw:custom-shape>
        <draw:frame draw:style-name="gr5" draw:text-style-name="P3" draw:layer="layout" svg:width="1.653cm" svg:height="1.343cm" svg:x="8.354cm" svg:y="11.654cm">
          <draw:text-box>
            <text:p><text:span text:style-name="T2">PABX</text:span></text:p>
            <text:p><text:span text:style-name="T2">SoC</text:span></text:p>
          </draw:text-box>
        </draw:frame>
        <draw:custom-shape draw:style-name="gr2" draw:text-style-name="P2" draw:layer="layout" svg:width="2.166cm" svg:height="1.14cm" svg:x="19.51cm" svg:y="8.093cm">
          <text:p text:style-name="P1"><text:span text:style-name="T1">Commutation</text:span></text:p>
          <text:p text:style-name="P1"><text:span text:style-name="T1">Matrix</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iago Mück</meta:initial-creator>
    <meta:creation-date>2011-01-28T14:48:19</meta:creation-date>
    <dc:date>2011-08-20T15:40:23</dc:date>
    <meta:editing-duration>PT03H49M21S</meta:editing-duration>
    <meta:editing-cycles>43</meta:editing-cycles>
    <meta:generator>OpenOffice.org/3.0$Linux OpenOffice.org_project/300m15$Build-9379</meta:generator>
    <meta:print-date>2011-08-20T15:00:02</meta:print-date>
    <meta:document-statistic meta:object-count="25"/>
    <meta:user-defined meta:name="Info 1"/>
    <meta:user-defined meta:name="Info 2"/>
    <meta:user-defined meta:name="Info 3"/>
    <meta:user-defined meta:name="Info 4"/>
  </office:meta>
</office:document-meta>
</file>