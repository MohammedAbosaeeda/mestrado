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heads_20_4" draw:marker-start-width="0.25cm" draw:marker-end="" draw:marker-end-width="0.2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="Arrowheads_20_3" draw:marker-start-width="0.25cm" draw:marker-end="" draw:marker-end-width="0.2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0pt" style:font-size-asian="10pt" style:font-size-complex="10pt"/>
    </style:style>
    <style:style style:name="P3" style:family="paragraph">
      <style:text-properties fo:font-family="'Liberation Sans'" style:font-family-generic="swiss" style:font-pitch="variable" fo:font-size="8pt" style:font-size-asian="8pt" style:font-size-complex="8pt"/>
    </style:style>
    <style:style style:name="P4" style:family="paragraph">
      <style:paragraph-properties fo:text-align="center"/>
      <style:text-properties fo:font-family="'Liberation Sans'" style:font-family-generic="swiss" style:font-pitch="variable"/>
    </style:style>
    <style:style style:name="T1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2" style:family="text">
      <style:text-properties fo:font-family="'Liberation Sans'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402cm" svg:height="0.914cm" svg:x="14.847cm" svg:y="7.202cm">
          <text:p text:style-name="P1"><text:span text:style-name="T1">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.4cm" svg:height="0.9cm" svg:x="17.015cm" svg:y="7.209cm">
          <text:p text:style-name="P1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.4cm" svg:height="0.9cm" svg:x="19.15cm" svg:y="7.209cm">
          <text:p text:style-name="P1"><text:span text:style-name="T1">C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249cm" svg:y1="7.659cm" svg:x2="17.015cm" svg:y2="7.659cm" draw:start-shape="id1" draw:start-glue-point="1" draw:end-shape="id2" draw:end-glue-point="3" svg:d="m16249 7659h766">
          <text:p/>
        </draw:connector>
        <draw:connector draw:style-name="gr3" draw:text-style-name="P1" draw:layer="layout" svg:x1="18.415cm" svg:y1="7.659cm" svg:x2="19.15cm" svg:y2="7.659cm" draw:start-shape="id2" draw:start-glue-point="1" draw:end-shape="id3" draw:end-glue-point="3" svg:d="m18415 7659h735">
          <text:p/>
        </draw:connector>
        <draw:frame draw:style-name="gr4" draw:text-style-name="P3" draw:id="id4" draw:layer="layout" svg:width="3.418cm" svg:height="4.117cm" svg:x="16.279cm" svg:y="8.414cm">
          <draw:text-box>
            <text:p><text:span text:style-name="T2">class C1 {</text:span></text:p>
            <text:p><text:span text:style-name="T2"><text:s text:c="4"/>…</text:span></text:p>
            <text:p><text:span text:style-name="T2"><text:s text:c="4"/></text:span><text:span text:style-name="T2">C2 c2;</text:span></text:p>
            <text:p><text:span text:style-name="T2"><text:s text:c="4"/>…</text:span></text:p>
            <text:p><text:span text:style-name="T2"><text:s text:c="4"/></text:span><text:span text:style-name="T2">void c1_behavior(){</text:span></text:p>
            <text:p><text:span text:style-name="T2"><text:s text:c="8"/>…</text:span></text:p>
            <text:p><text:span text:style-name="T2"><text:s text:c="8"/></text:span><text:span text:style-name="T2">c2.operation0(...);</text:span></text:p>
            <text:p><text:span text:style-name="T2"><text:s text:c="8"/>…</text:span></text:p>
            <text:p><text:span text:style-name="T2"><text:s text:c="8"/></text:span><text:span text:style-name="T2">c2.operation1(...);</text:span></text:p>
            <text:p><text:span text:style-name="T2"><text:s text:c="8"/></text:span><text:span text:style-name="T2">...</text:span></text:p>
            <text:p><text:span text:style-name="T2"><text:s text:c="4"/></text:span><text:span text:style-name="T2">}</text:span></text:p>
            <text:p><text:span text:style-name="T2">};</text:span></text:p>
          </draw:text-box>
        </draw:frame>
        <draw:connector draw:style-name="gr5" draw:text-style-name="P4" draw:layer="layout" svg:x1="15.548cm" svg:y1="8.116cm" svg:x2="16.279cm" svg:y2="10.472cm" draw:start-shape="id1" draw:start-glue-point="2" draw:end-shape="id4" draw:end-glue-point="3" svg:d="m15548 8116v2356h7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3" draw:display-name="Arrowheads 3" svg:viewBox="0 0 1241 2356" svg:d="m617 180-500 1000 500 1001 501-1001zm-511-1180 634 1188-634 1168-607-1171z"/>
    <draw:marker draw:name="Arrowheads_20_4" draw:display-name="Arrowheads 4" svg:viewBox="0 0 1241 2356" svg:d="m617 180-500 1000 500 1001 501-1001zm-511-1180 634 1188-634 1168-607-117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11-30T21:21:19</dc:date>
    <meta:editing-duration>PT05H12M28S</meta:editing-duration>
    <meta:editing-cycles>63</meta:editing-cycles>
    <meta:generator>OpenOffice.org/3.1$Unix OpenOffice.org_project/310m19$Build-9420</meta:generator>
    <meta:print-date>2011-08-20T15:00:02</meta:print-date>
    <dc:creator>Tiago Mück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