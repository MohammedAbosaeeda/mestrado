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C8000000F1980C2F1A.png"/>
  <manifest:file-entry manifest:media-type="image/gif" manifest:full-path="Pictures/100002000000007E00000075DDD674B6.gif"/>
  <manifest:file-entry manifest:media-type="image/png" manifest:full-path="Pictures/100002000000011B0000012C64BB60F7.png"/>
  <manifest:file-entry manifest:media-type="image/png" manifest:full-path="Pictures/10000200000000E300000153D067E719.png"/>
  <manifest:file-entry manifest:media-type="image/gif" manifest:full-path="Pictures/100002000000007200000054A07C13F7.gif"/>
  <manifest:file-entry manifest:media-type="image/png" manifest:full-path="Pictures/10000200000001F40000022206B53EA3.png"/>
  <manifest:file-entry manifest:media-type="image/png" manifest:full-path="Pictures/100000000000006800000046AC2F70EE.png"/>
  <manifest:file-entry manifest:media-type="image/png" manifest:full-path="Pictures/10000200000000FA000000C0421A85E3.png"/>
  <manifest:file-entry manifest:media-type="image/png" manifest:full-path="Pictures/10000000000000400000004077CDC8F9.png"/>
  <manifest:file-entry manifest:media-type="image/png" manifest:full-path="Pictures/10000000000002B2000001F563A7B646.png"/>
  <manifest:file-entry manifest:media-type="image/png" manifest:full-path="Pictures/10000000000000C8000000965DB5BB37.png"/>
  <manifest:file-entry manifest:media-type="image/png" manifest:full-path="Pictures/1000000000000190000001902249DE85.png"/>
  <manifest:file-entry manifest:media-type="image/png" manifest:full-path="Pictures/10000200000001C6000000E3BF7684A4.png"/>
  <manifest:file-entry manifest:media-type="image/png" manifest:full-path="Pictures/10000200000004000000030067DB7AA9.png"/>
  <manifest:file-entry manifest:media-type="image/png" manifest:full-path="Pictures/1000020000000118000000C8EEE358B5.png"/>
  <manifest:file-entry manifest:media-type="image/png" manifest:full-path="Pictures/10000200000000DC000000B797209B67.png"/>
  <manifest:file-entry manifest:media-type="image/png" manifest:full-path="Pictures/100000000000039400000255EC76C13F.png"/>
  <manifest:file-entry manifest:media-type="image/png" manifest:full-path="Pictures/100002000000013D000000F9850D37A8.png"/>
  <manifest:file-entry manifest:media-type="image/png" manifest:full-path="Pictures/100002000000016E0000010EBCB03FF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none" draw:fill-color="#0000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marker-end="Arrowheads_20_15" draw:marker-end-width="0.3cm" draw:textarea-horizontal-align="center" draw:textarea-vertical-align="middle"/>
    </style:style>
    <style:style style:name="gr6" style:family="graphic" style:parent-style-name="standard">
      <style:graphic-properties draw:marker-end="Arrowheads_20_16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1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width="0.1cm" svg:stroke-color="#008000" draw:marker-start-width="0.35cm" draw:marker-end="Arrowheads_20_4" draw:marker-end-width="0.45cm" draw:fill="solid" draw:fill-color="#ff0000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-dash="Ultrafine_20_Dashed" svg:stroke-width="0.1cm" svg:stroke-color="#ff0000" draw:marker-start-width="0.35cm" draw:marker-end="Arrowheads_20_4" draw:marker-end-width="0.4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-dash="Ultrafine_20_Dashed" svg:stroke-width="0.1cm" svg:stroke-color="#00ae00" draw:marker-start-width="0.35cm" draw:marker-end="Arrowheads_20_4" draw:marker-end-width="0.45cm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 style:list-style-name="L5">
      <style:graphic-properties draw:stroke="none" draw:stroke-dash="Dash_20_2" svg:stroke-width="0.04cm" svg:stroke-color="#000000" draw:marker-start-width="0.3cm" draw:marker-start-center="false" draw:marker-end-width="0.3cm" draw:marker-end-center="false" draw:fill="none" draw:fill-color="#ae0000" draw:fill-gradient-name="Gradient_20_8" draw:fill-hatch-name="Hatch_20_1" draw:textarea-horizontal-align="center" draw:textarea-vertical-align="middle" draw:shadow="hidden" draw:shadow-offset-x="0.3cm" draw:shadow-offset-y="0.3cm" draw:shadow-color="#808080"/>
    </style:style>
    <style:style style:name="gr1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2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3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4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5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6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7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5" style:family="graphic" style:parent-style-name="standard" style:list-style-name="L5">
      <style:graphic-properties draw:stroke="solid" draw:stroke-dash="Dash_20_2" svg:stroke-width="0.3cm" svg:stroke-color="#808080" draw:marker-start-width="0.71cm" draw:marker-start-center="false" draw:marker-end="Arrowheads_20_9" draw:marker-end-width="0.65cm" draw:marker-end-center="false" draw:fill="solid" draw:fill-color="#00b8ff" draw:fill-gradient-name="Gradient_20_8" draw:fill-hatch-name="Hatch_20_1" draw:textarea-horizontal-align="center" draw:textarea-vertical-align="middle" fo:padding-top="0.15cm" fo:padding-bottom="0.15cm" fo:padding-left="0.15cm" fo:padding-right="0.15cm" draw:shadow="hidden" draw:shadow-offset-x="0.3cm" draw:shadow-offset-y="0.3cm" draw:shadow-color="#808080"/>
    </style:style>
    <style:style style:name="gr86" style:family="graphic" style:parent-style-name="standard" style:list-style-name="L5">
      <style:graphic-properties draw:stroke="none" draw:stroke-dash="Dash_20_2" svg:stroke-width="0.04cm" svg:stroke-color="#000000" draw:marker-start-width="0.3cm" draw:marker-start-center="false" draw:marker-end-width="0.3cm" draw:marker-end-center="false" draw:fill="none" draw:fill-color="#ae0000" draw:fill-gradient-name="Gradient_20_8" draw:fill-hatch-name="Hatch_20_1" draw:textarea-horizontal-align="center" draw:textarea-vertical-align="middle" draw:shadow="hidden" draw:shadow-offset-x="0.3cm" draw:shadow-offset-y="0.3cm" draw:shadow-color="#808080"/>
    </style:style>
    <style:style style:name="gr8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8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9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0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1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2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3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3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4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5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6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7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8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49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50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51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52" style:family="graphic" style:parent-style-name="standard" style:list-style-name="L5">
      <style:graphic-properties draw:stroke="solid" draw:stroke-dash="Dash_20_2" svg:stroke-width="0.04cm" svg:stroke-color="#000000" draw:marker-start-width="0.36cm" draw:marker-start-center="false" draw:marker-end-width="0.36cm" draw:marker-end-center="false" draw:fill="solid" draw:fill-color="#00b8ff" draw:fill-gradient-name="Gradient_20_8" draw:fill-hatch-name="Hatch_20_1" draw:textarea-horizontal-align="center" draw:textarea-vertical-align="middle" fo:padding-top="0.02cm" fo:padding-bottom="0.02cm" fo:padding-left="0.02cm" fo:padding-right="0.02cm" draw:shadow="hidden" draw:shadow-offset-x="0.3cm" draw:shadow-offset-y="0.3cm" draw:shadow-color="#808080"/>
    </style:style>
    <style:style style:name="gr153" style:family="graphic" style:parent-style-name="standard" style:list-style-name="L5">
      <style:graphic-properties draw:stroke="solid" draw:stroke-dash="Dash_20_2" svg:stroke-width="0.3cm" svg:stroke-color="#808080" draw:marker-start-width="0.71cm" draw:marker-start-center="false" draw:marker-end="Arrowheads_20_9" draw:marker-end-width="0.65cm" draw:marker-end-center="false" draw:fill="solid" draw:fill-color="#00b8ff" draw:fill-gradient-name="Gradient_20_8" draw:fill-hatch-name="Hatch_20_1" draw:textarea-horizontal-align="center" draw:textarea-vertical-align="middle" fo:padding-top="0.15cm" fo:padding-bottom="0.15cm" fo:padding-left="0.15cm" fo:padding-right="0.15cm" draw:shadow="hidden" draw:shadow-offset-x="0.3cm" draw:shadow-offset-y="0.3cm" draw:shadow-color="#808080"/>
    </style:style>
    <style:style style:name="gr15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svg:stroke-color="#ff3333" draw:marker-end="Arrowheads_20_18" draw:marker-end-width="0.3cm" draw:textarea-horizontal-align="center" draw:textarea-vertical-align="middle"/>
    </style:style>
    <style:style style:name="pr1" style:family="presentation" style:parent-style-name="lisha-title">
      <style:graphic-properties draw:fill-color="#ffffff" draw:auto-grow-height="true" fo:min-height="5.479cm"/>
    </style:style>
    <style:style style:name="pr2" style:family="presentation" style:parent-style-name="lisha-subtitle" style:list-style-name="L7">
      <style:graphic-properties draw:fill-color="#ffffff" draw:auto-grow-height="true" fo:min-height="11.45cm"/>
    </style:style>
    <style:style style:name="pr3" style:family="presentation" style:parent-style-name="lisha-notes">
      <style:graphic-properties draw:fill-color="#ffffff" draw:auto-grow-height="true" fo:min-height="9.96cm"/>
    </style:style>
    <style:style style:name="pr4" style:family="presentation" style:parent-style-name="lisha-title">
      <style:graphic-properties draw:fill-color="#ffffff" draw:auto-grow-height="true" fo:min-height="3.501cm"/>
    </style:style>
    <style:style style:name="pr5" style:family="presentation" style:parent-style-name="lisha-outline1">
      <style:graphic-properties draw:fill-color="#ffffff" fo:min-height="16.191cm"/>
    </style:style>
    <style:style style:name="pr6" style:family="presentation" style:parent-style-name="lisha-notes">
      <style:graphic-properties draw:fill-color="#ffffff" fo:min-height="10.588cm"/>
    </style:style>
    <style:style style:name="pr7" style:family="presentation" style:parent-style-name="lisha-outline1">
      <style:graphic-properties draw:fill-color="#ffffff" draw:auto-grow-height="true" fo:min-height="16.191cm"/>
    </style:style>
    <style:style style:name="pr8" style:family="presentation" style:parent-style-name="lisha-notes">
      <style:graphic-properties draw:fill-color="#ffffff" fo:min-height="9.369cm"/>
    </style:style>
    <style:style style:name="pr9" style:family="presentation" style:parent-style-name="lisha-outline1">
      <style:graphic-properties draw:fill-color="#ffffff" fo:min-height="15.001cm"/>
    </style:style>
    <style:style style:name="pr10" style:family="presentation" style:parent-style-name="lisha-outline1">
      <style:graphic-properties draw:fill-color="#ffffff" draw:auto-grow-height="true" fo:min-height="15.001cm"/>
    </style:style>
    <style:style style:name="pr11" style:family="presentation" style:parent-style-name="lisha-notes">
      <style:graphic-properties draw:fill-color="#ffffff" fo:min-height="9.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7cm" fo:margin-right="0cm" fo:margin-top="0.2cm" fo:margin-bottom="0.2cm" fo:text-align="start" text:enable-numbering="true" fo:text-indent="-0.9cm"/>
    </style:style>
    <style:style style:name="P7" style:family="paragraph">
      <style:paragraph-properties fo:margin-left="2.4cm" fo:margin-right="0cm" fo:margin-top="0.2cm" fo:margin-bottom="0.2cm" fo:text-align="start" text:enable-numbering="true" fo:text-indent="-0.8cm"/>
    </style:style>
    <style:style style:name="P8" style:family="paragraph">
      <style:paragraph-properties fo:margin-left="1.7cm" fo:margin-right="0cm" fo:text-indent="-0.9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size="16pt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0cm" fo:margin-right="0cm" fo:text-indent="0cm"/>
      <style:text-properties fo:font-size="21.2000007629395pt"/>
    </style:style>
    <style:style style:name="P16" style:family="paragraph">
      <style:paragraph-properties fo:margin-left="2.4cm" fo:margin-right="10.236cm" fo:text-indent="-0.8cm"/>
    </style:style>
    <style:style style:name="P17" style:family="paragraph">
      <style:text-properties fo:font-size="16pt" fo:font-weight="bold"/>
    </style:style>
    <style:style style:name="P18" style:family="paragraph">
      <style:text-properties fo:color="#ff0000" fo:font-size="20pt"/>
    </style:style>
    <style:style style:name="P19" style:family="paragraph">
      <style:paragraph-properties fo:margin-left="0cm" fo:margin-right="0cm" fo:text-indent="0cm"/>
      <style:text-properties fo:font-size="16pt" fo:font-weight="bold"/>
    </style:style>
    <style:style style:name="P20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/>
    </style:style>
    <style:style style:name="P21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P22" style:family="paragraph">
      <style:paragraph-properties fo:margin-left="1.7cm" fo:margin-right="0cm" text:enable-numbering="false" fo:text-indent="-0.9cm"/>
    </style:style>
    <style:style style:name="P23" style:family="paragraph">
      <style:paragraph-properties fo:margin-left="0cm" fo:margin-right="0cm" fo:text-indent="0cm"/>
      <style:text-properties fo:font-size="24pt"/>
    </style:style>
    <style:style style:name="P24" style:family="paragraph">
      <style:paragraph-properties fo:margin-left="3cm" fo:margin-right="0cm" fo:text-indent="-0.6cm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3cm" fo:margin-right="0cm" text:enable-numbering="false" fo:text-indent="-0.6cm"/>
    </style:style>
    <style:style style:name="P27" style:family="paragraph">
      <style:paragraph-properties fo:margin-left="3cm" fo:margin-right="0cm" text:enable-numbering="true" fo:text-indent="-0.6cm"/>
    </style:style>
    <style:style style:name="P28" style:family="paragraph">
      <style:paragraph-properties fo:margin-left="1.7cm" fo:margin-right="0cm" fo:margin-top="0.1cm" fo:margin-bottom="0.1cm" fo:text-align="start" text:enable-numbering="true" fo:text-indent="-0.9cm"/>
    </style:style>
    <style:style style:name="P29" style:family="paragraph">
      <style:paragraph-properties fo:margin-left="2.4cm" fo:margin-right="0cm" fo:margin-top="0.1cm" fo:margin-bottom="0.1cm" fo:text-align="start" text:enable-numbering="true" fo:text-indent="-0.8cm"/>
    </style:style>
    <style:style style:name="P30" style:family="paragraph">
      <style:paragraph-properties fo:margin-left="0cm" fo:margin-right="0cm" fo:text-indent="0cm"/>
      <style:text-properties fo:font-size="22.6000003814697pt"/>
    </style:style>
    <style:style style:name="T1" style:family="text">
      <style:text-properties fo:color="#004a4a" fo:font-family="'Bitstream Vera Sans'" style:font-style-name="Roman" style:font-family-generic="swiss" style:font-pitch="variable" fo:font-size="32pt" style:text-underline-style="none" fo:font-weight="normal" style:font-size-asian="24pt" style:font-size-complex="24pt"/>
    </style:style>
    <style:style style:name="T2" style:family="text">
      <style:text-properties fo:color="#004a4a" fo:font-family="'Bitstream Vera Sans'" style:font-style-name="Roman" style:font-family-generic="swiss" style:font-pitch="variable" fo:font-size="32pt" style:text-underline-style="solid" style:text-underline-width="auto" style:text-underline-color="font-color" fo:font-weight="normal" style:font-size-asian="24pt" style:font-size-complex="24pt"/>
    </style:style>
    <style:style style:name="T3" style:family="text">
      <style:text-properties fo:color="#004a4a" fo:font-family="'Bitstream Vera Sans Mono'" style:font-style-name="Roman" style:font-family-generic="swiss" style:font-pitch="fixed" fo:font-size="22pt" style:text-underline-style="none" fo:font-weight="normal" style:font-size-asian="24pt" style:font-size-complex="24pt"/>
    </style:style>
    <style:style style:name="T4" style:family="text">
      <style:text-properties fo:color="#004a4a" fo:font-family="'Bitstream Vera Sans Mono'" style:font-style-name="Roman" style:font-family-generic="swiss" style:font-pitch="fixed" fo:font-size="22pt" fo:font-weight="normal" style:font-size-asian="24pt" style:font-size-complex="24pt"/>
    </style:style>
    <style:style style:name="T5" style:family="text">
      <style:text-properties fo:color="#004a4a" fo:font-family="'Bitstream Vera Sans Mono'" style:font-style-name="Roman" style:font-family-generic="swiss" style:font-pitch="fixed" fo:font-size="32pt" fo:font-weight="normal" style:font-size-asian="24pt" style:font-size-complex="24pt"/>
    </style:style>
    <style:style style:name="T6" style:family="text">
      <style:text-properties fo:color="#004a4a" fo:font-family="'Bitstream Vera Sans'" style:font-style-name="Bold" style:font-family-generic="swiss" style:font-pitch="variable" fo:font-size="32pt" fo:font-weight="bold" style:font-size-asian="24pt" style:font-size-complex="24pt"/>
    </style:style>
    <style:style style:name="T7" style:family="text">
      <style:text-properties fo:color="#004a4a" fo:font-family="'Nimbus Sans L'" style:font-pitch="variable" fo:font-size="24pt" fo:font-weight="normal" style:font-size-asian="24pt"/>
    </style:style>
    <style:style style:name="T8" style:family="text">
      <style:text-properties fo:color="#004a4a" fo:font-family="'Bitstream Vera Sans'" style:font-family-generic="swiss" style:font-pitch="variable" fo:font-size="24pt" fo:font-weight="normal" style:font-size-asian="24pt"/>
    </style:style>
    <style:style style:name="T9" style:family="text">
      <style:text-properties fo:color="#000000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/>
    </style:style>
    <style:style style:name="T10" style:family="text">
      <style:text-properties fo:color="#000000" style:text-outline="false" style:text-line-through-style="none" fo:font-family="'Bitstream Vera Sans'" style:font-family-generic="swiss" style:font-pitch="variable" fo:font-size="28pt" fo:font-style="normal" fo:text-shadow="none" style:text-underline-style="none" fo:font-weight="normal"/>
    </style:style>
    <style:style style:name="T11" style:family="text">
      <style:text-properties fo:font-size="18pt"/>
    </style:style>
    <style:style style:name="T12" style:family="text">
      <style:text-properties fo:font-size="16pt"/>
    </style:style>
    <style:style style:name="T13" style:family="text">
      <style:text-properties fo:font-size="20pt"/>
    </style:style>
    <style:style style:name="T14" style:family="text">
      <style:text-properties fo:color="#ff0000" fo:font-size="16pt" fo:font-weight="bold"/>
    </style:style>
    <style:style style:name="T15" style:family="text">
      <style:text-properties fo:font-size="16pt" fo:font-weight="bold"/>
    </style:style>
    <style:style style:name="T16" style:family="text">
      <style:text-properties fo:color="#0000ff"/>
    </style:style>
    <style:style style:name="T17" style:family="text">
      <style:text-properties fo:color="#ff0000" fo:font-size="2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le" draw:style-name="dp1" draw:master-page-name="lisha" presentation:presentation-page-layout-name="AL1T0"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1">Configurable Medium Access Control<text:line-break/>for Wireless Sensor Networks</text:p>
          </draw:text-box>
        </draw:frame>
        <draw:frame presentation:style-name="pr2" draw:text-style-name="P4" draw:layer="layout" svg:width="26cm" svg:height="11.45cm" svg:x="1cm" svg:y="8.8cm">
          <draw:text-box>
            <text:list text:style-name="L2">
              <text:list-item>
                <text:list>
                  <text:list-item>
                    <text:p text:style-name="P3"><text:span text:style-name="T1">Lucas F. Wanner, Augusto B. de Oliveira, </text:span><text:span text:style-name="T2">Antônio Augusto Fröhli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http://www.lisha.ufsc.br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6">IESS 200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June 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2" draw:style-name="dp1" draw:master-page-name="lisha" presentation:presentation-page-layout-name="AL2T1">
        <draw:frame presentation:style-name="pr4" draw:text-style-name="P5" draw:layer="layout" svg:width="24.401cm" svg:height="3.501cm" svg:x="0.999cm" svg:y="0.4cm" presentation:class="title">
          <draw:text-box>
            <text:p text:style-name="P5">Outline</text:p>
          </draw:text-box>
        </draw:frame>
        <draw:frame presentation:style-name="pr5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6"><text:span text:style-name="T9">Overview of WSN</text:span></text:p>
              </text:list-item>
            </text:list>
            <text:list text:style-name="L4">
              <text:list-item>
                <text:p text:style-name="P6"><text:span text:style-name="T9">MACs for WSN</text:span></text:p>
              </text:list-item>
            </text:list>
            <text:list text:style-name="L4">
              <text:list-item>
                <text:p text:style-name="P6"><text:span text:style-name="T9">Communication on WSN</text:span></text:p>
              </text:list-item>
            </text:list>
            <text:list text:style-name="L4">
              <text:list-item>
                <text:p text:style-name="P6"><text:span text:style-name="T9">C-MAC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Propos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Imple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Evalu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Conclusion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5cm" svg:y="2.79cm" draw:page-number="2" presentation:class="page"/>
          <draw:frame presentation:style-name="pr6" draw:text-style-name="P5" draw:layer="layout" svg:width="15.02cm" svg:height="10.588cm" svg:x="3.291cm" svg:y="13.254cm" presentation:class="notes" presentation:placeholder="true">
            <draw:text-box/>
          </draw:frame>
        </presentation:notes>
      </draw:page>
      <draw:page draw:name="page3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Communication on WSN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8">There is no “single best” MAC protocol</text:p>
              </text:list-item>
            </text:list>
            <text:list text:style-name="L4">
              <text:list-item>
                <text:list>
                  <text:list-item>
                    <text:p text:style-name="P10">Aloha, B-MAC, S-MAC, T-MAC, WiseMAC, LMAC, ...</text:p>
                  </text:list-item>
                </text:list>
              </text:list-item>
            </text:list>
            <text:list text:style-name="L4">
              <text:list-item>
                <text:p text:style-name="P8">Configurable communication</text:p>
              </text:list-item>
            </text:list>
            <text:list text:style-name="L4">
              <text:list-item>
                <text:list>
                  <text:list-item>
                    <text:p text:style-name="P10">Different communication patterns for different applic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nergy efficiency is the main concern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.953cm" svg:height="2.18cm" svg:x="7cm" svg:y="16.32cm">
          <draw:image xlink:href="Pictures/100002000000007200000054A07C13F7.gif" xlink:type="simple" xlink:show="embed" xlink:actuate="onLoad">
            <text:p text:style-name="P5"/>
          </draw:image>
        </draw:frame>
        <draw:frame draw:style-name="gr2" draw:text-style-name="P11" draw:layer="layout" svg:width="3.682cm" svg:height="5.5cm" svg:x="2.818cm" svg:y="13.5cm">
          <draw:image xlink:href="Pictures/10000200000000E300000153D067E719.png" xlink:type="simple" xlink:show="embed" xlink:actuate="onLoad">
            <text:p text:style-name="P5"/>
          </draw:image>
        </draw:frame>
        <draw:custom-shape draw:style-name="gr3" draw:text-style-name="P12" draw:layer="layout" svg:width="5cm" svg:height="2cm" svg:x="8.5cm" svg:y="13cm">
          <text:p text:style-name="P1"><text:span text:style-name="T11">Fire!!!</text:span></text:p>
          <draw:enhanced-geometry svg:viewBox="0 0 21600 21600" draw:text-areas="800 800 20800 20800" draw:type="round-rectangular-callout" draw:modifiers="1408.03839232154 34726.2368815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1" draw:layer="layout" svg:width="2.953cm" svg:height="2.18cm" svg:x="19cm" svg:y="16.32cm">
          <draw:image xlink:href="Pictures/100002000000007200000054A07C13F7.gif" xlink:type="simple" xlink:show="embed" xlink:actuate="onLoad">
            <text:p text:style-name="P5"/>
          </draw:image>
        </draw:frame>
        <draw:frame draw:style-name="gr2" draw:text-style-name="P11" draw:layer="layout" svg:width="4.392cm" svg:height="4.796cm" svg:x="22.108cm" svg:y="13.704cm">
          <draw:image xlink:href="Pictures/10000200000001F40000022206B53EA3.png" xlink:type="simple" xlink:show="embed" xlink:actuate="onLoad">
            <text:p text:style-name="P5"/>
          </draw:image>
        </draw:frame>
        <draw:custom-shape draw:style-name="gr4" draw:text-style-name="P12" draw:layer="layout" svg:width="5cm" svg:height="2cm" svg:x="14.5cm" svg:y="13cm">
          <text:p text:style-name="P1"><text:span text:style-name="T11">Duck.</text:span></text:p>
          <draw:enhanced-geometry svg:viewBox="0 0 21600 21600" draw:mirror-horizontal="true" draw:text-areas="800 800 20800 20800" draw:type="round-rectangular-callout" draw:modifiers="1408.03839232154 34726.2368815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08cm" svg:height="8.971cm" svg:x="4.563cm" svg:y="2.625cm" draw:page-number="3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4" draw:style-name="dp1" draw:master-page-name="lisha" presentation:presentation-page-layout-name="AL3T19">
        <draw:frame presentation:style-name="pr4" draw:text-style-name="P9" draw:layer="layout" svg:width="24.401cm" svg:height="3.501cm" svg:x="0.999cm" svg:y="0.4cm" presentation:class="title">
          <draw:text-box>
            <text:p text:style-name="P9">Wireless Communication HW</text:p>
          </draw:text-box>
        </draw:frame>
        <draw:line draw:style-name="gr5" draw:text-style-name="P11" draw:layer="layout" svg:x1="6.35cm" svg:y1="18.415cm" svg:x2="6.35cm" svg:y2="3.81cm">
          <text:p text:style-name="P5"/>
        </draw:line>
        <draw:line draw:style-name="gr6" draw:text-style-name="P11" draw:layer="layout" svg:x1="6.35cm" svg:y1="18.415cm" svg:x2="24.765cm" svg:y2="18.415cm">
          <text:p text:style-name="P5"/>
        </draw:line>
        <draw:frame draw:style-name="gr7" draw:text-style-name="P13" draw:layer="layout" svg:width="2.538cm" svg:height="0.839cm" svg:x="14.605cm" svg:y="19.05cm">
          <draw:text-box>
            <text:p text:style-name="P5"><text:span text:style-name="T12">Data Rate</text:span></text:p>
          </draw:text-box>
        </draw:frame>
        <draw:frame draw:style-name="gr7" draw:text-style-name="P13" draw:layer="layout" svg:width="5.078cm" svg:height="0.839cm" draw:transform="rotate (1.5707963267946) translate (1.27cm 13.329cm)">
          <draw:text-box>
            <text:p text:style-name="P5"><text:span text:style-name="T12">Power Consumption</text:span></text:p>
          </draw:text-box>
        </draw:frame>
        <draw:frame draw:style-name="gr2" draw:text-style-name="P11" draw:layer="layout" svg:width="3.748cm" svg:height="2.765cm" svg:x="2.54cm" svg:y="6.985cm">
          <draw:image xlink:href="Pictures/100002000000016E0000010EBCB03FF5.png" xlink:type="simple" xlink:show="embed" xlink:actuate="onLoad">
            <text:p text:style-name="P5"/>
          </draw:image>
        </draw:frame>
        <draw:frame draw:style-name="gr2" draw:text-style-name="P11" draw:layer="layout" svg:width="2.982cm" svg:height="3.162cm" svg:x="3.175cm" svg:y="9.538cm">
          <draw:image xlink:href="Pictures/100002000000011B0000012C64BB60F7.png" xlink:type="simple" xlink:show="embed" xlink:actuate="onLoad">
            <text:p text:style-name="P5"/>
          </draw:image>
        </draw:frame>
        <draw:frame draw:style-name="gr2" draw:text-style-name="P11" draw:layer="layout" svg:width="3.175cm" svg:height="2.381cm" svg:x="3.175cm" svg:y="16.034cm">
          <draw:image xlink:href="Pictures/10000000000000C8000000965DB5BB37.png" xlink:type="simple" xlink:show="embed" xlink:actuate="onLoad">
            <text:p text:style-name="P5"/>
          </draw:image>
        </draw:frame>
        <draw:frame draw:style-name="gr2" draw:text-style-name="P11" draw:layer="layout" svg:width="3.495cm" svg:height="3.175cm" svg:x="2.855cm" svg:y="12.7cm">
          <draw:image xlink:href="Pictures/100002000000013D000000F9850D37A8.png" xlink:type="simple" xlink:show="embed" xlink:actuate="onLoad">
            <text:p text:style-name="P5"/>
          </draw:image>
        </draw:frame>
        <draw:frame draw:style-name="gr2" draw:text-style-name="P11" draw:layer="layout" svg:width="3.81cm" svg:height="2.858cm" svg:x="2.54cm" svg:y="3.492cm">
          <draw:image xlink:href="Pictures/10000200000004000000030067DB7AA9.png" xlink:type="simple" xlink:show="embed" xlink:actuate="onLoad">
            <text:p text:style-name="P5"/>
          </draw:image>
        </draw:frame>
        <draw:frame draw:style-name="gr8" draw:text-style-name="P11" draw:layer="layout" svg:width="4.709cm" svg:height="3.616cm" svg:x="16.246cm" svg:y="4.445cm">
          <draw:image xlink:href="Pictures/10000200000000FA000000C0421A85E3.png" xlink:type="simple" xlink:show="embed" xlink:actuate="onLoad">
            <text:p text:style-name="P5"/>
          </draw:image>
        </draw:frame>
        <draw:frame draw:style-name="gr8" draw:text-style-name="P11" draw:layer="layout" svg:width="3.162cm" svg:height="3.81cm" svg:x="12.7cm" svg:y="6.35cm">
          <draw:image xlink:href="Pictures/10000200000000C8000000F1980C2F1A.png" xlink:type="simple" xlink:show="embed" xlink:actuate="onLoad">
            <text:p text:style-name="P5"/>
          </draw:image>
        </draw:frame>
        <draw:frame draw:style-name="gr2" draw:text-style-name="P11" draw:layer="layout" svg:width="5.12cm" svg:height="2.56cm" svg:x="8.85cm" svg:y="10.795cm">
          <draw:image xlink:href="Pictures/10000200000001C6000000E3BF7684A4.png" xlink:type="simple" xlink:show="embed" xlink:actuate="onLoad">
            <text:p text:style-name="P5"/>
          </draw:image>
        </draw:frame>
        <draw:frame draw:style-name="gr2" draw:text-style-name="P11" draw:layer="layout" svg:width="3.333cm" svg:height="3.095cm" svg:x="22.067cm" svg:y="3.255cm">
          <draw:image xlink:href="Pictures/100002000000007E00000075DDD674B6.gif" xlink:type="simple" xlink:show="embed" xlink:actuate="onLoad">
            <text:p text:style-name="P5"/>
          </draw:image>
        </draw:frame>
        <draw:frame draw:style-name="gr2" draw:text-style-name="P11" draw:layer="layout" svg:width="4.014cm" svg:height="3.339cm" svg:x="7.416cm" svg:y="13.335cm">
          <draw:image xlink:href="Pictures/10000200000000DC000000B797209B67.png" xlink:type="simple" xlink:show="embed" xlink:actuate="onLoad">
            <text:p text:style-name="P5"/>
          </draw:image>
        </draw:frame>
        <draw:rect draw:style-name="gr9" draw:text-style-name="P11" draw:id="id3" draw:layer="layout" svg:width="5.715cm" svg:height="5.715cm" svg:x="15.875cm" svg:y="3.81cm">
          <text:p text:style-name="P5"/>
        </draw:rect>
        <draw:rect draw:style-name="gr9" draw:text-style-name="P11" draw:id="id1" draw:layer="layout" svg:width="4.445cm" svg:height="4.445cm" svg:x="21.59cm" svg:y="3.175cm">
          <text:p text:style-name="P5"/>
        </draw:rect>
        <draw:rect draw:style-name="gr9" draw:text-style-name="P11" draw:id="id5" draw:layer="layout" svg:width="9.525cm" svg:height="12.065cm" svg:x="6.35cm" svg:y="6.35cm">
          <text:p text:style-name="P5"/>
        </draw:rect>
        <draw:frame draw:style-name="gr7" draw:text-style-name="P14" draw:id="id2" draw:layer="layout" svg:width="1.573cm" svg:height="1.051cm" svg:x="24.13cm" svg:y="6.35cm">
          <draw:text-box>
            <text:p text:style-name="P5"><text:span text:style-name="T13">MAN</text:span></text:p>
          </draw:text-box>
        </draw:frame>
        <draw:frame draw:style-name="gr7" draw:text-style-name="P14" draw:id="id4" draw:layer="layout" svg:width="1.378cm" svg:height="1.051cm" svg:x="19.685cm" svg:y="8.255cm">
          <draw:text-box draw:corner-radius="2.208cm">
            <text:p text:style-name="P5"><text:span text:style-name="T13">LAN</text:span></text:p>
          </draw:text-box>
        </draw:frame>
        <draw:frame draw:style-name="gr7" draw:text-style-name="P14" draw:id="id6" draw:layer="layout" svg:width="1.454cm" svg:height="1.051cm" svg:x="13.335cm" svg:y="16.352cm">
          <draw:text-box>
            <text:p text:style-name="P5"><text:span text:style-name="T13">PAN</text:span></text:p>
          </draw:text-box>
        </draw:frame>
        <draw:frame draw:style-name="gr10" draw:text-style-name="P11" draw:layer="layout" svg:width="2.666cm" svg:height="1.905cm" svg:x="6.35cm" svg:y="16.51cm">
          <draw:image xlink:href="Pictures/1000020000000118000000C8EEE358B5.png" xlink:type="simple" xlink:show="embed" xlink:actuate="onLoad">
            <text:p text:style-name="P5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08cm" svg:height="8.971cm" svg:x="4.563cm" svg:y="2.625cm" draw:page-number="4" presentation:class="page"/>
          <draw:frame presentation:style-name="pr8" draw:text-style-name="P15" draw:layer="layout" svg:width="15.892cm" svg:height="9.369cm" svg:x="3.482cm" svg:y="11.72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Wireless Sensor Networks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8">Low-power hardware</text:p>
              </text:list-item>
            </text:list>
            <text:list text:style-name="L4">
              <text:list-item>
                <text:p text:style-name="P8">Limited resources</text:p>
              </text:list-item>
            </text:list>
            <text:list text:style-name="L4">
              <text:list-item>
                <text:p text:style-name="P8">Software-defined MAC</text:p>
              </text:list-item>
            </text:list>
            <text:list text:style-name="L6">
              <text:list-item>
                <text:list>
                  <text:list-item>
                    <text:p text:style-name="P16">Control access to the shared medium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Avoid interferences between transmiss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Define packet forma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Perform local/global synchronization</text:p>
                  </text:list-item>
                </text:list>
              </text:list-item>
            </text:list>
          </draw:text-box>
        </draw:frame>
        <draw:g>
          <draw:g>
            <draw:circle draw:style-name="gr11" draw:layer="layout" svg:width="2cm" svg:height="2cm" svg:x="20.7cm" svg:y="12.9cm">
              <text:p text:style-name="P5"/>
            </draw:circle>
            <draw:circle draw:style-name="gr11" draw:layer="layout" svg:width="3cm" svg:height="3cm" svg:x="20.2cm" svg:y="12.4cm">
              <text:p text:style-name="P5"/>
            </draw:circle>
            <draw:circle draw:style-name="gr11" draw:layer="layout" svg:width="4cm" svg:height="4cm" svg:x="19.7cm" svg:y="11.9cm">
              <text:p text:style-name="P5"/>
            </draw:circle>
            <draw:circle draw:style-name="gr11" draw:layer="layout" svg:width="5cm" svg:height="5cm" svg:x="19.2cm" svg:y="11.4cm">
              <text:p text:style-name="P5"/>
            </draw:circle>
            <draw:circle draw:style-name="gr11" draw:layer="layout" svg:width="6cm" svg:height="6cm" svg:x="18.7cm" svg:y="10.9cm">
              <text:p text:style-name="P5"/>
            </draw:circle>
            <draw:circle draw:style-name="gr11" draw:layer="layout" svg:width="7cm" svg:height="7cm" svg:x="18.2cm" svg:y="10.4cm">
              <text:p text:style-name="P5"/>
            </draw:circle>
            <draw:circle draw:style-name="gr11" draw:layer="layout" svg:width="8cm" svg:height="8cm" svg:x="17.7cm" svg:y="9.9cm">
              <text:p text:style-name="P5"/>
            </draw:circle>
            <draw:circle draw:style-name="gr11" draw:layer="layout" svg:width="9cm" svg:height="9cm" svg:x="17.2cm" svg:y="9.4cm">
              <text:p text:style-name="P5"/>
            </draw:circle>
          </draw:g>
          <draw:circle draw:style-name="gr12" draw:layer="layout" svg:width="1cm" svg:height="1cm" svg:x="23.7cm" svg:y="16.4cm">
            <text:p text:style-name="P5"/>
          </draw:circle>
          <draw:circle draw:style-name="gr12" draw:layer="layout" svg:width="1cm" svg:height="1cm" svg:x="19.2cm" svg:y="16.4cm">
            <text:p text:style-name="P5"/>
          </draw:circle>
          <draw:circle draw:style-name="gr12" draw:layer="layout" svg:width="1cm" svg:height="1cm" svg:x="21.2cm" svg:y="13.4cm">
            <text:p text:style-name="P5"/>
          </draw:circle>
          <draw:line draw:style-name="gr13" draw:layer="layout" svg:x1="22.2cm" svg:y1="14.4cm" svg:x2="23.7cm" svg:y2="16.4cm">
            <text:p text:style-name="P5"/>
          </draw:line>
          <draw:line draw:style-name="gr14" draw:text-style-name="P17" draw:layer="layout" svg:x1="20.7cm" svg:y1="16.9cm" svg:x2="23.201cm" svg:y2="16.9cm">
            <text:p text:style-name="P5"><text:span text:style-name="T14">X</text:span><text:span text:style-name="T15"> <text:s/></text:span></text:p>
          </draw:line>
          <draw:circle draw:style-name="gr12" draw:layer="layout" svg:width="1cm" svg:height="1cm" svg:x="22.7cm" svg:y="10.4cm">
            <text:p text:style-name="P5"/>
          </draw:circle>
        </draw:g>
        <presentation:notes draw:style-name="dp2">
          <draw:page-thumbnail draw:style-name="gr1" draw:layer="layout" svg:width="13.08cm" svg:height="8.971cm" svg:x="4.563cm" svg:y="2.625cm" draw:page-number="5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6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MACs for WSN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8">Nodes powered by <text:span text:style-name="T16">batteries</text:span></text:p>
              </text:list-item>
            </text:list>
            <text:list text:style-name="L4">
              <text:list-item>
                <text:list>
                  <text:list-item>
                    <text:p text:style-name="P10">Turn off the radio whenever possible!</text:p>
                  </text:list-item>
                </text:list>
              </text:list-item>
            </text:list>
            <text:list text:style-name="L4">
              <text:list-item>
                <text:p text:style-name="P8">Main sources of power overhead</text:p>
              </text:list-item>
            </text:list>
            <text:list text:style-name="L4">
              <text:list-item>
                <text:list>
                  <text:list-item>
                    <text:p text:style-name="P10">Idle listening (nodes must listen for potential messag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llisions</text:p>
                  </text:list-item>
                </text:list>
              </text:list-item>
            </text:list>
          </draw:text-box>
        </draw:frame>
        <draw:g>
          <draw:g>
            <draw:circle draw:style-name="gr11" draw:layer="layout" svg:width="1.473cm" svg:height="1.473cm" svg:x="7.776cm" svg:y="15.276cm">
              <text:p text:style-name="P5"/>
            </draw:circle>
            <draw:circle draw:style-name="gr11" draw:layer="layout" svg:width="2.207cm" svg:height="2.207cm" svg:x="7.409cm" svg:y="14.909cm">
              <text:p text:style-name="P5"/>
            </draw:circle>
            <draw:circle draw:style-name="gr11" draw:layer="layout" svg:width="2.945cm" svg:height="2.945cm" svg:x="7.04cm" svg:y="14.54cm">
              <text:p text:style-name="P5"/>
            </draw:circle>
            <draw:circle draw:style-name="gr11" draw:layer="layout" svg:width="3.681cm" svg:height="3.681cm" svg:x="6.672cm" svg:y="14.172cm">
              <text:p text:style-name="P5"/>
            </draw:circle>
            <draw:circle draw:style-name="gr11" draw:layer="layout" svg:width="4.417cm" svg:height="4.417cm" svg:x="6.304cm" svg:y="13.804cm">
              <text:p text:style-name="P5"/>
            </draw:circle>
            <draw:circle draw:style-name="gr11" draw:layer="layout" svg:width="5.151cm" svg:height="5.151cm" svg:x="5.937cm" svg:y="13.437cm">
              <text:p text:style-name="P5"/>
            </draw:circle>
            <draw:circle draw:style-name="gr11" draw:layer="layout" svg:width="5.889cm" svg:height="5.889cm" svg:x="5.568cm" svg:y="13.068cm">
              <text:p text:style-name="P5"/>
            </draw:circle>
            <draw:circle draw:style-name="gr11" draw:layer="layout" svg:width="6.625cm" svg:height="6.625cm" svg:x="5.2cm" svg:y="12.7cm">
              <text:p text:style-name="P5"/>
            </draw:circle>
          </draw:g>
          <draw:ellipse draw:style-name="gr12" draw:layer="layout" svg:width="0.736cm" svg:height="0.735cm" svg:x="9.985cm" svg:y="17.853cm">
            <text:p text:style-name="P5"/>
          </draw:ellipse>
          <draw:ellipse draw:style-name="gr12" draw:layer="layout" svg:width="0.737cm" svg:height="0.735cm" svg:x="6.672cm" svg:y="17.853cm">
            <text:p text:style-name="P5"/>
          </draw:ellipse>
          <draw:circle draw:style-name="gr12" draw:layer="layout" svg:width="0.737cm" svg:height="0.737cm" svg:x="8.144cm" svg:y="15.644cm">
            <text:p text:style-name="P5"/>
          </draw:circle>
          <draw:ellipse draw:style-name="gr12" draw:layer="layout" svg:width="0.736cm" svg:height="0.735cm" svg:x="9.249cm" svg:y="13.437cm">
            <text:p text:style-name="P5"/>
          </draw:ellipse>
          <draw:frame draw:style-name="gr2" draw:text-style-name="P11" draw:layer="layout" svg:width="3.375cm" svg:height="3.375cm" svg:x="11.2cm" svg:y="11.825cm">
            <draw:image xlink:href="Pictures/1000000000000190000001902249DE85.png" xlink:type="simple" xlink:show="embed" xlink:actuate="onLoad">
              <text:p text:style-name="P5"/>
            </draw:image>
          </draw:frame>
          <draw:g>
            <draw:circle draw:style-name="gr11" draw:layer="layout" svg:width="1.443cm" svg:height="1.443cm" svg:x="18.729cm" svg:y="15.229cm">
              <text:p text:style-name="P5"/>
            </draw:circle>
            <draw:circle draw:style-name="gr11" draw:layer="layout" svg:width="2.168cm" svg:height="2.168cm" svg:x="18.366cm" svg:y="14.866cm">
              <text:p text:style-name="P5"/>
            </draw:circle>
            <draw:circle draw:style-name="gr11" draw:layer="layout" svg:width="2.888cm" svg:height="2.888cm" svg:x="18.006cm" svg:y="14.506cm">
              <text:p text:style-name="P5"/>
            </draw:circle>
            <draw:circle draw:style-name="gr11" draw:layer="layout" svg:width="3.612cm" svg:height="3.612cm" svg:x="17.644cm" svg:y="14.144cm">
              <text:p text:style-name="P5"/>
            </draw:circle>
            <draw:circle draw:style-name="gr11" draw:layer="layout" svg:width="4.332cm" svg:height="4.332cm" svg:x="17.284cm" svg:y="13.784cm">
              <text:p text:style-name="P5"/>
            </draw:circle>
            <draw:circle draw:style-name="gr11" draw:layer="layout" svg:width="5.057cm" svg:height="5.057cm" svg:x="16.922cm" svg:y="13.422cm">
              <text:p text:style-name="P5"/>
            </draw:circle>
            <draw:circle draw:style-name="gr11" draw:layer="layout" svg:width="5.778cm" svg:height="5.778cm" svg:x="16.561cm" svg:y="13.061cm">
              <text:p text:style-name="P5"/>
            </draw:circle>
            <draw:circle draw:style-name="gr11" draw:layer="layout" svg:width="6.5cm" svg:height="6.5cm" svg:x="16.2cm" svg:y="12.7cm">
              <text:p text:style-name="P5"/>
            </draw:circle>
          </draw:g>
          <draw:circle draw:style-name="gr12" draw:layer="layout" svg:width="0.722cm" svg:height="0.723cm" svg:x="20.894cm" svg:y="17.756cm">
            <text:p text:style-name="P5"/>
          </draw:circle>
          <draw:circle draw:style-name="gr12" draw:layer="layout" svg:width="0.722cm" svg:height="0.723cm" svg:x="17.644cm" svg:y="17.756cm">
            <text:p text:style-name="P5"/>
          </draw:circle>
          <draw:circle draw:style-name="gr12" draw:layer="layout" svg:width="0.722cm" svg:height="0.722cm" svg:x="19.089cm" svg:y="15.589cm">
            <text:p text:style-name="P5"/>
          </draw:circle>
          <draw:line draw:style-name="gr14" draw:text-style-name="P17" draw:layer="layout" svg:x1="18.729cm" svg:y1="18.116cm" svg:x2="20.534cm" svg:y2="18.116cm">
            <text:p text:style-name="P5"><text:span text:style-name="T14">X</text:span><text:span text:style-name="T15"> <text:s/></text:span></text:p>
          </draw:line>
          <draw:circle draw:style-name="gr12" draw:layer="layout" svg:width="0.722cm" svg:height="0.722cm" svg:x="20.172cm" svg:y="13.422cm">
            <text:p text:style-name="P5"/>
          </draw:circle>
          <draw:line draw:style-name="gr14" draw:text-style-name="P17" draw:layer="layout" svg:x1="19.746cm" svg:y1="16.456cm" svg:x2="21.046cm" svg:y2="17.756cm">
            <text:p text:style-name="P5"><text:span text:style-name="T14">X</text:span><text:span text:style-name="T15"> <text:s/></text:span></text:p>
          </draw:line>
        </draw:g>
        <presentation:notes draw:style-name="dp2">
          <draw:page-thumbnail draw:style-name="gr1" draw:layer="layout" svg:width="13.08cm" svg:height="8.971cm" svg:x="4.563cm" svg:y="2.625cm" draw:page-number="6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7" draw:style-name="dp1" draw:master-page-name="lisha" presentation:presentation-page-layout-name="AL2T1">
        <draw:rect draw:style-name="gr15" draw:layer="layout" svg:width="2.247cm" svg:height="5cm" svg:x="22.753cm" svg:y="13cm">
          <text:p text:style-name="P5"/>
        </draw:rect>
        <draw:frame presentation:style-name="pr4" draw:text-style-name="P9" draw:layer="layout" svg:width="24.401cm" svg:height="3.501cm" svg:x="0.999cm" svg:y="0.4cm" presentation:class="title">
          <draw:text-box>
            <text:p text:style-name="P9">MACs for WSN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8">Main sources of power overhead (cont.)</text:p>
              </text:list-item>
            </text:list>
            <text:list text:style-name="L4">
              <text:list-item>
                <text:list>
                  <text:list-item>
                    <text:p text:style-name="P10">Overhearing (the radio channel is a shared mediu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Traffic fluctuations (higher competition for the mediu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rotocol overhead</text:p>
                  </text:list-item>
                </text:list>
              </text:list-item>
            </text:list>
          </draw:text-box>
        </draw:frame>
        <draw:g>
          <draw:circle draw:style-name="gr11" draw:layer="layout" svg:width="1.443cm" svg:height="1.443cm" svg:x="5.029cm" svg:y="14.529cm">
            <text:p text:style-name="P5"/>
          </draw:circle>
          <draw:circle draw:style-name="gr11" draw:layer="layout" svg:width="2.168cm" svg:height="2.168cm" svg:x="4.666cm" svg:y="14.166cm">
            <text:p text:style-name="P5"/>
          </draw:circle>
          <draw:circle draw:style-name="gr11" draw:layer="layout" svg:width="2.888cm" svg:height="2.888cm" svg:x="4.306cm" svg:y="13.806cm">
            <text:p text:style-name="P5"/>
          </draw:circle>
          <draw:circle draw:style-name="gr11" draw:layer="layout" svg:width="3.612cm" svg:height="3.612cm" svg:x="3.944cm" svg:y="13.444cm">
            <text:p text:style-name="P5"/>
          </draw:circle>
          <draw:circle draw:style-name="gr11" draw:layer="layout" svg:width="4.332cm" svg:height="4.332cm" svg:x="3.584cm" svg:y="13.084cm">
            <text:p text:style-name="P5"/>
          </draw:circle>
          <draw:circle draw:style-name="gr11" draw:layer="layout" svg:width="5.057cm" svg:height="5.057cm" svg:x="3.222cm" svg:y="12.722cm">
            <text:p text:style-name="P5"/>
          </draw:circle>
          <draw:circle draw:style-name="gr11" draw:layer="layout" svg:width="5.778cm" svg:height="5.778cm" svg:x="2.861cm" svg:y="12.361cm">
            <text:p text:style-name="P5"/>
          </draw:circle>
          <draw:circle draw:style-name="gr11" draw:layer="layout" svg:width="6.5cm" svg:height="6.5cm" svg:x="2.5cm" svg:y="12cm">
            <text:p text:style-name="P5"/>
          </draw:circle>
        </draw:g>
        <draw:circle draw:style-name="gr16" draw:text-style-name="P18" draw:layer="layout" svg:width="0.722cm" svg:height="0.723cm" svg:x="7.194cm" svg:y="17.056cm">
          <text:p text:style-name="P5"><text:span text:style-name="T17">X</text:span></text:p>
        </draw:circle>
        <draw:circle draw:style-name="gr12" draw:layer="layout" svg:width="0.722cm" svg:height="0.723cm" svg:x="3.944cm" svg:y="17.056cm">
          <text:p text:style-name="P5"/>
        </draw:circle>
        <draw:circle draw:style-name="gr12" draw:layer="layout" svg:width="0.722cm" svg:height="0.722cm" svg:x="5.389cm" svg:y="14.889cm">
          <text:p text:style-name="P5"/>
        </draw:circle>
        <draw:line draw:style-name="gr17" draw:text-style-name="P19" draw:layer="layout" svg:x1="5.429cm" svg:y1="15.78cm" svg:x2="4.544cm" svg:y2="17.056cm">
          <text:p text:style-name="P5"><text:span text:style-name="T15"><text:s text:c="2"/></text:span></text:p>
        </draw:line>
        <draw:circle draw:style-name="gr12" draw:layer="layout" svg:width="0.722cm" svg:height="0.722cm" svg:x="6.472cm" svg:y="12.722cm">
          <text:p text:style-name="P5"/>
        </draw:circle>
        <draw:line draw:style-name="gr17" draw:text-style-name="P19" draw:layer="layout" svg:x1="6.046cm" svg:y1="15.756cm" svg:x2="7.346cm" svg:y2="17.056cm">
          <text:p text:style-name="P5"><text:span text:style-name="T15"><text:s text:c="2"/></text:span></text:p>
        </draw:line>
        <draw:g>
          <draw:circle draw:style-name="gr11" draw:layer="layout" svg:width="1.443cm" svg:height="1.443cm" svg:x="13.029cm" svg:y="14.529cm">
            <text:p text:style-name="P5"/>
          </draw:circle>
          <draw:circle draw:style-name="gr11" draw:layer="layout" svg:width="2.168cm" svg:height="2.168cm" svg:x="12.666cm" svg:y="14.166cm">
            <text:p text:style-name="P5"/>
          </draw:circle>
          <draw:circle draw:style-name="gr11" draw:layer="layout" svg:width="2.888cm" svg:height="2.888cm" svg:x="12.306cm" svg:y="13.806cm">
            <text:p text:style-name="P5"/>
          </draw:circle>
          <draw:circle draw:style-name="gr11" draw:layer="layout" svg:width="3.612cm" svg:height="3.612cm" svg:x="11.944cm" svg:y="13.444cm">
            <text:p text:style-name="P5"/>
          </draw:circle>
          <draw:circle draw:style-name="gr11" draw:layer="layout" svg:width="4.332cm" svg:height="4.332cm" svg:x="11.584cm" svg:y="13.084cm">
            <text:p text:style-name="P5"/>
          </draw:circle>
          <draw:circle draw:style-name="gr11" draw:layer="layout" svg:width="5.057cm" svg:height="5.057cm" svg:x="11.222cm" svg:y="12.722cm">
            <text:p text:style-name="P5"/>
          </draw:circle>
          <draw:circle draw:style-name="gr11" draw:layer="layout" svg:width="5.778cm" svg:height="5.778cm" svg:x="10.861cm" svg:y="12.361cm">
            <text:p text:style-name="P5"/>
          </draw:circle>
          <draw:circle draw:style-name="gr11" draw:layer="layout" svg:width="6.5cm" svg:height="6.5cm" svg:x="10.5cm" svg:y="12cm">
            <text:p text:style-name="P5"/>
          </draw:circle>
        </draw:g>
        <draw:circle draw:style-name="gr12" draw:text-style-name="P18" draw:layer="layout" svg:width="0.722cm" svg:height="0.723cm" svg:x="15.194cm" svg:y="17.056cm">
          <text:p text:style-name="P5"/>
        </draw:circle>
        <draw:circle draw:style-name="gr12" draw:layer="layout" svg:width="0.722cm" svg:height="0.723cm" svg:x="11.944cm" svg:y="17.056cm">
          <text:p text:style-name="P5"/>
        </draw:circle>
        <draw:circle draw:style-name="gr12" draw:layer="layout" svg:width="0.722cm" svg:height="0.722cm" svg:x="13.389cm" svg:y="14.889cm">
          <text:p text:style-name="P5"/>
        </draw:circle>
        <draw:circle draw:style-name="gr12" draw:layer="layout" svg:width="0.722cm" svg:height="0.722cm" svg:x="14.472cm" svg:y="12.722cm">
          <text:p text:style-name="P5"/>
        </draw:circle>
        <draw:line draw:style-name="gr14" draw:text-style-name="P19" draw:layer="layout" svg:x1="14.046cm" svg:y1="15.756cm" svg:x2="15.346cm" svg:y2="17.056cm">
          <text:p text:style-name="P5"><text:span text:style-name="T15"><text:s text:c="2"/></text:span></text:p>
        </draw:line>
        <draw:line draw:style-name="gr14" draw:text-style-name="P19" draw:layer="layout" svg:x1="14.046cm" svg:y1="15.756cm" svg:x2="15.346cm" svg:y2="17.056cm">
          <text:p text:style-name="P5"><text:span text:style-name="T15"><text:s text:c="2"/></text:span></text:p>
        </draw:line>
        <draw:line draw:style-name="gr14" draw:text-style-name="P19" draw:layer="layout" svg:x1="14.6cm" svg:y1="13.5cm" svg:x2="13.919cm" svg:y2="14.776cm">
          <text:p text:style-name="P5"><text:span text:style-name="T15"><text:s text:c="2"/></text:span></text:p>
        </draw:line>
        <draw:line draw:style-name="gr14" draw:text-style-name="P19" draw:layer="layout" svg:x1="13cm" svg:y1="17.5cm" svg:x2="14.931cm" svg:y2="17.578cm">
          <text:p text:style-name="P5"><text:span text:style-name="T15"><text:s text:c="2"/></text:span></text:p>
        </draw:line>
        <draw:line draw:style-name="gr14" draw:text-style-name="P19" draw:layer="layout" svg:x1="13.389cm" svg:y1="15.611cm" svg:x2="12.49cm" svg:y2="16.945cm">
          <text:p text:style-name="P5"><text:span text:style-name="T15"><text:s text:c="2"/></text:span></text:p>
        </draw:line>
        <draw:line draw:style-name="gr14" draw:text-style-name="P19" draw:layer="layout" svg:x1="15.709cm" svg:y1="16.915cm" svg:x2="15.058cm" svg:y2="13.579cm">
          <text:p text:style-name="P5"><text:span text:style-name="T15"><text:s text:c="2"/></text:span></text:p>
        </draw:line>
        <draw:g>
          <draw:g>
            <draw:polygon draw:style-name="gr18" draw:text-style-name="P20" draw:layer="layout" svg:width="1.758cm" svg:height="2.082cm" svg:x="18.753cm" svg:y="14.418cm" svg:viewBox="0 0 1759 2083" draw:points="1758,0 0,0 0,2082 1758,2082">
              <text:p text:style-name="P5"/>
            </draw:polygon>
            <draw:polyline draw:style-name="gr19" draw:text-style-name="P20" draw:layer="layout" svg:width="1.758cm" svg:height="2.082cm" svg:x="18.753cm" svg:y="14.418cm" svg:viewBox="0 0 1759 2083" draw:points="1758,0 0,0 0,2082 1758,2082 1758,0">
              <text:p text:style-name="P5"/>
            </draw:polyline>
            <draw:line draw:style-name="gr20" draw:text-style-name="P20" draw:layer="layout" svg:x1="18.93cm" svg:y1="14.592cm" svg:x2="19.151cm" svg:y2="14.592cm">
              <text:p text:style-name="P5"/>
            </draw:line>
            <draw:line draw:style-name="gr21" draw:text-style-name="P20" draw:layer="layout" svg:x1="19.203cm" svg:y1="14.592cm" svg:x2="19.259cm" svg:y2="14.592cm">
              <text:p text:style-name="P5"/>
            </draw:line>
            <draw:line draw:style-name="gr22" draw:text-style-name="P20" draw:layer="layout" svg:x1="19.315cm" svg:y1="14.592cm" svg:x2="19.528cm" svg:y2="14.592cm">
              <text:p text:style-name="P5"/>
            </draw:line>
            <draw:line draw:style-name="gr23" draw:text-style-name="P20" draw:layer="layout" svg:x1="19.588cm" svg:y1="14.592cm" svg:x2="19.641cm" svg:y2="14.592cm">
              <text:p text:style-name="P5"/>
            </draw:line>
            <draw:line draw:style-name="gr24" draw:text-style-name="P20" draw:layer="layout" svg:x1="19.697cm" svg:y1="14.592cm" svg:x2="19.914cm" svg:y2="14.592cm">
              <text:p text:style-name="P5"/>
            </draw:line>
            <draw:line draw:style-name="gr25" draw:text-style-name="P20" draw:layer="layout" svg:x1="19.971cm" svg:y1="14.592cm" svg:x2="20.026cm" svg:y2="14.592cm">
              <text:p text:style-name="P5"/>
            </draw:line>
            <draw:line draw:style-name="gr26" draw:text-style-name="P20" draw:layer="layout" svg:x1="20.075cm" svg:y1="14.592cm" svg:x2="20.299cm" svg:y2="14.592cm">
              <text:p text:style-name="P5"/>
            </draw:line>
            <draw:line draw:style-name="gr27" draw:text-style-name="P20" draw:layer="layout" svg:x1="18.93cm" svg:y1="14.766cm" svg:x2="19.151cm" svg:y2="14.766cm">
              <text:p text:style-name="P5"/>
            </draw:line>
            <draw:line draw:style-name="gr28" draw:text-style-name="P20" draw:layer="layout" svg:x1="19.203cm" svg:y1="14.766cm" svg:x2="19.259cm" svg:y2="14.766cm">
              <text:p text:style-name="P5"/>
            </draw:line>
            <draw:line draw:style-name="gr29" draw:text-style-name="P20" draw:layer="layout" svg:x1="19.315cm" svg:y1="14.766cm" svg:x2="19.528cm" svg:y2="14.766cm">
              <text:p text:style-name="P5"/>
            </draw:line>
            <draw:line draw:style-name="gr30" draw:text-style-name="P20" draw:layer="layout" svg:x1="19.588cm" svg:y1="14.766cm" svg:x2="19.641cm" svg:y2="14.766cm">
              <text:p text:style-name="P5"/>
            </draw:line>
            <draw:line draw:style-name="gr31" draw:text-style-name="P20" draw:layer="layout" svg:x1="19.697cm" svg:y1="14.766cm" svg:x2="19.914cm" svg:y2="14.766cm">
              <text:p text:style-name="P5"/>
            </draw:line>
            <draw:line draw:style-name="gr32" draw:text-style-name="P20" draw:layer="layout" svg:x1="19.971cm" svg:y1="14.766cm" svg:x2="20.026cm" svg:y2="14.766cm">
              <text:p text:style-name="P5"/>
            </draw:line>
            <draw:line draw:style-name="gr33" draw:text-style-name="P20" draw:layer="layout" svg:x1="20.075cm" svg:y1="14.766cm" svg:x2="20.299cm" svg:y2="14.766cm">
              <text:p text:style-name="P5"/>
            </draw:line>
            <draw:line draw:style-name="gr34" draw:text-style-name="P20" draw:layer="layout" svg:x1="18.93cm" svg:y1="14.939cm" svg:x2="19.151cm" svg:y2="14.939cm">
              <text:p text:style-name="P5"/>
            </draw:line>
            <draw:line draw:style-name="gr35" draw:text-style-name="P20" draw:layer="layout" svg:x1="19.203cm" svg:y1="14.939cm" svg:x2="19.259cm" svg:y2="14.939cm">
              <text:p text:style-name="P5"/>
            </draw:line>
            <draw:line draw:style-name="gr36" draw:text-style-name="P20" draw:layer="layout" svg:x1="19.315cm" svg:y1="14.939cm" svg:x2="19.528cm" svg:y2="14.939cm">
              <text:p text:style-name="P5"/>
            </draw:line>
            <draw:line draw:style-name="gr37" draw:text-style-name="P20" draw:layer="layout" svg:x1="19.588cm" svg:y1="14.939cm" svg:x2="19.641cm" svg:y2="14.939cm">
              <text:p text:style-name="P5"/>
            </draw:line>
            <draw:line draw:style-name="gr38" draw:text-style-name="P20" draw:layer="layout" svg:x1="19.697cm" svg:y1="14.939cm" svg:x2="19.914cm" svg:y2="14.939cm">
              <text:p text:style-name="P5"/>
            </draw:line>
            <draw:line draw:style-name="gr39" draw:text-style-name="P20" draw:layer="layout" svg:x1="19.971cm" svg:y1="14.939cm" svg:x2="20.026cm" svg:y2="14.939cm">
              <text:p text:style-name="P5"/>
            </draw:line>
            <draw:line draw:style-name="gr40" draw:text-style-name="P20" draw:layer="layout" svg:x1="20.075cm" svg:y1="14.939cm" svg:x2="20.299cm" svg:y2="14.939cm">
              <text:p text:style-name="P5"/>
            </draw:line>
            <draw:line draw:style-name="gr41" draw:text-style-name="P20" draw:layer="layout" svg:x1="18.93cm" svg:y1="15.108cm" svg:x2="19.151cm" svg:y2="15.108cm">
              <text:p text:style-name="P5"/>
            </draw:line>
            <draw:line draw:style-name="gr42" draw:text-style-name="P20" draw:layer="layout" svg:x1="19.203cm" svg:y1="15.108cm" svg:x2="19.259cm" svg:y2="15.108cm">
              <text:p text:style-name="P5"/>
            </draw:line>
            <draw:line draw:style-name="gr43" draw:text-style-name="P20" draw:layer="layout" svg:x1="19.315cm" svg:y1="15.108cm" svg:x2="19.528cm" svg:y2="15.108cm">
              <text:p text:style-name="P5"/>
            </draw:line>
            <draw:line draw:style-name="gr44" draw:text-style-name="P20" draw:layer="layout" svg:x1="19.588cm" svg:y1="15.108cm" svg:x2="19.641cm" svg:y2="15.108cm">
              <text:p text:style-name="P5"/>
            </draw:line>
            <draw:line draw:style-name="gr45" draw:text-style-name="P20" draw:layer="layout" svg:x1="19.697cm" svg:y1="15.108cm" svg:x2="19.914cm" svg:y2="15.108cm">
              <text:p text:style-name="P5"/>
            </draw:line>
            <draw:line draw:style-name="gr46" draw:text-style-name="P20" draw:layer="layout" svg:x1="19.971cm" svg:y1="15.108cm" svg:x2="20.026cm" svg:y2="15.108cm">
              <text:p text:style-name="P5"/>
            </draw:line>
            <draw:line draw:style-name="gr47" draw:text-style-name="P20" draw:layer="layout" svg:x1="20.075cm" svg:y1="15.108cm" svg:x2="20.299cm" svg:y2="15.108cm">
              <text:p text:style-name="P5"/>
            </draw:line>
            <draw:line draw:style-name="gr48" draw:text-style-name="P20" draw:layer="layout" svg:x1="18.93cm" svg:y1="15.283cm" svg:x2="19.172cm" svg:y2="15.283cm">
              <text:p text:style-name="P5"/>
            </draw:line>
            <draw:line draw:style-name="gr49" draw:text-style-name="P20" draw:layer="layout" svg:x1="19.236cm" svg:y1="15.283cm" svg:x2="19.483cm" svg:y2="15.283cm">
              <text:p text:style-name="P5"/>
            </draw:line>
            <draw:line draw:style-name="gr50" draw:text-style-name="P20" draw:layer="layout" svg:x1="19.54cm" svg:y1="15.283cm" svg:x2="19.79cm" svg:y2="15.283cm">
              <text:p text:style-name="P5"/>
            </draw:line>
            <draw:line draw:style-name="gr51" draw:text-style-name="P20" draw:layer="layout" svg:x1="19.848cm" svg:y1="15.283cm" svg:x2="20.093cm" svg:y2="15.283cm">
              <text:p text:style-name="P5"/>
            </draw:line>
            <draw:line draw:style-name="gr52" draw:text-style-name="P20" draw:layer="layout" svg:x1="20.153cm" svg:y1="15.283cm" svg:x2="20.335cm" svg:y2="15.283cm">
              <text:p text:style-name="P5"/>
            </draw:line>
            <draw:line draw:style-name="gr53" draw:text-style-name="P20" draw:layer="layout" svg:x1="18.93cm" svg:y1="15.457cm" svg:x2="19.103cm" svg:y2="15.457cm">
              <text:p text:style-name="P5"/>
            </draw:line>
            <draw:line draw:style-name="gr54" draw:text-style-name="P20" draw:layer="layout" svg:x1="19.144cm" svg:y1="15.457cm" svg:x2="19.185cm" svg:y2="15.457cm">
              <text:p text:style-name="P5"/>
            </draw:line>
            <draw:line draw:style-name="gr55" draw:text-style-name="P20" draw:layer="layout" svg:x1="19.226cm" svg:y1="15.457cm" svg:x2="19.268cm" svg:y2="15.457cm">
              <text:p text:style-name="P5"/>
            </draw:line>
            <draw:line draw:style-name="gr56" draw:text-style-name="P20" draw:layer="layout" svg:x1="19.315cm" svg:y1="15.457cm" svg:x2="19.485cm" svg:y2="15.457cm">
              <text:p text:style-name="P5"/>
            </draw:line>
            <draw:line draw:style-name="gr57" draw:text-style-name="P20" draw:layer="layout" svg:x1="19.528cm" svg:y1="15.457cm" svg:x2="19.568cm" svg:y2="15.457cm">
              <text:p text:style-name="P5"/>
            </draw:line>
            <draw:line draw:style-name="gr58" draw:text-style-name="P20" draw:layer="layout" svg:x1="19.615cm" svg:y1="15.457cm" svg:x2="19.653cm" svg:y2="15.457cm">
              <text:p text:style-name="P5"/>
            </draw:line>
            <draw:line draw:style-name="gr59" draw:text-style-name="P20" draw:layer="layout" svg:x1="19.697cm" svg:y1="15.457cm" svg:x2="19.864cm" svg:y2="15.457cm">
              <text:p text:style-name="P5"/>
            </draw:line>
            <draw:line draw:style-name="gr60" draw:text-style-name="P20" draw:layer="layout" svg:x1="19.907cm" svg:y1="15.457cm" svg:x2="19.953cm" svg:y2="15.457cm">
              <text:p text:style-name="P5"/>
            </draw:line>
            <draw:line draw:style-name="gr61" draw:text-style-name="P20" draw:layer="layout" svg:x1="19.996cm" svg:y1="15.457cm" svg:x2="20.038cm" svg:y2="15.457cm">
              <text:p text:style-name="P5"/>
            </draw:line>
            <draw:line draw:style-name="gr62" draw:text-style-name="P20" draw:layer="layout" svg:x1="20.075cm" svg:y1="15.457cm" svg:x2="20.248cm" svg:y2="15.457cm">
              <text:p text:style-name="P5"/>
            </draw:line>
            <draw:line draw:style-name="gr63" draw:text-style-name="P20" draw:layer="layout" svg:x1="20.295cm" svg:y1="15.457cm" svg:x2="20.335cm" svg:y2="15.457cm">
              <text:p text:style-name="P5"/>
            </draw:line>
            <draw:line draw:style-name="gr64" draw:text-style-name="P20" draw:layer="layout" svg:x1="18.93cm" svg:y1="15.805cm" svg:x2="20.335cm" svg:y2="15.805cm">
              <text:p text:style-name="P5"/>
            </draw:line>
            <draw:line draw:style-name="gr65" draw:text-style-name="P20" draw:layer="layout" svg:x1="18.93cm" svg:y1="15.634cm" svg:x2="19.172cm" svg:y2="15.634cm">
              <text:p text:style-name="P5"/>
            </draw:line>
            <draw:line draw:style-name="gr66" draw:text-style-name="P20" draw:layer="layout" svg:x1="19.236cm" svg:y1="15.634cm" svg:x2="19.483cm" svg:y2="15.634cm">
              <text:p text:style-name="P5"/>
            </draw:line>
            <draw:line draw:style-name="gr67" draw:text-style-name="P20" draw:layer="layout" svg:x1="19.54cm" svg:y1="15.634cm" svg:x2="19.79cm" svg:y2="15.634cm">
              <text:p text:style-name="P5"/>
            </draw:line>
            <draw:line draw:style-name="gr68" draw:text-style-name="P20" draw:layer="layout" svg:x1="19.848cm" svg:y1="15.634cm" svg:x2="20.093cm" svg:y2="15.634cm">
              <text:p text:style-name="P5"/>
            </draw:line>
            <draw:line draw:style-name="gr69" draw:text-style-name="P20" draw:layer="layout" svg:x1="20.153cm" svg:y1="15.634cm" svg:x2="20.335cm" svg:y2="15.634cm">
              <text:p text:style-name="P5"/>
            </draw:line>
            <draw:line draw:style-name="gr70" draw:text-style-name="P20" draw:layer="layout" svg:x1="18.93cm" svg:y1="16.155cm" svg:x2="19.172cm" svg:y2="16.155cm">
              <text:p text:style-name="P5"/>
            </draw:line>
            <draw:line draw:style-name="gr71" draw:text-style-name="P20" draw:layer="layout" svg:x1="19.236cm" svg:y1="16.155cm" svg:x2="19.483cm" svg:y2="16.155cm">
              <text:p text:style-name="P5"/>
            </draw:line>
            <draw:line draw:style-name="gr72" draw:text-style-name="P20" draw:layer="layout" svg:x1="19.54cm" svg:y1="16.155cm" svg:x2="19.79cm" svg:y2="16.155cm">
              <text:p text:style-name="P5"/>
            </draw:line>
            <draw:line draw:style-name="gr73" draw:text-style-name="P20" draw:layer="layout" svg:x1="19.848cm" svg:y1="16.155cm" svg:x2="20.093cm" svg:y2="16.155cm">
              <text:p text:style-name="P5"/>
            </draw:line>
            <draw:line draw:style-name="gr74" draw:text-style-name="P20" draw:layer="layout" svg:x1="20.153cm" svg:y1="16.155cm" svg:x2="20.335cm" svg:y2="16.155cm">
              <text:p text:style-name="P5"/>
            </draw:line>
            <draw:line draw:style-name="gr75" draw:text-style-name="P20" draw:layer="layout" svg:x1="18.93cm" svg:y1="15.974cm" svg:x2="19.007cm" svg:y2="15.974cm">
              <text:p text:style-name="P5"/>
            </draw:line>
            <draw:line draw:style-name="gr76" draw:text-style-name="P20" draw:layer="layout" svg:x1="19.236cm" svg:y1="15.974cm" svg:x2="19.313cm" svg:y2="15.974cm">
              <text:p text:style-name="P5"/>
            </draw:line>
            <draw:line draw:style-name="gr77" draw:text-style-name="P20" draw:layer="layout" svg:x1="19.54cm" svg:y1="15.974cm" svg:x2="19.622cm" svg:y2="15.974cm">
              <text:p text:style-name="P5"/>
            </draw:line>
            <draw:line draw:style-name="gr78" draw:text-style-name="P20" draw:layer="layout" svg:x1="19.848cm" svg:y1="15.974cm" svg:x2="19.925cm" svg:y2="15.974cm">
              <text:p text:style-name="P5"/>
            </draw:line>
            <draw:line draw:style-name="gr79" draw:text-style-name="P20" draw:layer="layout" svg:x1="20.153cm" svg:y1="15.974cm" svg:x2="20.233cm" svg:y2="15.974cm">
              <text:p text:style-name="P5"/>
            </draw:line>
            <draw:line draw:style-name="gr80" draw:text-style-name="P20" draw:layer="layout" svg:x1="18.93cm" svg:y1="16.327cm" svg:x2="19.007cm" svg:y2="16.327cm">
              <text:p text:style-name="P5"/>
            </draw:line>
            <draw:line draw:style-name="gr81" draw:text-style-name="P20" draw:layer="layout" svg:x1="19.236cm" svg:y1="16.327cm" svg:x2="19.313cm" svg:y2="16.327cm">
              <text:p text:style-name="P5"/>
            </draw:line>
            <draw:line draw:style-name="gr82" draw:text-style-name="P20" draw:layer="layout" svg:x1="19.54cm" svg:y1="16.327cm" svg:x2="19.622cm" svg:y2="16.327cm">
              <text:p text:style-name="P5"/>
            </draw:line>
            <draw:line draw:style-name="gr83" draw:text-style-name="P20" draw:layer="layout" svg:x1="19.848cm" svg:y1="16.327cm" svg:x2="19.925cm" svg:y2="16.327cm">
              <text:p text:style-name="P5"/>
            </draw:line>
            <draw:line draw:style-name="gr84" draw:text-style-name="P20" draw:layer="layout" svg:x1="20.153cm" svg:y1="16.327cm" svg:x2="20.233cm" svg:y2="16.327cm">
              <text:p text:style-name="P5"/>
            </draw:line>
          </draw:g>
          <draw:line draw:style-name="gr85" draw:text-style-name="P21" draw:layer="layout" svg:x1="20.753cm" svg:y1="15.418cm" svg:x2="21.753cm" svg:y2="15.418cm">
            <text:p text:style-name="P5"/>
          </draw:line>
        </draw:g>
        <draw:g>
          <draw:polygon draw:style-name="gr86" draw:text-style-name="P20" draw:layer="layout" svg:width="1.758cm" svg:height="2.082cm" svg:x="22.971cm" svg:y="14.457cm" svg:viewBox="0 0 1759 2083" draw:points="1758,0 0,0 0,2082 1758,2082">
            <text:p text:style-name="P5"/>
          </draw:polygon>
          <draw:polyline draw:style-name="gr87" draw:text-style-name="P20" draw:layer="layout" svg:width="1.758cm" svg:height="2.082cm" svg:x="22.971cm" svg:y="14.457cm" svg:viewBox="0 0 1759 2083" draw:points="1758,0 0,0 0,2082 1758,2082 1758,0">
            <text:p text:style-name="P5"/>
          </draw:polyline>
          <draw:line draw:style-name="gr88" draw:text-style-name="P20" draw:layer="layout" svg:x1="23.148cm" svg:y1="14.631cm" svg:x2="23.369cm" svg:y2="14.631cm">
            <text:p text:style-name="P5"/>
          </draw:line>
          <draw:line draw:style-name="gr89" draw:text-style-name="P20" draw:layer="layout" svg:x1="23.421cm" svg:y1="14.631cm" svg:x2="23.477cm" svg:y2="14.631cm">
            <text:p text:style-name="P5"/>
          </draw:line>
          <draw:line draw:style-name="gr90" draw:text-style-name="P20" draw:layer="layout" svg:x1="23.533cm" svg:y1="14.631cm" svg:x2="23.746cm" svg:y2="14.631cm">
            <text:p text:style-name="P5"/>
          </draw:line>
          <draw:line draw:style-name="gr91" draw:text-style-name="P20" draw:layer="layout" svg:x1="23.806cm" svg:y1="14.631cm" svg:x2="23.859cm" svg:y2="14.631cm">
            <text:p text:style-name="P5"/>
          </draw:line>
          <draw:line draw:style-name="gr92" draw:text-style-name="P20" draw:layer="layout" svg:x1="23.915cm" svg:y1="14.631cm" svg:x2="24.132cm" svg:y2="14.631cm">
            <text:p text:style-name="P5"/>
          </draw:line>
          <draw:line draw:style-name="gr93" draw:text-style-name="P20" draw:layer="layout" svg:x1="24.189cm" svg:y1="14.631cm" svg:x2="24.244cm" svg:y2="14.631cm">
            <text:p text:style-name="P5"/>
          </draw:line>
          <draw:line draw:style-name="gr94" draw:text-style-name="P20" draw:layer="layout" svg:x1="24.293cm" svg:y1="14.631cm" svg:x2="24.517cm" svg:y2="14.631cm">
            <text:p text:style-name="P5"/>
          </draw:line>
          <draw:line draw:style-name="gr95" draw:text-style-name="P20" draw:layer="layout" svg:x1="23.148cm" svg:y1="14.805cm" svg:x2="23.369cm" svg:y2="14.805cm">
            <text:p text:style-name="P5"/>
          </draw:line>
          <draw:line draw:style-name="gr96" draw:text-style-name="P20" draw:layer="layout" svg:x1="23.421cm" svg:y1="14.805cm" svg:x2="23.477cm" svg:y2="14.805cm">
            <text:p text:style-name="P5"/>
          </draw:line>
          <draw:line draw:style-name="gr97" draw:text-style-name="P20" draw:layer="layout" svg:x1="23.533cm" svg:y1="14.805cm" svg:x2="23.746cm" svg:y2="14.805cm">
            <text:p text:style-name="P5"/>
          </draw:line>
          <draw:line draw:style-name="gr98" draw:text-style-name="P20" draw:layer="layout" svg:x1="23.806cm" svg:y1="14.805cm" svg:x2="23.859cm" svg:y2="14.805cm">
            <text:p text:style-name="P5"/>
          </draw:line>
          <draw:line draw:style-name="gr99" draw:text-style-name="P20" draw:layer="layout" svg:x1="23.915cm" svg:y1="14.805cm" svg:x2="24.132cm" svg:y2="14.805cm">
            <text:p text:style-name="P5"/>
          </draw:line>
          <draw:line draw:style-name="gr100" draw:text-style-name="P20" draw:layer="layout" svg:x1="24.189cm" svg:y1="14.805cm" svg:x2="24.244cm" svg:y2="14.805cm">
            <text:p text:style-name="P5"/>
          </draw:line>
          <draw:line draw:style-name="gr101" draw:text-style-name="P20" draw:layer="layout" svg:x1="24.293cm" svg:y1="14.805cm" svg:x2="24.517cm" svg:y2="14.805cm">
            <text:p text:style-name="P5"/>
          </draw:line>
          <draw:line draw:style-name="gr102" draw:text-style-name="P20" draw:layer="layout" svg:x1="23.148cm" svg:y1="14.978cm" svg:x2="23.369cm" svg:y2="14.978cm">
            <text:p text:style-name="P5"/>
          </draw:line>
          <draw:line draw:style-name="gr103" draw:text-style-name="P20" draw:layer="layout" svg:x1="23.421cm" svg:y1="14.978cm" svg:x2="23.477cm" svg:y2="14.978cm">
            <text:p text:style-name="P5"/>
          </draw:line>
          <draw:line draw:style-name="gr104" draw:text-style-name="P20" draw:layer="layout" svg:x1="23.533cm" svg:y1="14.978cm" svg:x2="23.746cm" svg:y2="14.978cm">
            <text:p text:style-name="P5"/>
          </draw:line>
          <draw:line draw:style-name="gr105" draw:text-style-name="P20" draw:layer="layout" svg:x1="23.806cm" svg:y1="14.978cm" svg:x2="23.859cm" svg:y2="14.978cm">
            <text:p text:style-name="P5"/>
          </draw:line>
          <draw:line draw:style-name="gr106" draw:text-style-name="P20" draw:layer="layout" svg:x1="23.915cm" svg:y1="14.978cm" svg:x2="24.132cm" svg:y2="14.978cm">
            <text:p text:style-name="P5"/>
          </draw:line>
          <draw:line draw:style-name="gr107" draw:text-style-name="P20" draw:layer="layout" svg:x1="24.189cm" svg:y1="14.978cm" svg:x2="24.244cm" svg:y2="14.978cm">
            <text:p text:style-name="P5"/>
          </draw:line>
          <draw:line draw:style-name="gr108" draw:text-style-name="P20" draw:layer="layout" svg:x1="24.293cm" svg:y1="14.978cm" svg:x2="24.517cm" svg:y2="14.978cm">
            <text:p text:style-name="P5"/>
          </draw:line>
          <draw:line draw:style-name="gr109" draw:text-style-name="P20" draw:layer="layout" svg:x1="23.148cm" svg:y1="15.147cm" svg:x2="23.369cm" svg:y2="15.147cm">
            <text:p text:style-name="P5"/>
          </draw:line>
          <draw:line draw:style-name="gr110" draw:text-style-name="P20" draw:layer="layout" svg:x1="23.421cm" svg:y1="15.147cm" svg:x2="23.477cm" svg:y2="15.147cm">
            <text:p text:style-name="P5"/>
          </draw:line>
          <draw:line draw:style-name="gr111" draw:text-style-name="P20" draw:layer="layout" svg:x1="23.533cm" svg:y1="15.147cm" svg:x2="23.746cm" svg:y2="15.147cm">
            <text:p text:style-name="P5"/>
          </draw:line>
          <draw:line draw:style-name="gr112" draw:text-style-name="P20" draw:layer="layout" svg:x1="23.806cm" svg:y1="15.147cm" svg:x2="23.859cm" svg:y2="15.147cm">
            <text:p text:style-name="P5"/>
          </draw:line>
          <draw:line draw:style-name="gr113" draw:text-style-name="P20" draw:layer="layout" svg:x1="23.915cm" svg:y1="15.147cm" svg:x2="24.132cm" svg:y2="15.147cm">
            <text:p text:style-name="P5"/>
          </draw:line>
          <draw:line draw:style-name="gr114" draw:text-style-name="P20" draw:layer="layout" svg:x1="24.189cm" svg:y1="15.147cm" svg:x2="24.244cm" svg:y2="15.147cm">
            <text:p text:style-name="P5"/>
          </draw:line>
          <draw:line draw:style-name="gr115" draw:text-style-name="P20" draw:layer="layout" svg:x1="24.293cm" svg:y1="15.147cm" svg:x2="24.517cm" svg:y2="15.147cm">
            <text:p text:style-name="P5"/>
          </draw:line>
          <draw:line draw:style-name="gr116" draw:text-style-name="P20" draw:layer="layout" svg:x1="23.148cm" svg:y1="15.322cm" svg:x2="23.39cm" svg:y2="15.322cm">
            <text:p text:style-name="P5"/>
          </draw:line>
          <draw:line draw:style-name="gr117" draw:text-style-name="P20" draw:layer="layout" svg:x1="23.454cm" svg:y1="15.322cm" svg:x2="23.701cm" svg:y2="15.322cm">
            <text:p text:style-name="P5"/>
          </draw:line>
          <draw:line draw:style-name="gr118" draw:text-style-name="P20" draw:layer="layout" svg:x1="23.758cm" svg:y1="15.322cm" svg:x2="24.008cm" svg:y2="15.322cm">
            <text:p text:style-name="P5"/>
          </draw:line>
          <draw:line draw:style-name="gr119" draw:text-style-name="P20" draw:layer="layout" svg:x1="24.066cm" svg:y1="15.322cm" svg:x2="24.311cm" svg:y2="15.322cm">
            <text:p text:style-name="P5"/>
          </draw:line>
          <draw:line draw:style-name="gr120" draw:text-style-name="P20" draw:layer="layout" svg:x1="24.371cm" svg:y1="15.322cm" svg:x2="24.553cm" svg:y2="15.322cm">
            <text:p text:style-name="P5"/>
          </draw:line>
          <draw:line draw:style-name="gr121" draw:text-style-name="P20" draw:layer="layout" svg:x1="23.148cm" svg:y1="15.496cm" svg:x2="23.321cm" svg:y2="15.496cm">
            <text:p text:style-name="P5"/>
          </draw:line>
          <draw:line draw:style-name="gr122" draw:text-style-name="P20" draw:layer="layout" svg:x1="23.362cm" svg:y1="15.496cm" svg:x2="23.403cm" svg:y2="15.496cm">
            <text:p text:style-name="P5"/>
          </draw:line>
          <draw:line draw:style-name="gr123" draw:text-style-name="P20" draw:layer="layout" svg:x1="23.444cm" svg:y1="15.496cm" svg:x2="23.486cm" svg:y2="15.496cm">
            <text:p text:style-name="P5"/>
          </draw:line>
          <draw:line draw:style-name="gr124" draw:text-style-name="P20" draw:layer="layout" svg:x1="23.533cm" svg:y1="15.496cm" svg:x2="23.703cm" svg:y2="15.496cm">
            <text:p text:style-name="P5"/>
          </draw:line>
          <draw:line draw:style-name="gr125" draw:text-style-name="P20" draw:layer="layout" svg:x1="23.746cm" svg:y1="15.496cm" svg:x2="23.786cm" svg:y2="15.496cm">
            <text:p text:style-name="P5"/>
          </draw:line>
          <draw:line draw:style-name="gr126" draw:text-style-name="P20" draw:layer="layout" svg:x1="23.833cm" svg:y1="15.496cm" svg:x2="23.871cm" svg:y2="15.496cm">
            <text:p text:style-name="P5"/>
          </draw:line>
          <draw:line draw:style-name="gr127" draw:text-style-name="P20" draw:layer="layout" svg:x1="23.915cm" svg:y1="15.496cm" svg:x2="24.082cm" svg:y2="15.496cm">
            <text:p text:style-name="P5"/>
          </draw:line>
          <draw:line draw:style-name="gr128" draw:text-style-name="P20" draw:layer="layout" svg:x1="24.125cm" svg:y1="15.496cm" svg:x2="24.171cm" svg:y2="15.496cm">
            <text:p text:style-name="P5"/>
          </draw:line>
          <draw:line draw:style-name="gr129" draw:text-style-name="P20" draw:layer="layout" svg:x1="24.214cm" svg:y1="15.496cm" svg:x2="24.256cm" svg:y2="15.496cm">
            <text:p text:style-name="P5"/>
          </draw:line>
          <draw:line draw:style-name="gr130" draw:text-style-name="P20" draw:layer="layout" svg:x1="24.293cm" svg:y1="15.496cm" svg:x2="24.466cm" svg:y2="15.496cm">
            <text:p text:style-name="P5"/>
          </draw:line>
          <draw:line draw:style-name="gr131" draw:text-style-name="P20" draw:layer="layout" svg:x1="24.513cm" svg:y1="15.496cm" svg:x2="24.553cm" svg:y2="15.496cm">
            <text:p text:style-name="P5"/>
          </draw:line>
          <draw:line draw:style-name="gr132" draw:text-style-name="P20" draw:layer="layout" svg:x1="23.148cm" svg:y1="15.844cm" svg:x2="24.553cm" svg:y2="15.844cm">
            <text:p text:style-name="P5"/>
          </draw:line>
          <draw:line draw:style-name="gr133" draw:text-style-name="P20" draw:layer="layout" svg:x1="23.148cm" svg:y1="15.673cm" svg:x2="23.39cm" svg:y2="15.673cm">
            <text:p text:style-name="P5"/>
          </draw:line>
          <draw:line draw:style-name="gr134" draw:text-style-name="P20" draw:layer="layout" svg:x1="23.454cm" svg:y1="15.673cm" svg:x2="23.701cm" svg:y2="15.673cm">
            <text:p text:style-name="P5"/>
          </draw:line>
          <draw:line draw:style-name="gr135" draw:text-style-name="P20" draw:layer="layout" svg:x1="23.758cm" svg:y1="15.673cm" svg:x2="24.008cm" svg:y2="15.673cm">
            <text:p text:style-name="P5"/>
          </draw:line>
          <draw:line draw:style-name="gr136" draw:text-style-name="P20" draw:layer="layout" svg:x1="24.066cm" svg:y1="15.673cm" svg:x2="24.311cm" svg:y2="15.673cm">
            <text:p text:style-name="P5"/>
          </draw:line>
          <draw:line draw:style-name="gr137" draw:text-style-name="P20" draw:layer="layout" svg:x1="24.371cm" svg:y1="15.673cm" svg:x2="24.553cm" svg:y2="15.673cm">
            <text:p text:style-name="P5"/>
          </draw:line>
          <draw:line draw:style-name="gr138" draw:text-style-name="P20" draw:layer="layout" svg:x1="23.148cm" svg:y1="16.194cm" svg:x2="23.39cm" svg:y2="16.194cm">
            <text:p text:style-name="P5"/>
          </draw:line>
          <draw:line draw:style-name="gr139" draw:text-style-name="P20" draw:layer="layout" svg:x1="23.454cm" svg:y1="16.194cm" svg:x2="23.701cm" svg:y2="16.194cm">
            <text:p text:style-name="P5"/>
          </draw:line>
          <draw:line draw:style-name="gr140" draw:text-style-name="P20" draw:layer="layout" svg:x1="23.758cm" svg:y1="16.194cm" svg:x2="24.008cm" svg:y2="16.194cm">
            <text:p text:style-name="P5"/>
          </draw:line>
          <draw:line draw:style-name="gr141" draw:text-style-name="P20" draw:layer="layout" svg:x1="24.066cm" svg:y1="16.194cm" svg:x2="24.311cm" svg:y2="16.194cm">
            <text:p text:style-name="P5"/>
          </draw:line>
          <draw:line draw:style-name="gr142" draw:text-style-name="P20" draw:layer="layout" svg:x1="24.371cm" svg:y1="16.194cm" svg:x2="24.553cm" svg:y2="16.194cm">
            <text:p text:style-name="P5"/>
          </draw:line>
          <draw:line draw:style-name="gr143" draw:text-style-name="P20" draw:layer="layout" svg:x1="23.148cm" svg:y1="16.013cm" svg:x2="23.225cm" svg:y2="16.013cm">
            <text:p text:style-name="P5"/>
          </draw:line>
          <draw:line draw:style-name="gr144" draw:text-style-name="P20" draw:layer="layout" svg:x1="23.454cm" svg:y1="16.013cm" svg:x2="23.531cm" svg:y2="16.013cm">
            <text:p text:style-name="P5"/>
          </draw:line>
          <draw:line draw:style-name="gr145" draw:text-style-name="P20" draw:layer="layout" svg:x1="23.758cm" svg:y1="16.013cm" svg:x2="23.84cm" svg:y2="16.013cm">
            <text:p text:style-name="P5"/>
          </draw:line>
          <draw:line draw:style-name="gr146" draw:text-style-name="P20" draw:layer="layout" svg:x1="24.066cm" svg:y1="16.013cm" svg:x2="24.143cm" svg:y2="16.013cm">
            <text:p text:style-name="P5"/>
          </draw:line>
          <draw:line draw:style-name="gr147" draw:text-style-name="P20" draw:layer="layout" svg:x1="24.371cm" svg:y1="16.013cm" svg:x2="24.451cm" svg:y2="16.013cm">
            <text:p text:style-name="P5"/>
          </draw:line>
          <draw:line draw:style-name="gr148" draw:text-style-name="P20" draw:layer="layout" svg:x1="23.148cm" svg:y1="16.366cm" svg:x2="23.225cm" svg:y2="16.366cm">
            <text:p text:style-name="P5"/>
          </draw:line>
          <draw:line draw:style-name="gr149" draw:text-style-name="P20" draw:layer="layout" svg:x1="23.454cm" svg:y1="16.366cm" svg:x2="23.531cm" svg:y2="16.366cm">
            <text:p text:style-name="P5"/>
          </draw:line>
          <draw:line draw:style-name="gr150" draw:text-style-name="P20" draw:layer="layout" svg:x1="23.758cm" svg:y1="16.366cm" svg:x2="23.84cm" svg:y2="16.366cm">
            <text:p text:style-name="P5"/>
          </draw:line>
          <draw:line draw:style-name="gr151" draw:text-style-name="P20" draw:layer="layout" svg:x1="24.066cm" svg:y1="16.366cm" svg:x2="24.143cm" svg:y2="16.366cm">
            <text:p text:style-name="P5"/>
          </draw:line>
          <draw:line draw:style-name="gr152" draw:text-style-name="P20" draw:layer="layout" svg:x1="24.371cm" svg:y1="16.366cm" svg:x2="24.451cm" svg:y2="16.366cm">
            <text:p text:style-name="P5"/>
          </draw:line>
        </draw:g>
        <draw:frame draw:style-name="gr7" draw:layer="layout" svg:width="7.444cm" svg:height="1.258cm" svg:x="17.793cm" svg:y="11.5cm">
          <draw:text-box>
            <text:p text:style-name="P5">Message <text:s text:c="5"/>Packet</text:p>
          </draw:text-box>
        </draw:frame>
        <draw:line draw:style-name="gr153" draw:text-style-name="P21" draw:layer="layout" svg:x1="21.5cm" svg:y1="12cm" svg:x2="22.5cm" svg:y2="12cm">
          <text:p text:style-name="P5"/>
        </draw:line>
        <presentation:notes draw:style-name="dp2">
          <draw:page-thumbnail draw:style-name="gr1" draw:layer="layout" svg:width="13.08cm" svg:height="8.971cm" svg:x="4.563cm" svg:y="2.625cm" draw:page-number="7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8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Communication on WSN</text:p>
          </draw:text-box>
        </draw:frame>
        <draw:frame presentation:style-name="pr9" draw:text-style-name="P8" draw:layer="layout" svg:width="26cm" svg:height="15.001cm" svg:x="1cm" svg:y="5cm" presentation:class="outline" presentation:user-transformed="true">
          <draw:text-box>
            <text:list text:style-name="L4">
              <text:list-item>
                <text:p text:style-name="P8">No “single best” MAC protocol</text:p>
              </text:list-item>
            </text:list>
            <text:list text:style-name="L4">
              <text:list-item>
                <text:list>
                  <text:list-item>
                    <text:p text:style-name="P10">Different applications, different communication needs</text:p>
                  </text:list-item>
                </text:list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8">Configurable communication could</text:p>
              </text:list-item>
            </text:list>
            <text:list text:style-name="L4">
              <text:list-item>
                <text:list>
                  <text:list-item>
                    <text:p text:style-name="P10">Provide an unified communication interf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rovide a configuration frame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nable applications to reach energy/communication efficienc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8cm" svg:height="8.971cm" svg:x="4.563cm" svg:y="2.625cm" draw:page-number="8" presentation:class="page"/>
          <draw:frame presentation:style-name="pr3" draw:text-style-name="P23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9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C-MAC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8">Configurable Medium Access Control for Wireless Sensor Networks</text:p>
              </text:list-item>
            </text:list>
            <text:list text:style-name="L4">
              <text:list-item>
                <text:list>
                  <text:list-item>
                    <text:p text:style-name="P10">Different MAC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Different strateg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nfiguration architecture</text:p>
                  </text:list-item>
                </text:list>
              </text:list-item>
            </text:list>
            <text:list text:style-name="L4">
              <text:list-item>
                <text:p text:style-name="P8">Framework to build functional MAC protocols</text:p>
              </text:list-item>
            </text:list>
            <text:list text:style-name="L4">
              <text:list-item>
                <text:list>
                  <text:list-item>
                    <text:p text:style-name="P10">Pre-defined configuration po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rotocol: compile-time (configurable trait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arameters: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8cm" svg:height="8.971cm" svg:x="4.563cm" svg:y="2.625cm" draw:page-number="9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10" draw:style-name="dp1" draw:master-page-name="lisha" presentation:presentation-page-layout-name="AL4T3">
        <draw:frame presentation:style-name="pr4" draw:text-style-name="P9" draw:layer="layout" svg:width="24.401cm" svg:height="3.501cm" svg:x="0.999cm" svg:y="0.4cm" presentation:class="title">
          <draw:text-box>
            <text:p text:style-name="P9">C-MAC</text:p>
          </draw:text-box>
        </draw:frame>
        <draw:frame presentation:style-name="pr10" draw:text-style-name="P8" draw:layer="layout" svg:width="26cm" svg:height="15.001cm" svg:x="1cm" svg:y="5cm" presentation:class="outline" presentation:user-transformed="true">
          <draw:text-box>
            <text:list text:style-name="L4">
              <text:list-item>
                <text:p text:style-name="P8">Fundamental configuration points</text:p>
              </text:list-item>
            </text:list>
            <text:list text:style-name="L4">
              <text:list-item>
                <text:list>
                  <text:list-item>
                    <text:p text:style-name="P10">Communication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Frequency, power, modul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Duty cyc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Defines organization, or lack thereof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llision avoidance mechanis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No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Global synchroniz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llision detection mechanis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onfirm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llision handling mechanis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Retransmiss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5.009cm" svg:height="15.001cm" svg:x="12cm" svg:y="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Chanel sampl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RTS/C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No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N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8cm" svg:height="8.971cm" svg:x="4.563cm" svg:y="2.625cm" draw:page-number="10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11" draw:style-name="dp1" draw:master-page-name="lisha" presentation:presentation-page-layout-name="AL5T11">
        <draw:frame presentation:style-name="pr4" draw:text-style-name="P9" draw:layer="layout" svg:width="24.401cm" svg:height="3.501cm" svg:x="0.999cm" svg:y="0.4cm" presentation:class="title">
          <draw:text-box>
            <text:p text:style-name="P9">C-MAC: State Machine Overview</text:p>
          </draw:text-box>
        </draw:frame>
        <draw:frame draw:style-name="gr2" draw:text-style-name="P11" draw:layer="layout" svg:width="24.235cm" svg:height="15.795cm" svg:x="2.235cm" svg:y="3.799cm">
          <draw:image xlink:href="Pictures/100000000000039400000255EC76C13F.png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08cm" svg:height="8.971cm" svg:x="4.563cm" svg:y="2.625cm" draw:page-number="11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12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C-MAC: Evaluation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28"><text:span text:style-name="T9">Comparative Test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0">C-MAC + EP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10">B-MAC + TinyOS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9">Communication Parameter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0">Best reported results</text:span></text:p>
                  </text:list-item>
                </text:list>
              </text:list-item>
            </text:list>
          </draw:text-box>
        </draw:frame>
        <draw:frame draw:style-name="standard" draw:layer="layout" svg:width="20.168cm" svg:height="9.398cm" svg:x="3.332cm" svg:y="10.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08cm" svg:height="8.971cm" svg:x="4.563cm" svg:y="2.625cm" draw:page-number="12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13" draw:style-name="dp1" draw:master-page-name="lisha" presentation:presentation-page-layout-name="AL5T11">
        <draw:frame presentation:style-name="pr4" draw:text-style-name="P9" draw:layer="layout" svg:width="24.401cm" svg:height="3.501cm" svg:x="0.999cm" svg:y="0.4cm" presentation:class="title">
          <draw:text-box>
            <text:p text:style-name="P9">C-MAC: Evaluation</text:p>
          </draw:text-box>
        </draw:frame>
        <draw:circle draw:style-name="gr11" draw:text-style-name="P11" draw:layer="layout" svg:width="14.267cm" svg:height="14.267cm" svg:x="7.419cm" svg:y="5.233cm">
          <text:p text:style-name="P5"/>
        </draw:circle>
        <draw:custom-shape draw:style-name="gr154" draw:text-style-name="P11" draw:layer="layout" svg:width="11.75cm" svg:height="11.329cm" svg:x="8.678cm" svg:y="5.233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1" draw:layer="layout" svg:width="3.689cm" svg:height="2.68cm" svg:x="12.543cm" svg:y="3.974cm">
          <draw:image xlink:href="Pictures/10000000000002B2000001F563A7B646.png" xlink:type="simple" xlink:show="embed" xlink:actuate="onLoad">
            <text:p text:style-name="P5"/>
          </draw:image>
        </draw:frame>
        <draw:frame draw:style-name="gr2" draw:text-style-name="P11" draw:id="id9" draw:layer="layout" svg:width="3.689cm" svg:height="2.679cm" svg:x="18.749cm" svg:y="14.884cm">
          <draw:image xlink:href="Pictures/10000000000002B2000001F563A7B646.png" xlink:type="simple" xlink:show="embed" xlink:actuate="onLoad">
            <text:p text:style-name="P5"/>
          </draw:image>
        </draw:frame>
        <draw:frame draw:style-name="gr2" draw:text-style-name="P11" draw:id="id7" draw:layer="layout" svg:width="3.689cm" svg:height="2.681cm" svg:x="7cm" svg:y="15.303cm">
          <draw:image xlink:href="Pictures/10000000000002B2000001F563A7B646.png" xlink:type="simple" xlink:show="embed" xlink:actuate="onLoad">
            <text:p text:style-name="P5"/>
          </draw:image>
        </draw:frame>
        <draw:frame draw:style-name="gr2" draw:text-style-name="P11" draw:layer="layout" svg:width="3.69cm" svg:height="2.681cm" svg:x="12.874cm" svg:y="9.848cm">
          <draw:image xlink:href="Pictures/10000000000002B2000001F563A7B646.png" xlink:type="simple" xlink:show="embed" xlink:actuate="onLoad">
            <text:p text:style-name="P5"/>
          </draw:image>
        </draw:frame>
        <draw:line draw:style-name="gr155" draw:text-style-name="P11" draw:layer="layout" svg:x1="14.763cm" svg:y1="6.091cm" svg:x2="14.763cm" svg:y2="9.62cm">
          <text:p text:style-name="P5"/>
        </draw:line>
        <draw:polyline draw:style-name="gr155" draw:text-style-name="P11" draw:id="id10" draw:layer="layout" svg:width="1.758cm" svg:height="3.057cm" svg:x="16.533cm" svg:y="11.737cm" svg:viewBox="0 0 1759 3058" draw:points="1758,3057 0,0">
          <text:p text:style-name="P5"/>
        </draw:polyline>
        <draw:polyline draw:style-name="gr155" draw:text-style-name="P11" draw:id="id8" draw:layer="layout" svg:width="1.759cm" svg:height="3.057cm" svg:x="10.887cm" svg:y="11.737cm" svg:viewBox="0 0 1760 3058" draw:points="0,3057 1759,0">
          <text:p text:style-name="P5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08cm" svg:height="8.971cm" svg:x="4.563cm" svg:y="2.625cm" draw:page-number="13" presentation:class="page"/>
          <draw:frame presentation:style-name="pr11" draw:text-style-name="P30" draw:layer="layout" svg:width="15.45cm" svg:height="9.96cm" svg:x="3.386cm" svg:y="12.46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isha" presentation:presentation-page-layout-name="AL6T2">
        <draw:frame presentation:style-name="pr4" draw:text-style-name="P9" draw:layer="layout" svg:width="24.401cm" svg:height="3.501cm" svg:x="0.999cm" svg:y="0.4cm" presentation:class="title">
          <draw:text-box>
            <text:p text:style-name="P9">C-MAC: Evaluation</text:p>
          </draw:text-box>
        </draw:frame>
        <draw:frame presentation:style-name="pr10" draw:text-style-name="P8" draw:layer="layout" svg:width="26cm" svg:height="15.001cm" svg:x="1cm" svg:y="5cm" presentation:class="outline" presentation:user-transformed="true">
          <draw:text-box>
            <text:p text:style-name="P8"/>
          </draw:text-box>
        </draw:frame>
        <draw:frame draw:style-name="standard" draw:layer="layout" svg:width="26cm" svg:height="16.204cm" svg:x="1cm" svg:y="3.81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08cm" svg:height="8.971cm" svg:x="4.563cm" svg:y="2.625cm" draw:page-number="14" presentation:class="page"/>
          <draw:frame presentation:style-name="pr8" draw:text-style-name="P15" draw:layer="layout" svg:width="15.892cm" svg:height="9.369cm" svg:x="3.482cm" svg:y="11.72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isha" presentation:presentation-page-layout-name="AL6T2">
        <draw:frame presentation:style-name="pr4" draw:text-style-name="P9" draw:layer="layout" svg:width="24.401cm" svg:height="3.501cm" svg:x="0.999cm" svg:y="0.4cm" presentation:class="title">
          <draw:text-box>
            <text:p text:style-name="P9">C-MAC: Evaluation</text:p>
          </draw:text-box>
        </draw:frame>
        <draw:frame presentation:style-name="pr10" draw:text-style-name="P8" draw:layer="layout" svg:width="26cm" svg:height="15.001cm" svg:x="1cm" svg:y="5cm" presentation:class="outline" presentation:user-transformed="true">
          <draw:text-box>
            <text:p text:style-name="P8"/>
          </draw:text-box>
        </draw:frame>
        <draw:frame draw:style-name="standard" draw:layer="layout" svg:width="26cm" svg:height="16.204cm" svg:x="1cm" svg:y="3.81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08cm" svg:height="8.971cm" svg:x="4.563cm" svg:y="2.625cm" draw:page-number="15" presentation:class="page"/>
          <draw:frame presentation:style-name="pr8" draw:text-style-name="P15" draw:layer="layout" svg:width="15.892cm" svg:height="9.369cm" svg:x="3.482cm" svg:y="11.72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isha" presentation:presentation-page-layout-name="AL2T1">
        <draw:frame draw:style-name="standard" draw:layer="layout" svg:width="11.5cm" svg:height="12.694cm" svg:x="2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9" draw:layer="layout" svg:width="24.401cm" svg:height="3.501cm" svg:x="0.999cm" svg:y="0.4cm" presentation:class="title">
          <draw:text-box>
            <text:p text:style-name="P9">C-MAC: Evaluation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22">Footprint</text:p>
              </text:list-item>
            </text:list>
          </draw:text-box>
        </draw:frame>
        <draw:frame draw:style-name="standard" draw:layer="layout" svg:width="11.5cm" svg:height="12.694cm" svg:x="14.5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08cm" svg:height="8.971cm" svg:x="4.563cm" svg:y="2.625cm" draw:page-number="16" presentation:class="page"/>
          <draw:frame presentation:style-name="pr3" draw:text-style-name="P23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17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Conclusions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6"><text:span text:style-name="T9">“</text:span><text:span text:style-name="T9">Ideal” MAC for sensor network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Compromise between power efficiency and communication flexibility / performa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Current protocol designs have little space for application-determined configur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C-MAC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MAC “framework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Configuration archite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Competitive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8cm" svg:height="8.971cm" svg:x="4.563cm" svg:y="2.625cm" draw:page-number="17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draw:page draw:name="page18" draw:style-name="dp1" draw:master-page-name="lisha" presentation:presentation-page-layout-name="AL2T1">
        <draw:frame presentation:style-name="pr4" draw:text-style-name="P9" draw:layer="layout" svg:width="24.401cm" svg:height="3.501cm" svg:x="0.999cm" svg:y="0.4cm" presentation:class="title">
          <draw:text-box>
            <text:p text:style-name="P9">Perspectives</text:p>
          </draw:text-box>
        </draw:frame>
        <draw:frame presentation:style-name="pr7" draw:text-style-name="P8" draw:layer="layout" svg:width="26cm" svg:height="16.191cm" svg:x="1cm" svg:y="3.81cm" presentation:class="outline">
          <draw:text-box>
            <text:list text:style-name="L4">
              <text:list-item>
                <text:p text:style-name="P8">Adaptability</text:p>
              </text:list-item>
            </text:list>
            <text:list text:style-name="L4">
              <text:list-item>
                <text:list>
                  <text:list-item>
                    <text:p text:style-name="P10">Dynamic changes in protocol behavi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Reactive adaptation of parameters (e.g. duty cycle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oordinated protocol alterations (aided by a meta-protocol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Cross-layer optimizations</text:p>
              </text:list-item>
            </text:list>
            <text:list text:style-name="L4">
              <text:list-item>
                <text:list>
                  <text:list-item>
                    <text:p text:style-name="P10">Protocol and service integ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Routing, transport, localiz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First step: C-MAC + HECOPS Localization Protoco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Generalized configuration architecture</text:p>
                  </text:list-item>
                </text:list>
              </text:list-item>
            </text:list>
            <text:list text:style-name="L4">
              <text:list-item>
                <text:p text:style-name="P8">Large-scale evaluations</text:p>
              </text:list-item>
            </text:list>
          </draw:text-box>
        </draw:frame>
        <presentation:notes draw:style-name="dp2">
          <draw:page-thumbnail draw:style-name="gr1" draw:layer="layout" svg:width="13.08cm" svg:height="8.971cm" svg:x="4.563cm" svg:y="2.625cm" draw:page-number="18" presentation:class="page"/>
          <draw:frame presentation:style-name="pr3" draw:text-style-name="P5" draw:layer="layout" svg:width="15.45cm" svg:height="9.96cm" svg:x="3.386cm" svg:y="12.4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Arrowheads_20_15" draw:display-name="Arrowheads 15" svg:viewBox="0 0 20 30" svg:d="m10 0-10 30h20z"/>
    <draw:marker draw:name="Arrowheads_20_16" draw:display-name="Arrowheads 16" svg:viewBox="0 0 20 30" svg:d="m10 0-10 30h20z"/>
    <draw:marker draw:name="Arrowheads_20_18" draw:display-name="Arrowheads 18" svg:viewBox="0 0 20 30" svg:d="m10 0-10 30h20z"/>
    <draw:marker draw:name="Arrowheads_20_4" draw:display-name="Arrowheads 4" svg:viewBox="0 0 20 30" svg:d="m10 0-10 30h20z"/>
    <draw:marker draw:name="Arrowheads_20_9" draw:display-name="Arrowheads 9" svg:viewBox="0 0 250 250" svg:d="m125 0 125 250h-25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lisha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80%" fo:text-align="start" text:enable-numbering="false"/>
      <style:text-properties fo:color="#004a4a" style:text-outline="false" style:text-line-through-style="none" fo:font-family="'Bitstream Vera Sans'" style:font-family-generic="swiss" style:font-pitch="variable" fo:font-size="36pt" fo:font-style="normal" fo:text-shadow="none" style:text-underline-style="none" fo:font-weight="bold" style:font-size-asian="24pt" style:font-size-complex="24pt"/>
    </style:style>
    <style:style style:name="lisha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background" style:family="presentation">
      <style:graphic-properties draw:stroke="none" draw:fill="none"/>
    </style:style>
    <style:style style:name="lisha-backgroundobjects" style:family="presentation">
      <style:graphic-properties draw:shadow="hidden" draw:shadow-offset-x="0.3cm" draw:shadow-offset-y="0.3cm" draw:shadow-color="#808080"/>
    </style:style>
    <style:style style:name="lisha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outline1" style:family="presentation">
      <style:graphic-properties draw:stroke="none" draw:fill="none">
        <text:list-style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</text:list-style>
      </style:graphic-properties>
      <style:paragraph-properties fo:margin-left="1.2cm" fo:margin-right="0cm" fo:margin-top="0cm" fo:margin-bottom="0cm" fo:text-align="start" text:enable-numbering="true" fo:text-indent="0cm"/>
      <style:text-properties fo:color="#000000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/>
    </style:style>
    <style:style style:name="lisha-outline2" style:family="presentation" style:parent-style-name="lisha-outline1">
      <style:paragraph-properties fo:margin-left="2.4cm" fo:margin-right="0cm" fo:margin-top="0cm" fo:margin-bottom="0cm" text:enable-numbering="true" fo:text-indent="-0.8cm"/>
      <style:text-properties fo:color="#000000" fo:font-family="'Bitstream Vera Sans'" style:font-family-generic="swiss" style:font-pitch="variable" fo:font-size="28pt"/>
    </style:style>
    <style:style style:name="lisha-outline3" style:family="presentation" style:parent-style-name="lisha-outline2">
      <style:paragraph-properties fo:margin-left="3.6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4pt"/>
    </style:style>
    <style:style style:name="lisha-outline4" style:family="presentation" style:parent-style-name="lisha-outline3">
      <style:paragraph-properties fo:margin-left="4.8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0pt"/>
    </style:style>
    <style:style style:name="lisha-outline5" style:family="presentation" style:parent-style-name="lisha-outline4">
      <style:paragraph-properties fo:margin-left="6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0pt"/>
    </style:style>
    <style:style style:name="lisha-outline6" style:family="presentation" style:parent-style-name="lisha-outline5">
      <style:paragraph-properties fo:margin-left="7.2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0pt"/>
    </style:style>
    <style:style style:name="lisha-outline7" style:family="presentation" style:parent-style-name="lisha-outline6">
      <style:paragraph-properties fo:margin-left="8.4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0pt"/>
    </style:style>
    <style:style style:name="lisha-outline8" style:family="presentation" style:parent-style-name="lisha-outline7">
      <style:paragraph-properties fo:margin-left="9.6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0pt"/>
    </style:style>
    <style:style style:name="lisha-outline9" style:family="presentation" style:parent-style-name="lisha-outline8">
      <style:paragraph-properties fo:margin-left="10.8cm" fo:margin-right="0cm" fo:margin-top="0cm" fo:margin-bottom="0cm" text:enable-numbering="true" fo:text-indent="-0.6cm"/>
      <style:text-properties fo:color="#000000" fo:font-family="'Bitstream Vera Sans'" style:font-family-generic="swiss" style:font-pitch="variable"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6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gr2" style:family="graphic" style:parent-style-name="standard">
      <style:graphic-properties draw:stroke="none" draw:fill="none" draw:fill-color="#ffffff" draw:auto-grow-width="true" fo:min-height="0.632cm" fo:min-width="3.478cm"/>
    </style:style>
    <style:style style:name="gr3" style:family="graphic" style:parent-style-name="standard" style:list-style-name="L3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ffffff" draw:fill-gradient-name="Gradient_20_8" draw:fill-hatch-name="Hatch_20_1" draw:fill-image-name="Bitmape_20_1" draw:auto-grow-width="true" fo:min-height="0.632cm" fo:min-width="9.51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fill="none" draw:fill-color="#ffffff" draw:auto-grow-width="true" fo:min-height="0.632cm" fo:min-width="1.271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isha-title" style:list-style-name="L1">
      <style:graphic-properties draw:stroke="none" draw:fill="none" draw:fill-color="#ffffff" draw:textarea-vertical-align="middle" draw:auto-grow-height="false" fo:min-height="3.507cm"/>
    </style:style>
    <style:style style:name="pr2" style:family="presentation" style:parent-style-name="lisha-outline1" style:list-style-name="L4">
      <style:graphic-properties draw:stroke="none" draw:fill="none"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P3" style:family="paragraph">
      <style:paragraph-properties fo:margin-left="1.7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cm" fo:margin-right="0cm" fo:text-indent="-0.6cm"/>
    </style:style>
    <style:style style:name="P6" style:family="paragraph">
      <style:paragraph-properties fo:margin-left="3.8cm" fo:margin-right="0cm" fo:text-indent="-0.6cm"/>
    </style:style>
    <style:style style:name="P7" style:family="paragraph">
      <style:paragraph-properties fo:margin-left="4.6cm" fo:margin-right="0cm" fo:text-indent="-0.6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6.2cm" fo:margin-right="0cm" fo:text-indent="-0.6cm"/>
    </style:style>
    <style:style style:name="P10" style:family="paragraph">
      <style:paragraph-properties fo:margin-left="7cm" fo:margin-right="0cm" fo:text-indent="-0.6cm"/>
    </style:style>
    <style:style style:name="P11" style:family="paragraph">
      <style:paragraph-properties fo:margin-left="7.8cm" fo:margin-right="0cm" fo:text-indent="-0.6cm"/>
    </style:style>
    <style:style style:name="P12" style:family="paragraph"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P13" style:family="paragraph">
      <style:paragraph-properties fo:margin-left="0cm" fo:margin-right="0cm" fo:text-indent="0cm"/>
      <style:text-properties fo:font-family="'Bitstream Vera Sans'" style:font-family-generic="swiss" style:font-pitch="variable" fo:font-size="12pt" fo:font-weight="normal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fo:font-family="'Bitstream Vera Sans'" style:font-family-generic="swiss" style:font-pitch="variable" fo:font-size="12pt" fo:font-style="normal" fo:text-shadow="none" style:text-underline-style="none" fo:font-weight="normal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/>
    </style:style>
    <style:style style:name="P18" style:family="paragraph">
      <style:paragraph-properties fo:text-align="center"/>
    </style:style>
    <style:style style:name="T1" style:family="text">
      <style:text-properties fo:font-family="'Bitstream Vera Sans'" style:font-family-generic="swiss" style:font-pitch="variable" fo:font-size="12pt" fo:font-weight="normal"/>
    </style:style>
    <style:style style:name="T2" style:family="text">
      <style:text-properties fo:font-family="'Bitstream Vera Sans'" style:font-family-generic="swiss" style:font-pitch="variable" fo:font-size="1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" style:page-layout-name="PM1" draw:style-name="dp1">
      <draw:frame presentation:style-name="pr1" draw:text-style-name="P2" draw:layer="backgroundobjects" svg:width="24.401cm" svg:height="3.5cm" svg:x="0.999cm" svg:y="0.4cm" presentation:class="title">
        <draw:text-box>
          <text:p text:style-name="P1">Click to edit the title text format</text:p>
        </draw:text-box>
      </draw:frame>
      <draw:frame presentation:style-name="pr2" draw:text-style-name="P12" draw:layer="backgroundobjects" svg:width="26cm" svg:height="16.19cm" svg:x="1cm" svg:y="3.81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layer="backgroundobjects" svg:width="0.002cm" svg:height="1.275cm" svg:x="0cm" svg:y="6.762cm">
        <draw:text-box>
          <text:p text:style-name="P1"/>
        </draw:text-box>
      </draw:frame>
      <draw:frame draw:style-name="gr2" draw:text-style-name="P13" draw:layer="backgroundobjects" svg:width="3.478cm" svg:height="0.632cm" svg:x="0.238cm" svg:y="20.267cm">
        <draw:text-box>
          <text:p text:style-name="P1"><text:span text:style-name="T1">IESS 2007</text:span></text:p>
        </draw:text-box>
      </draw:frame>
      <draw:frame draw:style-name="gr3" draw:text-style-name="P15" draw:layer="backgroundobjects" svg:width="10.818cm" svg:height="0.632cm" svg:x="9.447cm" svg:y="20.267cm">
        <draw:text-box>
          <text:p text:style-name="P14"><text:span text:style-name="T2">Antônio Augusto Fröhlich (http://www.lisha.ufsc.br)</text:span></text:p>
        </draw:text-box>
      </draw:frame>
      <draw:frame draw:style-name="gr4" draw:text-style-name="P17" draw:layer="backgroundobjects" svg:width="2.373cm" svg:height="0.632cm" svg:x="25.546cm" svg:y="20.267cm">
        <draw:text-box>
          <text:p text:style-name="P16"><text:span text:style-name="T2"><text:page-number>&lt;number&gt;</text:page-number></text:span></text:p>
        </draw:text-box>
      </draw:frame>
      <draw:frame draw:style-name="gr5" draw:text-style-name="P18" draw:layer="backgroundobjects" svg:width="2cm" svg:height="1.69cm" svg:x="25.5cm" svg:y="0.5cm">
        <draw:image xlink:href="Pictures/100000000000006800000046AC2F70EE.png" xlink:type="simple" xlink:show="embed" xlink:actuate="onLoad">
          <text:p text:style-name="P1"/>
        </draw:image>
      </draw:frame>
      <presentation:notes style:page-layout-name="PM2">
        <draw:page-thumbnail presentation:style-name="lisha-title" draw:layer="backgroundobjects" svg:width="12.716cm" svg:height="9.537cm" svg:x="4.435cm" svg:y="2.79cm" presentation:class="page"/>
        <draw:frame presentation:style-name="lisha-notes" draw:layer="backgroundobjects" svg:width="15.02cm" svg:height="10.587cm" svg:x="3.291cm" svg:y="13.25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lucas</meta:initial-creator>
    <meta:creation-date>2007-05-07T11:23:43</meta:creation-date>
    <dc:creator>Antônio Augusto Fröhlich</dc:creator>
    <dc:date>2007-05-21T14:01:47</dc:date>
    <dc:language>en-US</dc:language>
    <meta:editing-cycles>43</meta:editing-cycles>
    <meta:editing-duration>PT5H29M53S</meta:editing-duration>
    <meta:user-defined meta:name="Info 1"/>
    <meta:user-defined meta:name="Info 2"/>
    <meta:user-defined meta:name="Info 3"/>
    <meta:user-defined meta:name="Info 4"/>
    <meta:document-statistic meta:object-count="3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family-generic-asian="system" style:font-pitch-asian="variable" style:font-size-asian="16.1000003814697pt" style:font-family-complex="Tahoma" style:font-family-generic-complex="system" style:font-pitch-complex="variable" style:font-size-complex="16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 draw:fill-image-width="0cm" draw:fill-image-height="0cm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 draw:fill-image-width="0cm" draw:fill-image-height="0cm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1.501cm" svg:height="12.695cm" chart:class="chart:bar" chart:style-name="ch1">
        <chart:legend chart:legend-position="end" svg:x="9.282cm" svg:y="5.699cm" chart:style-name="ch2"/>
        <chart:plot-area chart:style-name="ch3" table:cell-range-address="Sheet1.$A$1:.$D$8" chart:data-source-has-labels="both" chart:table-number-list="0" svg:x="0.23cm" svg:y="0.472cm" svg:width="8.593cm" svg:height="11.971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>
            <chart:title svg:x="0.23cm" svg:y="8.114cm" chart:style-name="ch6">
              <text:p>Footprint (bytes)</text:p>
            </chart:title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S</text:p>
              </table:table-cell>
              <table:table-cell office:value-type="string">
                <text:p>TinyOS</text:p>
              </table:table-cell>
            </table:table-row>
          </table:table-header-rows>
          <table:table-rows>
            <table:table-row>
              <table:table-cell office:value-type="string">
                <text:p>Code</text:p>
              </table:table-cell>
              <table:table-cell office:value-type="float" office:value="3888">
                <text:p>3888</text:p>
              </table:table-cell>
              <table:table-cell office:value-type="float" office:value="8562">
                <text:p>856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family-generic-asian="system" style:font-pitch-asian="variable" style:font-size-asian="16.1000003814697pt" style:font-family-complex="Tahoma" style:font-family-generic-complex="system" style:font-pitch-complex="variable" style:font-size-complex="16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 draw:fill-image-width="0cm" draw:fill-image-height="0cm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 draw:fill-image-width="0cm" draw:fill-image-height="0cm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1.501cm" svg:height="12.695cm" chart:class="chart:bar" chart:style-name="ch1">
        <chart:legend chart:legend-position="end" svg:x="9.282cm" svg:y="5.699cm" chart:style-name="ch2"/>
        <chart:plot-area chart:style-name="ch3" table:cell-range-address="Sheet1.$A$1:.$D$8" chart:data-source-has-labels="both" chart:table-number-list="0" svg:x="0.23cm" svg:y="0.472cm" svg:width="8.593cm" svg:height="11.971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>
            <chart:title svg:x="0.23cm" svg:y="8.118cm" chart:style-name="ch6">
              <text:p>Footprint (bytes)</text:p>
            </chart:title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S</text:p>
              </table:table-cell>
              <table:table-cell office:value-type="string">
                <text:p>TinyOS</text:p>
              </table:table-cell>
            </table:table-row>
          </table:table-header-rows>
          <table:table-rows>
            <table:table-row>
              <table:table-cell office:value-type="string">
                <text:p>Data</text:p>
              </table:table-cell>
              <table:table-cell office:value-type="float" office:value="108">
                <text:p>108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44cm"/>
    </style:style>
    <style:style style:name="co2" style:family="table-column">
      <style:table-column-properties fo:break-before="auto" style:column-width="9.18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Sans L" fo:font-size="20pt" fo:font-weight="bold"/>
    </style:style>
    <style:style style:name="ce2" style:family="table-cell" style:parent-style-name="Default">
      <style:table-cell-properties fo:border="0.002cm solid #000000"/>
      <style:text-properties style:font-name="Nimbus Sans L" fo:font-size="20pt"/>
    </style:style>
    <style:style style:name="ce3" style:family="table-cell" style:parent-style-name="Default">
      <style:text-properties style:font-name="Nimbus Sans L" fo:font-size="20pt"/>
    </style:style>
    <style:style style:name="ce4" style:family="table-cell" style:parent-style-name="Default" style:data-style-name="N11">
      <style:table-cell-properties style:text-align-source="fix" style:repeat-content="false" fo:border="0.002cm solid #000000"/>
      <style:paragraph-properties fo:text-align="start" fo:margin-left="0cm"/>
      <style:text-properties style:font-name="Nimbus Sans L" fo:font-size="20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 fo:font-size="20pt"/>
    </style:style>
    <style:style style:name="ce6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  <style:text-properties style:font-name="Nimbus Sans L" fo:font-size="2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2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number-columns-repeated="253" table:default-cell-style-name="ce3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uty Cycle</text:p>
          </table:table-cell>
          <table:table-cell table:style-name="ce4" office:value-type="percentage" office:value="1">
            <text:p>100,00%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X Power</text:p>
          </table:table-cell>
          <table:table-cell table:style-name="ce5" office:value-type="string">
            <text:p>5 dBm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odulation</text:p>
          </table:table-cell>
          <table:table-cell table:style-name="ce5" office:value-type="string">
            <text:p>19.2 kbps, Manchester enc.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X Backoff</text:p>
          </table:table-cell>
          <table:table-cell table:style-name="ce5" office:value-type="string">
            <text:p>0 m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ollision detection</text:p>
          </table:table-cell>
          <table:table-cell table:style-name="ce5" office:value-type="string">
            <text:p>Non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ollision handling</text:p>
          </table:table-cell>
          <table:table-cell table:style-name="ce5" office:value-type="string">
            <text:p>Non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ax. data rate (theoretical)</text:p>
          </table:table-cell>
          <table:table-cell table:style-name="ce6" office:value-type="string">
            <text:p>16.4 kbps</text:p>
          </table:table-cell>
          <table:table-cell table:number-columns-repeated="253"/>
        </table:table-row>
        <table:table-row table:style-name="ro1" table:number-rows-repeated="65527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1">21/05/2007</text:date>, <text:time>11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7.7999992370605pt" style:font-family-asian="'Lucida Sans Unicode'" style:font-family-generic-asian="system" style:font-pitch-asian="variable" style:font-size-asian="27.7999992370605pt" style:font-family-complex="Tahoma" style:font-family-generic-complex="system" style:font-pitch-complex="variable" style:font-size-complex="27.799999237060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999992370605pt" style:font-family-asian="'Lucida Sans Unicode'" style:font-family-generic-asian="system" style:font-pitch-asian="variable" style:font-size-asian="19.2999992370605pt" style:font-family-complex="Tahoma" style:font-family-generic-complex="system" style:font-pitch-complex="variable" style:font-size-complex="19.2999992370605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99ff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10" style:family="chart">
      <style:graphic-properties draw:stroke="none" draw:fill="none" draw:fill-color="#ffffff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26.001cm" svg:height="15cm" chart:class="chart:bar" chart:style-name="ch1">
        <chart:title svg:x="10.324cm" svg:y="0.3cm" chart:style-name="ch2">
          <text:p>Packet Loss</text:p>
        </chart:title>
        <chart:legend chart:legend-position="end" svg:x="23.082cm" svg:y="6.615cm" chart:style-name="ch3"/>
        <chart:plot-area chart:style-name="ch4" svg:x="0.52cm" svg:y="2.356cm" svg:width="21.523cm" svg:height="12.344cm">
          <chart:axis chart:dimension="x" chart:name="primary-x" chart:style-name="ch5">
            <chart:title svg:x="11.593cm" svg:y="13.689cm" chart:style-name="ch6">
              <text:p>Nodes</text:p>
            </chart:title>
            <chart:categories table:cell-range-address="local-table.A2:.A4"/>
          </chart:axis>
          <chart:axis chart:dimension="y" chart:name="primary-y" chart:style-name="ch7">
            <chart:title svg:x="0.52cm" svg:y="8.745cm" chart:style-name="ch6">
              <text:p>Loss (%)</text:p>
            </chart:title>
          </chart:axis>
          <chart:series chart:values-cell-range-address="local-table.B2:.B4" chart:label-cell-address="local-table.B1" chart:style-name="ch8">
            <chart:data-point chart:repeated="3"/>
          </chart:series>
          <chart:series chart:values-cell-range-address="local-table.C2:.C4" chart:label-cell-address="local-table.C1"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S</text:p>
              </table:table-cell>
              <table:table-cell office:value-type="string">
                <text:p>Tiny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7.7999992370605pt" style:font-family-asian="'Lucida Sans Unicode'" style:font-family-generic-asian="system" style:font-pitch-asian="variable" style:font-size-asian="27.7999992370605pt" style:font-family-complex="Tahoma" style:font-family-generic-complex="system" style:font-pitch-complex="variable" style:font-size-complex="27.799999237060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999992370605pt" style:font-family-asian="'Lucida Sans Unicode'" style:font-family-generic-asian="system" style:font-pitch-asian="variable" style:font-size-asian="19.2999992370605pt" style:font-family-complex="Tahoma" style:font-family-generic-complex="system" style:font-pitch-complex="variable" style:font-size-complex="19.2999992370605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25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99ff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10" style:family="chart">
      <style:graphic-properties draw:stroke="none" draw:fill="none" draw:fill-color="#ffffff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26.001cm" svg:height="15cm" chart:class="chart:bar" chart:style-name="ch1">
        <chart:title svg:x="10.488cm" svg:y="0.3cm" chart:style-name="ch2">
          <text:p>Throughput</text:p>
        </chart:title>
        <chart:legend chart:legend-position="end" svg:x="23.082cm" svg:y="6.615cm" chart:style-name="ch3"/>
        <chart:plot-area chart:style-name="ch4" svg:x="0.52cm" svg:y="2.356cm" svg:width="21.523cm" svg:height="12.344cm">
          <chart:axis chart:dimension="x" chart:name="primary-x" chart:style-name="ch5">
            <chart:title svg:x="11.855cm" svg:y="13.689cm" chart:style-name="ch6">
              <text:p>Nodes</text:p>
            </chart:title>
            <chart:categories table:cell-range-address="local-table.A2:.A4"/>
          </chart:axis>
          <chart:axis chart:dimension="y" chart:name="primary-y" chart:style-name="ch7">
            <chart:title svg:x="0.52cm" svg:y="10.007cm" chart:style-name="ch6">
              <text:p>Throughput (bps)</text:p>
            </chart:title>
          </chart:axis>
          <chart:series chart:values-cell-range-address="local-table.B2:.B4" chart:label-cell-address="local-table.B1" chart:style-name="ch8">
            <chart:data-point chart:repeated="3"/>
          </chart:series>
          <chart:series chart:values-cell-range-address="local-table.C2:.C4" chart:label-cell-address="local-table.C1"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S</text:p>
              </table:table-cell>
              <table:table-cell office:value-type="string">
                <text:p>Tiny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0">
                <text:p>12100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00">
                <text:p>1110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0">
                <text:p>10200</text:p>
              </table:table-cell>
              <table:table-cell office:value-type="float" office:value="9100">
                <text:p>910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