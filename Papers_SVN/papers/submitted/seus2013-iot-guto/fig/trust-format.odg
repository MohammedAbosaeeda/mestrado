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3cm" draw:marker-end-width="0.353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family="'Liberation Sans'" style:font-style-name="Regular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3.81cm" svg:height="1.905cm" svg:x="3.54cm" svg:y="21.32cm">
            <text:p text:style-name="P1">C-MAC</text:p>
            <text:p text:style-name="P1">Head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1cm" svg:height="1.905cm" svg:x="7.35cm" svg:y="21.32cm">
            <text:p text:style-name="P1">IP</text:p>
            <text:p text:style-name="P1">Head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1cm" svg:height="1.905cm" svg:x="11.16cm" svg:y="21.32cm">
            <text:p text:style-name="P1">TCP</text:p>
            <text:p text:style-name="P1">Head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1cm" svg:height="1.905cm" svg:x="14.97cm" svg:y="21.32cm">
            <text:p text:style-name="P1">Dat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1cm" svg:height="1.905cm" svg:x="18.78cm" svg:y="21.32cm">
            <text:p text:style-name="P1">Tim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1cm" svg:height="1.905cm" svg:x="22.59cm" svg:y="21.32cm">
            <text:p text:style-name="P1">MAC</text:p>
            <draw:enhanced-geometry svg:viewBox="0 0 21600 21600" draw:type="rectangle" draw:enhanced-path="M 0 0 L 21600 0 21600 21600 0 21600 0 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1-11T18:07:33</meta:creation-date>
    <dc:date>2011-12-12T21:42:56</dc:date>
    <meta:editing-duration>P1DT53M12S</meta:editing-duration>
    <meta:editing-cycles>26</meta:editing-cycles>
    <meta:generator>LibreOffice/3.4$Linux LibreOffice_project/340m1$Build-402</meta:generator>
    <dc:creator>Antônio Augusto Fröhlich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