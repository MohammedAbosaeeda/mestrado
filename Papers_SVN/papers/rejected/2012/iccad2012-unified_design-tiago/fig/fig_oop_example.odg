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cm" draw:marker-start="Arrowheads_20_3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draw:marker-start-width="0.275cm" draw:marker-end="Arrowheads_20_1" draw:marker-end-width="0.38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dash" draw:stroke-dash="Ultrafine_20_Dashed" svg:stroke-width="0.05cm" svg:stroke-color="#000000" draw:marker-start-width="0.275cm" draw:marker-end-width="0.275cm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5" style:family="graphic" style:parent-style-name="standard">
      <style:graphic-properties draw:stroke="dash" draw:stroke-dash="Ultrafine_20_Dashed" svg:stroke-width="0.05cm" draw:marker-start-width="0.275cm" draw:marker-end="" draw:marker-end-width="0.375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Helvetica" style:font-family-generic="swiss" fo:font-size="10pt" style:font-size-asian="10pt" style:font-size-complex="10pt"/>
    </style:style>
    <style:style style:name="P3" style:family="paragraph">
      <style:text-properties fo:font-family="Helvetica" style:font-family-generic="swiss" fo:font-size="8pt" style:font-size-asian="8pt" style:font-size-complex="8pt"/>
    </style:style>
    <style:style style:name="T1" style:family="text">
      <style:text-properties fo:font-family="Helvetica" style:font-family-generic="swiss" fo:font-size="10pt" style:font-size-asian="10pt" style:font-size-complex="10pt"/>
    </style:style>
    <style:style style:name="T2" style:family="text">
      <style:text-properties fo:font-family="Helvetica" style:font-family-generic="swiss"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1" draw:layer="layout" svg:width="1.402cm" svg:height="0.914cm" svg:x="17.014cm" svg:y="8.87cm">
          <text:p text:style-name="P1"><text:span text:style-name="T1">C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2" draw:layer="layout" svg:width="1.4cm" svg:height="0.9cm" svg:x="17.015cm" svg:y="7.036cm">
          <text:p text:style-name="P1"><text:span text:style-name="T1">C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3" draw:layer="layout" svg:width="1.4cm" svg:height="0.9cm" svg:x="20.25cm" svg:y="7.036cm">
          <text:p text:style-name="P1"><text:span text:style-name="T1">C3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7.715cm" svg:y1="8.87cm" svg:x2="17.715cm" svg:y2="7.936cm" draw:start-shape="id1" draw:start-glue-point="0" draw:end-shape="id2" draw:end-glue-point="2" svg:d="m17715 8870v-934">
          <text:p/>
        </draw:connector>
        <draw:connector draw:style-name="gr3" draw:text-style-name="P1" draw:layer="layout" svg:x1="18.415cm" svg:y1="7.486cm" svg:x2="20.25cm" svg:y2="7.486cm" draw:start-shape="id2" draw:start-glue-point="1" draw:end-shape="id3" draw:end-glue-point="3" svg:d="m18415 7486h1835">
          <text:p/>
        </draw:connector>
        <draw:frame draw:style-name="gr4" draw:text-style-name="P3" draw:id="id4" draw:layer="layout" svg:width="3.418cm" svg:height="4.929cm" svg:x="19.579cm" svg:y="8.414cm">
          <draw:text-box>
            <text:p><text:span text:style-name="T2">class C1 {</text:span></text:p>
            <text:p><text:span text:style-name="T2"><text:s text:c="4"/>…</text:span></text:p>
            <text:p><text:span text:style-name="T2"><text:s text:c="4"/></text:span><text:span text:style-name="T2">C2 c2;</text:span></text:p>
            <text:p><text:span text:style-name="T2"><text:s text:c="4"/>…</text:span></text:p>
            <text:p><text:span text:style-name="T2"><text:s text:c="4"/></text:span><text:span text:style-name="T2">void c1_operation(){</text:span></text:p>
            <text:p><text:span text:style-name="T2"><text:s text:c="8"/>…</text:span></text:p>
            <text:p><text:span text:style-name="T2"><text:s text:c="8"/></text:span><text:span text:style-name="T2">c2.operation0(...);</text:span></text:p>
            <text:p><text:span text:style-name="T2"><text:s text:c="8"/>…</text:span></text:p>
            <text:p><text:span text:style-name="T2"><text:s text:c="8"/></text:span><text:span text:style-name="T2">c2.operation1(...);</text:span></text:p>
            <text:p><text:span text:style-name="T2"><text:s text:c="8"/></text:span><text:span text:style-name="T2">...</text:span></text:p>
            <text:p><text:span text:style-name="T2"><text:s text:c="4"/></text:span><text:span text:style-name="T2">}</text:span></text:p>
            <text:p><text:span text:style-name="T2"><text:s text:c="4"/></text:span><text:span text:style-name="T2">...</text:span><text:span text:style-name="T2"><text:tab/></text:span></text:p>
            <text:p><text:span text:style-name="T2">};</text:span></text:p>
          </draw:text-box>
        </draw:frame>
        <draw:connector draw:style-name="gr5" draw:text-style-name="P1" draw:layer="layout" svg:x1="18.416cm" svg:y1="9.327cm" svg:x2="19.579cm" svg:y2="10.878cm" draw:start-shape="id1" draw:start-glue-point="1" draw:end-shape="id4" draw:end-glue-point="3" svg:d="m18416 9327h582v1551h58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Arrowheads_20_1" draw:display-name="Arrowheads 1" svg:viewBox="0 0 1357 1440" svg:d="m703 300-500 1001h1001zm-1204 139 703-1440v0l654 1440z"/>
    <draw:marker draw:name="Arrowheads_20_3" draw:display-name="Arrowheads 3" svg:viewBox="0 0 1241 2356" svg:d="m617 180-500 1000 500 1001 501-1001zm-511-1180 634 1188-634 1168-607-117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Tiago Mück</meta:initial-creator>
    <meta:creation-date>2011-01-28T14:48:19</meta:creation-date>
    <dc:date>2012-04-14T17:27:46</dc:date>
    <meta:editing-duration>PT05H03M43S</meta:editing-duration>
    <meta:editing-cycles>59</meta:editing-cycles>
    <meta:generator>OpenOffice.org/3.1$Unix OpenOffice.org_project/310m19$Build-9420</meta:generator>
    <meta:print-date>2011-08-20T15:00:02</meta:print-date>
    <dc:creator>Tiago Mück</dc:creator>
    <meta:document-statistic meta:object-count="7"/>
    <meta:user-defined meta:name="Info 1"/>
    <meta:user-defined meta:name="Info 2"/>
    <meta:user-defined meta:name="Info 3"/>
    <meta:user-defined meta:name="Info 4"/>
  </office:meta>
</office:document-meta>
</file>