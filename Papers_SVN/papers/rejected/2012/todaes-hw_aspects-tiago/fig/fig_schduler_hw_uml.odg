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none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2cm" draw:marker-start="StrokedDiamond" draw:marker-start-width="0.23cm" draw:marker-end="Line_20_Arrow" draw:marker-end-width="0.23cm" draw:textarea-horizontal-align="center" draw:textarea-vertical-align="bottom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2.143cm" svg:y="-5.065cm"/>
          <draw:glue-point draw:id="5" svg:x="-2.14cm" svg:y="-5.065cm"/>
          <draw:custom-shape draw:style-name="gr1" draw:text-style-name="P2" draw:layer="layout" svg:width="5.972cm" svg:height="2.865cm" svg:x="24.015cm" svg:y="13.776cm">
            <text:p text:style-name="P1"><text:span text:style-name="T1">+command_in : sc_in&lt;sc_bv&lt;4&gt;&gt;</text:span></text:p>
            <text:p text:style-name="P1"><text:span text:style-name="T1">+priority_in : sc_in&lt;sc_bv&lt;16&gt;&gt;</text:span></text:p>
            <text:p text:style-name="P1"><text:span text:style-name="T1">+parameter_in : sc_in&lt;sc_bv&lt;32&gt;&gt;</text:span></text:p>
            <text:p text:style-name="P1"><text:span text:style-name="T1">+return_out : sc_out&lt;sc_bv&lt;32&gt;&gt;</text:span></text:p>
            <text:p text:style-name="P1"><text:span text:style-name="T1">+status_out : sc_out&lt;sc_bv&lt;6&gt;&gt;</text:span></text:p>
            <text:p text:style-name="P1"><text:span text:style-name="T1">+interrupt_out : sc_out&lt;sc_bv&lt;1&gt;&gt;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5.972cm" svg:height="0.635cm" svg:x="24.015cm" svg:y="13.141cm">
            <text:p text:style-name="P3"><text:span text:style-name="T2">Schedu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6.002cm" svg:height="0.381cm" svg:x="24cm" svg:y="16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glue-point draw:id="4" svg:x="-1.019cm" svg:y="4.99cm"/>
          <draw:glue-point draw:id="5" svg:x="3.168cm" svg:y="1.937cm"/>
          <draw:glue-point draw:id="6" svg:x="2.326cm" svg:y="1.208cm"/>
          <draw:custom-shape draw:style-name="gr1" draw:text-style-name="P4" draw:layer="layout" svg:width="2.984cm" svg:height="0.635cm" svg:x="26.809cm" svg:y="7.1cm">
            <text:p text:style-name="P3"><text:span text:style-name="T2">Ordered_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984cm" svg:height="0.382cm" svg:x="26.809cm" svg:y="7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998cm" svg:height="3.983cm" svg:x="26.802cm" svg:y="8.117cm">
            <text:p text:style-name="P1"><text:span text:style-name="T3">+ allocate()</text:span></text:p>
            <text:p text:style-name="P1"><text:span text:style-name="T1">+ deallocate()</text:span></text:p>
            <text:p text:style-name="P1"><text:span text:style-name="T1">+ insert()</text:span></text:p>
            <text:p text:style-name="P1"><text:span text:style-name="T1">+ remove()</text:span></text:p>
            <text:p text:style-name="P1"><text:span text:style-name="T1">+ remove_head()</text:span></text:p>
            <text:p text:style-name="P1"><text:span text:style-name="T1">+ get_idx()</text:span></text:p>
            <text:p text:style-name="P1"><text:span text:style-name="T1">+ search_idx()</text:span></text:p>
            <text:p text:style-name="P1"><text:span text:style-name="T1">+ get_object()</text:span></text:p>
            <draw:enhanced-geometry svg:viewBox="0 0 21600 21600" draw:type="rectangle" draw:enhanced-path="M 0 0 L 21600 0 21600 21600 0 21600 0 0 Z N"/>
          </draw:custom-shape>
        </draw:g>
        <draw:g draw:id="id3">
          <draw:custom-shape draw:style-name="gr5" draw:text-style-name="P4" draw:layer="layout" svg:width="1.94cm" svg:height="0.635cm" svg:x="24.008cm" svg:y="8.9cm">
            <text:p text:style-name="P3"><text:span text:style-name="T2">sc_modul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94cm" svg:height="0.381cm" svg:x="24.003cm" svg:y="9.5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94cm" svg:height="0.381cm" svg:x="24cm" svg:y="9.916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7" draw:layer="layout" draw:type="line" svg:x1="28.287cm" svg:y1="13.141cm" svg:x2="28.301cm" svg:y2="12.1cm" draw:start-shape="id1" draw:start-glue-point="4" draw:end-shape="id2" draw:end-glue-point="2" svg:d="m28287 13141 14-1041">
          <text:p/>
        </draw:connector>
        <draw:connector draw:style-name="gr8" draw:text-style-name="P7" draw:layer="layout" svg:x1="24.974cm" svg:y1="10.297cm" svg:x2="25.717cm" svg:y2="13.141cm" draw:start-shape="id3" draw:start-glue-point="2" draw:end-shape="id1" draw:end-glue-point="5" svg:d="m24974 10297v1421h743v1423">
          <text:p/>
        </draw:connector>
        <draw:connector draw:style-name="gr8" draw:text-style-name="P7" draw:layer="layout" svg:x1="25.948cm" svg:y1="9.598cm" svg:x2="26.802cm" svg:y2="9.6cm" draw:start-shape="id3" draw:start-glue-point="1" draw:end-shape="id2" draw:end-glue-point="3" svg:d="m25948 9598h427v2h4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Diamond" svg:viewBox="0 0 100 200" svg:d="m50 0 50 100-50 100-50-100 50-100v4l46 96-46 96-46-96 46-96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8-16T20:19:01</dc:date>
    <meta:editing-duration>PT02H49M07S</meta:editing-duration>
    <meta:editing-cycles>29</meta:editing-cycles>
    <meta:generator>OpenOffice.org/3.0$Linux OpenOffice.org_project/300m15$Build-9379</meta:generator>
    <meta:document-statistic meta:object-count="15"/>
  </office:meta>
</office:document-meta>
</file>