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7" style:family="table-column">
      <style:table-column-properties fo:break-before="auto" style:column-width="2.1102in"/>
    </style:style>
    <style:style style:name="co18" style:family="table-column">
      <style:table-column-properties fo:break-before="auto" style:column-width="1.7972in"/>
    </style:style>
    <style:style style:name="co19" style:family="table-column">
      <style:table-column-properties fo:break-before="auto" style:column-width="2.5181in"/>
    </style:style>
    <style:style style:name="co22" style:family="table-column">
      <style:table-column-properties fo:break-before="auto" style:column-width="1.1244in"/>
    </style:style>
    <style:style style:name="co24" style:family="table-column">
      <style:table-column-properties fo:break-before="auto" style:column-width="1.0945in"/>
    </style:style>
    <style:style style:name="co25" style:family="table-column">
      <style:table-column-properties fo:break-before="auto" style:column-width="1.0646in"/>
    </style:style>
    <style:style style:name="co26" style:family="table-column">
      <style:table-column-properties fo:break-before="auto" style:column-width="1.2591in"/>
    </style:style>
    <style:style style:name="co27" style:family="table-column">
      <style:table-column-properties fo:break-before="auto" style:column-width="1.3555in"/>
    </style:style>
    <style:style style:name="co28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3126in"/>
    </style:style>
    <style:style style:name="co38" style:family="table-column">
      <style:table-column-properties fo:break-before="auto" style:column-width="1.7327in"/>
    </style:style>
    <style:style style:name="co39" style:family="table-column">
      <style:table-column-properties fo:break-before="auto" style:column-width="1.302in"/>
    </style:style>
    <style:style style:name="co40" style:family="table-column">
      <style:table-column-properties fo:break-before="auto" style:column-width="2.2598in"/>
    </style:style>
    <style:style style:name="co14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681in"/>
    </style:style>
    <style:style style:name="co20" style:family="table-column">
      <style:table-column-properties fo:break-before="auto" style:column-width="1.8291in"/>
    </style:style>
    <style:style style:name="co29" style:family="table-column">
      <style:table-column-properties fo:break-before="auto" style:column-width="2.1736in"/>
    </style:style>
    <style:style style:name="co30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4535in"/>
    </style:style>
    <style:style style:name="co31" style:family="table-column">
      <style:table-column-properties fo:break-before="auto" style:column-width="2.2165in"/>
    </style:style>
    <style:style style:name="co32" style:family="table-column">
      <style:table-column-properties fo:break-before="auto" style:column-width="2.1091in"/>
    </style:style>
    <style:style style:name="co33" style:family="table-column">
      <style:table-column-properties fo:break-before="auto" style:column-width="1.3339in"/>
    </style:style>
    <style:style style:name="co34" style:family="table-column">
      <style:table-column-properties fo:break-before="auto" style:column-width="1.9366in"/>
    </style:style>
    <style:style style:name="co35" style:family="table-column">
      <style:table-column-properties fo:break-before="auto" style:column-width="1.9154in"/>
    </style:style>
    <style:style style:name="co36" style:family="table-column">
      <style:table-column-properties fo:break-before="auto" style:column-width="1.7756in"/>
    </style:style>
    <style:style style:name="co37" style:family="table-column">
      <style:table-column-properties fo:break-before="auto" style:column-width="1.7862in"/>
    </style:style>
    <style:style style:name="co42" style:family="table-column">
      <style:table-column-properties fo:break-before="auto" style:column-width="2.3992in"/>
    </style:style>
    <style:style style:name="co43" style:family="table-column">
      <style:table-column-properties fo:break-before="auto" style:column-width="2.2709in"/>
    </style:style>
    <style:style style:name="co44" style:family="table-column">
      <style:table-column-properties fo:break-before="auto" style:column-width="2.3134in"/>
    </style:style>
    <style:style style:name="co45" style:family="table-column">
      <style:table-column-properties fo:break-before="auto" style:column-width="2.9484in"/>
    </style:style>
    <style:style style:name="co46" style:family="table-column">
      <style:table-column-properties fo:break-before="auto" style:column-width="0.3866in"/>
    </style:style>
    <style:style style:name="co47" style:family="table-column">
      <style:table-column-properties fo:break-before="auto" style:column-width="2.0339in"/>
    </style:style>
    <style:style style:name="co48" style:family="table-column">
      <style:table-column-properties fo:break-before="auto" style:column-width="0.4193in"/>
    </style:style>
    <style:style style:name="co49" style:family="table-column">
      <style:table-column-properties fo:break-before="auto" style:column-width="0.4409in"/>
    </style:style>
    <style:style style:name="co50" style:family="table-column">
      <style:table-column-properties fo:break-before="auto" style:column-width="1.0972in"/>
    </style:style>
    <style:style style:name="co51" style:family="table-column">
      <style:table-column-properties fo:break-before="auto" style:column-width="1.6035in"/>
    </style:style>
    <style:style style:name="co52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 style:data-style-name="N100"/>
    <style:style style:name="ce81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118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8">
      <style:table-cell-properties fo:background-color="#ccccff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8">
      <style:table-cell-properties fo:background-color="#ccffff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18">
      <style:table-cell-properties fo:background-color="#aecf0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ffcc99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2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1" style:family="table-cell" style:parent-style-name="Default" style:data-style-name="N118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6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23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center" fo:margin-left="0in"/>
    </style:style>
    <style:style style:name="ce39" style:family="table-cell" style:parent-style-name="Default" style:data-style-name="N123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42" style:family="table-cell" style:parent-style-name="Default" style:data-style-name="N123">
      <style:table-cell-properties fo:background-color="#ffcc99"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23">
      <style:table-cell-properties fo:background-color="#ccccff"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23">
      <style:table-cell-properties fo:background-color="#ccffff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3">
      <style:table-cell-properties fo:background-color="#aecf00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/>
    </style:style>
    <style:style style:name="ce49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50" style:family="table-cell" style:parent-style-name="Default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51" style:family="table-cell" style:parent-style-name="Default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Liberation Sans" style:font-name-asian="DejaVu Sans" style:font-name-complex="DejaVu Sans"/>
    </style:style>
    <style:style style:name="ce52" style:family="table-cell" style:parent-style-name="Default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Liberation Sans" style:font-name-asian="DejaVu Sans" style:font-name-complex="DejaVu Sans"/>
    </style:style>
    <style:style style:name="ce53" style:family="table-cell" style:parent-style-name="Default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54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5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style:use-window-font-color="true"/>
    </style:style>
    <style:style style:name="ce5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57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use-window-font-color="true" style:font-name="Liberation Sans" style:font-name-asian="DejaVu Sans" style:font-name-complex="DejaVu Sans"/>
    </style:style>
    <style:style style:name="ce58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59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use-window-font-color="true" style:font-name="Liberation Sans" style:font-name-asian="DejaVu Sans" style:font-name-complex="DejaVu Sans"/>
    </style:style>
    <style:style style:name="ce60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61" style:family="table-cell" style:parent-style-name="Default" style:data-style-name="N123">
      <style:table-cell-properties fo:background-color="#ccccff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62" style:family="table-cell" style:parent-style-name="Default" style:data-style-name="N123">
      <style:table-cell-properties fo:background-color="#ccffff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63" style:family="table-cell" style:parent-style-name="Default" style:data-style-name="N123">
      <style:table-cell-properties fo:background-color="#aecf00"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71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cc99"/>
    </style:style>
    <style:style style:name="ce75" style:family="table-cell" style:parent-style-name="Default">
      <style:table-cell-properties fo:background-color="#ff00ff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3"/>
    <style:style style:name="ce78" style:family="table-cell" style:parent-style-name="Default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/>
    </style:style>
    <style:style style:name="ce85" style:family="table-cell" style:parent-style-name="Default" style:data-style-name="N123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86" style:family="table-cell" style:parent-style-name="Default" style:data-style-name="N123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7" style:family="table-cell" style:parent-style-name="Default" style:data-style-name="N123">
      <style:table-cell-properties fo:background-color="#ccccff" style:text-align-source="fix" style:repeat-content="false"/>
      <style:paragraph-properties fo:text-align="center" fo:margin-left="0in"/>
      <style:text-properties style:use-window-font-color="true"/>
    </style:style>
    <style:style style:name="ce88" style:family="table-cell" style:parent-style-name="Default" style:data-style-name="N123">
      <style:table-cell-properties fo:background-color="#ccffff" style:text-align-source="fix" style:repeat-content="false"/>
      <style:paragraph-properties fo:text-align="center" fo:margin-left="0in"/>
      <style:text-properties style:use-window-font-color="true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center" fo:margin-left="0in"/>
      <style:text-properties fo:color="#ff0000"/>
    </style:style>
    <style:style style:name="ce90" style:family="table-cell" style:parent-style-name="Default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Liberation Sans" style:font-name-asian="DejaVu Sans" style:font-name-complex="DejaVu Sans"/>
    </style:style>
    <style:style style:name="ce91" style:family="table-cell" style:parent-style-name="Default">
      <style:table-cell-properties fo:border-bottom="none" fo:background-color="#aecf00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Liberation Sans" style:font-name-asian="DejaVu Sans" style:font-name-complex="DejaVu Sans"/>
    </style:style>
    <style:style style:name="ce9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ff0000"/>
    </style:style>
    <style:style style:name="ce9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ff0000" style:font-name="Liberation Sans" style:font-name-asian="DejaVu Sans" style:font-name-complex="DejaVu Sans"/>
    </style:style>
    <style:style style:name="ce94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color="#ff0000" style:font-name="Liberation Sans" style:font-name-asian="DejaVu Sans" style:font-name-complex="DejaVu Sans"/>
    </style:style>
    <style:style style:name="ce95" style:family="table-cell" style:parent-style-name="Default" style:data-style-name="N2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video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Default"/>
        <table:table-column table:style-name="co10" table:default-cell-style-name="Default"/>
        <table:table-column table:style-name="co38" table:default-cell-style-name="ce3"/>
        <table:table-column table:style-name="co39" table:default-cell-style-name="ce3"/>
        <table:table-column table:style-name="co40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JM:</text:p>
          </table:table-cell>
          <table:table-cell office:value-type="string">
            <text:p>JM 14.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player</text:p>
          </table:table-cell>
          <table:table-cell table:style-name="ce79" office:value-type="string">
            <text:p>MPlayer SVN-r1.0~rc3+svn20090426-4.4.3 (C) 2000-2009 MPlayer Team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number-columns-repeated="1010"/>
        </table:table-row>
        <table:table-row table:style-name="ro1">
          <table:table-cell office:value-type="string">
            <text:p>player: Mp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deos source:</text:p>
          </table:table-cell>
          <table:table-cell office:value-type="string">
            <text:p>[xiph] <text:a xlink:href="http://media.xiph.org/video/derf/">http://media.xiph.org/video/derf/</text:a></text:p>
          </table:table-cell>
          <table:table-cell office:value-type="string">
            <text:p>[eas-asu] http://trace.eas.asu.edu/yuv/index.html</text:p>
          </table:table-cell>
          <table:table-cell office:value-type="string">
            <text:p>[chroma] sftp://chroma.lisha.ufsc.br/export/media</text:p>
          </table:table-cell>
          <table:table-cell table:number-columns-repeated="1020"/>
        </table:table-row>
        <table:table-row table:style-name="ro1">
          <table:table-cell office:value-type="string">
            <text:p>Videos convertidos para i420 usando o mencod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Video</text:p>
          </table:table-cell>
          <table:table-cell table:style-name="ce2" office:value-type="string">
            <text:p>File</text:p>
          </table:table-cell>
          <table:table-cell table:style-name="ce2" office:value-type="string">
            <text:p>md5sum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Proportion</text:p>
          </table:table-cell>
          <table:table-cell table:style-name="ce2" office:value-type="string">
            <text:p>OK in player</text:p>
          </table:table-cell>
          <table:table-cell table:style-name="ce2" office:value-type="string">
            <text:p>Duration in player</text:p>
          </table:table-cell>
          <table:table-cell table:style-name="ce2" office:value-type="string">
            <text:p>Number of pictures</text:p>
          </table:table-cell>
          <table:table-cell table:style-name="ce2" office:value-type="string">
            <text:p>YUV – Format</text:p>
          </table:table-cell>
          <table:table-cell table:style-name="ce2" office:value-type="string">
            <text:p>FPS (theo)</text:p>
          </table:table-cell>
          <table:table-cell table:style-name="ce82" office:value-type="string">
            <text:p>BPP according to player</text:p>
          </table:table-cell>
          <table:table-cell table:style-name="ce2" office:value-type="string">
            <text:p>Video source</text:p>
          </table:table-cell>
          <table:table-cell table:style-name="ce1" office:value-type="string">
            <text:p>Computed Bitrate [original] (bps)</text:p>
          </table:table-cell>
          <table:table-cell table:style-name="ce1" office:value-type="string">
            <text:p>Filesize (bytes)</text:p>
          </table:table-cell>
          <table:table-cell office:value-type="string">
            <text:p>bitrate Kbps</text:p>
          </table:table-cell>
          <table:table-cell office:value-type="string">
            <text:p>bitrate Mpbs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eman QCIF</text:p>
          </table:table-cell>
          <table:table-cell table:style-name="ce3" office:value-type="string">
            <text:p>foreman_qcif.yuv</text:p>
          </table:table-cell>
          <table:table-cell table:style-name="ce3" office:value-type="string">
            <text:p>4226e0af86cea8c2562fb595e8380c13</text:p>
          </table:table-cell>
          <table:table-cell table:style-name="ce3" office:value-type="string">
            <text:p>176x144</text:p>
          </table:table-cell>
          <table:table-cell table:style-name="ce6" office:value-type="string">
            <text:p>4:3</text:p>
          </table:table-cell>
          <table:table-cell office:value-type="string">
            <text:p>yes</text:p>
          </table:table-cell>
          <table:table-cell office:value-type="string">
            <text:p>12 → round to: 10</text:p>
          </table:table-cell>
          <table:table-cell office:value-type="string">
            <text:p>301 → round to 300</text:p>
          </table:table-cell>
          <table:table-cell table:style-name="ce3" office:value-type="string">
            <text:p>I420</text:p>
          </table:table-cell>
          <table:table-cell table:style-name="ce81" office:value-type="float" office:value="30">
            <text:p>30.000</text:p>
          </table:table-cell>
          <table:table-cell office:value-type="float" office:value="12">
            <text:p>12</text:p>
          </table:table-cell>
          <table:table-cell office:value-type="string">
            <text:p>chroma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Foreman CIF</text:p>
          </table:table-cell>
          <table:table-cell table:style-name="ce3" office:value-type="string">
            <text:p>foreman_cif.yuv</text:p>
          </table:table-cell>
          <table:table-cell table:style-name="ce3" office:value-type="string">
            <text:p>9ee6c464d647ea7f968c7fc51ef1d2e9</text:p>
          </table:table-cell>
          <table:table-cell table:style-name="ce3" office:value-type="string">
            <text:p>352x288</text:p>
          </table:table-cell>
          <table:table-cell table:style-name="ce6"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12 → round to: 10</text:p>
          </table:table-cell>
          <table:table-cell office:value-type="string">
            <text:p>301 → round to 300</text:p>
          </table:table-cell>
          <table:table-cell table:style-name="ce3" office:value-type="string">
            <text:p>I420</text:p>
          </table:table-cell>
          <table:table-cell table:style-name="ce81" office:value-type="float" office:value="30">
            <text:p>30.000</text:p>
          </table:table-cell>
          <table:table-cell office:value-type="string">
            <text:p>-</text:p>
          </table:table-cell>
          <table:table-cell office:value-type="string">
            <text:p>chroma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Sunflower 1080p</text:p>
          </table:table-cell>
          <table:table-cell table:style-name="ce3" office:value-type="string">
            <text:p>sunflower_1080p.yuv</text:p>
          </table:table-cell>
          <table:table-cell table:style-name="ce3" office:value-type="string">
            <text:p>dbe1ed378e9b90c406efe9442c6c0174</text:p>
          </table:table-cell>
          <table:table-cell table:style-name="ce3" office:value-type="string">
            <text:p>1920x1080</text:p>
          </table:table-cell>
          <table:table-cell table:style-name="ce6" office:value-type="string">
            <text:p>-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string">
            <text:p>501 → round to 500</text:p>
          </table:table-cell>
          <table:table-cell table:style-name="ce3" office:value-type="string">
            <text:p>I420</text:p>
          </table:table-cell>
          <table:table-cell table:style-name="ce81" office:value-type="float" office:value="25">
            <text:p>25.000</text:p>
          </table:table-cell>
          <table:table-cell table:style-name="ce83" office:value-type="string">
            <text:p>-</text:p>
          </table:table-cell>
          <table:table-cell office:value-type="string">
            <text:p>chroma</text:p>
          </table:table-cell>
          <table:table-cell table:formula="of:=([.N13] * 8) /[.G13]" office:value-type="float" office:value="622080000">
            <text:p>622080000</text:p>
          </table:table-cell>
          <table:table-cell office:value-type="float" office:value="1555200000">
            <text:p>1555200000</text:p>
          </table:table-cell>
          <table:table-cell table:formula="of:=[.M13]/1000" office:value-type="float" office:value="622080">
            <text:p>622080</text:p>
          </table:table-cell>
          <table:table-cell table:formula="of:=[.M13]/1000000" office:value-type="float" office:value="622.08">
            <text:p>622.0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rowd Run 1080p</text:p>
          </table:table-cell>
          <table:table-cell table:style-name="ce3" office:value-type="string">
            <text:p>crowd_run_1080p.yuv</text:p>
          </table:table-cell>
          <table:table-cell office:value-type="string">
            <text:p>da34812b5b2c316d40481c7b6c841e41</text:p>
          </table:table-cell>
          <table:table-cell table:style-name="ce3" office:value-type="string">
            <text:p>1920x1080</text:p>
          </table:table-cell>
          <table:table-cell table:style-name="ce3" office:value-type="string">
            <text:p>1.78:1</text:p>
          </table:table-cell>
          <table:table-cell office:value-type="string">
            <text:p>yes</text:p>
          </table:table-cell>
          <table:table-cell office:value-type="float" office:value="10">
            <text:p>10</text:p>
          </table:table-cell>
          <table:table-cell office:value-type="string">
            <text:p>501 → round to 500</text:p>
          </table:table-cell>
          <table:table-cell table:style-name="ce3" office:value-type="string">
            <text:p>I420</text:p>
          </table:table-cell>
          <table:table-cell table:style-name="ce9" office:value-type="float" office:value="50">
            <text:p>50.000</text:p>
          </table:table-cell>
          <table:table-cell office:value-type="string">
            <text:p>-</text:p>
          </table:table-cell>
          <table:table-cell office:value-type="string">
            <text:p>chroma</text:p>
          </table:table-cell>
          <table:table-cell table:formula="of:=([.N14] * 8) /[.G14]" office:value-type="float" office:value="1244160000">
            <text:p>1244160000</text:p>
          </table:table-cell>
          <table:table-cell office:value-type="float" office:value="1555200000">
            <text:p>1555200000</text:p>
          </table:table-cell>
          <table:table-cell table:formula="of:=[.M14]/1000" office:value-type="float" office:value="1244160">
            <text:p>1244160</text:p>
          </table:table-cell>
          <table:table-cell table:formula="of:=[.M14]/1000000" office:value-type="float" office:value="1244.16">
            <text:p>1244.16</text:p>
          </table:table-cell>
          <table:table-cell table:style-name="ce3" table:number-columns-repeated="1008"/>
        </table:table-row>
        <table:table-row table:style-name="ro1">
          <table:table-cell table:style-name="ce3" table:number-columns-repeated="5"/>
          <table:table-cell table:number-columns-repeated="3"/>
          <table:table-cell table:style-name="ce80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ce3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3" table:number-columns-repeated="5"/>
          <table:table-cell table:number-columns-repeated="3"/>
          <table:table-cell table:style-name="ce80"/>
          <table:table-cell table:style-name="ce3"/>
          <table:table-cell table:number-columns-repeated="1014"/>
        </table:table-row>
        <table:table-row table:style-name="ro1">
          <table:table-cell table:style-name="ce4" office:value-type="string">
            <text:p>Not used</text:p>
          </table:table-cell>
          <table:table-cell table:style-name="ce3" table:number-columns-repeated="4"/>
          <table:table-cell table:number-columns-repeated="3"/>
          <table:table-cell table:style-name="ce80"/>
          <table:table-cell table:style-name="ce3"/>
          <table:table-cell table:number-columns-repeated="1014"/>
        </table:table-row>
        <table:table-row table:style-name="ro1">
          <table:table-cell table:style-name="ce3" office:value-type="string">
            <text:p>Tennis SIF</text:p>
          </table:table-cell>
          <table:table-cell table:style-name="ce3" office:value-type="string">
            <text:p>tennis_sif.yuv</text:p>
          </table:table-cell>
          <table:table-cell table:style-name="ce3" office:value-type="string">
            <text:p>8d7eb482bff071857caefc1df6b51e03</text:p>
          </table:table-cell>
          <table:table-cell table:style-name="ce3" office:value-type="string">
            <text:p>352x240</text:p>
          </table:table-cell>
          <table:table-cell table:style-name="ce6"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6 → round to: 5</text:p>
          </table:table-cell>
          <table:table-cell office:value-type="string">
            <text:p>151 → round to 150</text:p>
          </table:table-cell>
          <table:table-cell table:style-name="ce3" office:value-type="string">
            <text:p>I420</text:p>
          </table:table-cell>
          <table:table-cell table:style-name="ce81" office:value-type="float" office:value="30">
            <text:p>30.000</text:p>
          </table:table-cell>
          <table:table-cell office:value-type="string">
            <text:p>-</text:p>
          </table:table-cell>
          <table:table-cell office:value-type="string">
            <text:p>chroma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3" table:number-columns-repeated="4"/>
          <table:table-cell table:number-columns-repeated="4"/>
          <table:table-cell table:style-name="ce80"/>
          <table:table-cell table:number-columns-repeated="1015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/>
          <table:table-cell table:style-name="ce3"/>
          <table:table-cell table:number-columns-repeated="1014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/>
          <table:table-cell table:number-columns-repeated="1015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SD</text:p>
          </table:table-cell>
          <table:table-cell office:value-type="string">
            <text:p>Foreman (QCIF, CIF)</text:p>
          </table:table-cell>
          <table:table-cell/>
          <table:table-cell office:value-type="string">
            <text:p>SD-v2</text:p>
          </table:table-cell>
          <table:table-cell office:value-type="string">
            <text:p>Foreman QCIF</text:p>
          </table:table-cell>
        </table:table-row>
        <table:table-row table:style-name="ro1">
          <table:table-cell/>
          <table:table-cell office:value-type="string">
            <text:p>Mobile CIF</text:p>
          </table:table-cell>
          <table:table-cell table:number-columns-repeated="2"/>
          <table:table-cell office:value-type="string">
            <text:p>Mobile CIF</text:p>
          </table:table-cell>
        </table:table-row>
        <table:table-row table:style-name="ro1">
          <table:table-cell/>
          <table:table-cell office:value-type="string">
            <text:p>City 4CIF</text:p>
          </table:table-cell>
          <table:table-cell table:number-columns-repeated="2"/>
          <table:table-cell office:value-type="string">
            <text:p>City 4CIF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string">
            <text:p>Stockhol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nfl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wd ru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Mean Quality Loss (dB) by Trunc</text:p>
          </table:table-cell>
          <table:table-cell table:style-name="ce1" office:value-type="string">
            <text:p>Mean Quality Loss (dB) by Sub</text:p>
          </table:table-cell>
          <table:table-cell table:style-name="ce1" office:value-type="string">
            <text:p>Mean Quality Loss (dB) by Comb</text:p>
          </table:table-cell>
          <table:table-cell table:style-name="ce1" office:value-type="string">
            <text:p>Mean Quality Loss (dB) by sub41trunc2</text:p>
          </table:table-cell>
        </table:table-row>
        <table:table-row table:style-name="ro1">
          <table:table-cell office:value-type="string">
            <text:p>SD</text:p>
          </table:table-cell>
          <table:table-cell table:style-name="ce3" table:formula="of:= AVERAGE(['out-mean'.Q5:.Q11])" office:value-type="float" office:value="1.42">
            <text:p>1.42</text:p>
          </table:table-cell>
          <table:table-cell table:style-name="ce3" table:formula="of:= AVERAGE(['out-mean'.Q12:.Q14])" office:value-type="float" office:value="0.400000000000002">
            <text:p>0.40</text:p>
          </table:table-cell>
          <table:table-cell table:style-name="ce3" table:formula="of:= AVERAGE(['out-mean'.Q15:.Q22])" office:value-type="float" office:value="4.6725">
            <text:p>4.67</text:p>
          </table:table-cell>
          <table:table-cell table:style-name="ce3" table:formula="of:=['out-mean'.Q15]" office:value-type="float" office:value="0.377500000000003">
            <text:p>0.38</text:p>
          </table:table-cell>
        </table:table-row>
        <table:table-row table:style-name="ro1">
          <table:table-cell office:value-type="string">
            <text:p>HD</text:p>
          </table:table-cell>
          <table:table-cell table:style-name="ce3" table:formula="of:= AVERAGE(['out-mean'.S5:.S11])" office:value-type="float" office:value="1.01428571428572">
            <text:p>1.01</text:p>
          </table:table-cell>
          <table:table-cell table:style-name="ce3" table:formula="of:= AVERAGE(['out-mean'.S12:.S14])" office:value-type="float" office:value="0.281111111111113">
            <text:p>0.28</text:p>
          </table:table-cell>
          <table:table-cell table:style-name="ce3" table:formula="of:= AVERAGE(['out-mean'.S15:.S22])" office:value-type="float" office:value="2.56">
            <text:p>2.56</text:p>
          </table:table-cell>
          <table:table-cell table:style-name="ce3" table:formula="of:=['out-mean'.S15]" office:value-type="float" office:value="0.253333333333333">
            <text:p>0.25</text:p>
          </table:table-cell>
        </table:table-row>
        <table:table-row table:style-name="ro1">
          <table:table-cell office:value-type="string">
            <text:p>SD-v2</text:p>
          </table:table-cell>
          <table:table-cell table:style-name="ce3" table:formula="of:= AVERAGE(['out-mean'.V5:.V11])" office:value-type="float" office:value="1.40952380952381">
            <text:p>1.41</text:p>
          </table:table-cell>
          <table:table-cell table:style-name="ce3" table:formula="of:= AVERAGE(['out-mean'.V12:.V14])" office:value-type="float" office:value="0.373333333333335">
            <text:p>0.37</text:p>
          </table:table-cell>
          <table:table-cell table:style-name="ce3" table:formula="of:= AVERAGE(['out-mean'.V15:.V22])" office:value-type="float" office:value="4.66208333333334">
            <text:p>4.66</text:p>
          </table:table-cell>
          <table:table-cell table:style-name="ce3" table:formula="of:=['out-mean'.V15]" office:value-type="float" office:value="0.343333333333336">
            <text:p>0.3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Mean Speedup (times) by Trunc</text:p>
          </table:table-cell>
          <table:table-cell table:style-name="ce1" office:value-type="string">
            <text:p>Mean Speedup (times) by Sub</text:p>
          </table:table-cell>
          <table:table-cell table:style-name="ce1" office:value-type="string">
            <text:p>Mean Speedup (times) by Comb</text:p>
          </table:table-cell>
          <table:table-cell table:style-name="ce1" office:value-type="string">
            <text:p>Mean Speedup (times) by sub41trunc2</text:p>
          </table:table-cell>
        </table:table-row>
        <table:table-row table:style-name="ro1">
          <table:table-cell office:value-type="string">
            <text:p>SD</text:p>
          </table:table-cell>
          <table:table-cell table:style-name="ce3" table:formula="of:= AVERAGE(['out-mean'.Y5:.Y11])" office:value-type="float" office:value="2.38063148882957">
            <text:p>2.38</text:p>
          </table:table-cell>
          <table:table-cell table:style-name="ce3" table:formula="of:= AVERAGE(['out-mean'.Y12:.Y14])" office:value-type="float" office:value="2.37920254826935">
            <text:p>2.38</text:p>
          </table:table-cell>
          <table:table-cell table:style-name="ce3" table:formula="of:= AVERAGE(['out-mean'.Y15:.Y22])" office:value-type="float" office:value="1.60007196507035">
            <text:p>1.60</text:p>
          </table:table-cell>
          <table:table-cell table:style-name="ce3" table:formula="of:=['out-mean'.Y15]" office:value-type="float" office:value="2.73562335990476">
            <text:p>2.74</text:p>
          </table:table-cell>
        </table:table-row>
        <table:table-row table:style-name="ro1">
          <table:table-cell office:value-type="string">
            <text:p>HD</text:p>
          </table:table-cell>
          <table:table-cell table:style-name="ce3" table:formula="of:= AVERAGE(['out-mean'.Z5:.Z11])" office:value-type="float" office:value="2.8173011969754">
            <text:p>2.82</text:p>
          </table:table-cell>
          <table:table-cell table:style-name="ce3" table:formula="of:= AVERAGE(['out-mean'.Z12:.Z14])" office:value-type="float" office:value="2.44861319191842">
            <text:p>2.45</text:p>
          </table:table-cell>
          <table:table-cell table:style-name="ce3" table:formula="of:= AVERAGE(['out-mean'.Z15:.Z22])" office:value-type="float" office:value="1.84236419942158">
            <text:p>1.84</text:p>
          </table:table-cell>
          <table:table-cell table:style-name="ce3" table:formula="of:=['out-mean'.Z15]" office:value-type="float" office:value="2.94098015011092">
            <text:p>2.94</text:p>
          </table:table-cell>
        </table:table-row>
        <table:table-row table:style-name="ro1">
          <table:table-cell office:value-type="string">
            <text:p>diff</text:p>
          </table:table-cell>
          <table:table-cell table:style-name="ce3" table:formula="of:=[.B17]-[.B16]" office:value-type="float" office:value="0.436669708145822">
            <text:p>0.44</text:p>
          </table:table-cell>
          <table:table-cell table:style-name="ce3" table:formula="of:=[.C17]-[.C16]" office:value-type="float" office:value="0.0694106436490696">
            <text:p>0.07</text:p>
          </table:table-cell>
          <table:table-cell table:style-name="ce3" table:formula="of:=[.D17]-[.D16]" office:value-type="float" office:value="0.24229223435123">
            <text:p>0.24</text:p>
          </table:table-cell>
          <table:table-cell table:style-name="ce3" table:formula="of:=[.E17]-[.E16]" office:value-type="float" office:value="0.20535679020616">
            <text:p>0.2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o so high amount of movement: others</text:p>
          </table:table-cell>
          <table:table-cell table:number-columns-repeated="4"/>
        </table:table-row>
        <table:table-row table:style-name="ro1">
          <table:table-cell office:value-type="string">
            <text:p>high amount of movement: mobile crowd run</text:p>
          </table:table-cell>
          <table:table-cell table:number-columns-repeated="4"/>
        </table:table-row>
      </table:table>
      <table:table table:name="out-mean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46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14" table:number-columns-repeated="3" table:default-cell-style-name="Default"/>
        <table:table-column table:style-name="co14" table:default-cell-style-name="ce3"/>
        <table:table-column table:style-name="co14" table:default-cell-style-name="Default"/>
        <table:table-column table:style-name="co50" table:default-cell-style-name="Default"/>
        <table:table-column table:style-name="co14" table:number-columns-repeated="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12" office:value-type="string">
            <text:p>mean</text:p>
          </table:table-cell>
          <table:table-cell office:value-type="string">
            <text:p>Videos: Foreman QCIF (i420), Foreman CIF, Mobile CIF, City 4CIF, Stockholm 720p, Crown Run 1080p, Sunflower 1080p</text:p>
          </table:table-cell>
          <table:table-cell table:style-name="ce9" table:number-columns-repeated="2"/>
          <table:table-cell table:style-name="ce24"/>
          <table:table-cell table:style-name="ce30"/>
          <table:table-cell/>
          <table:table-cell table:style-name="ce3" table:number-columns-repeated="3"/>
          <table:table-cell table:number-columns-repeated="16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24"/>
          <table:table-cell table:style-name="ce30"/>
          <table:table-cell/>
          <table:table-cell table:style-name="ce3" table:number-columns-repeated="2"/>
          <table:table-cell table:style-name="ce18" office:value-type="string">
            <text:p>Total speed up / PSNR → orig/opt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 table:style-name="ce18" office:value-type="string">
            <text:p>ME speed up * PSNR → opt/orig</text:p>
          </table:table-cell>
          <table:table-cell table:number-columns-repeated="5"/>
          <table:table-cell table:style-name="ce1" office:value-type="string">
            <text:p>Quality loss for SD videos</text:p>
          </table:table-cell>
          <table:table-cell/>
          <table:table-cell table:style-name="ce1" office:value-type="string">
            <text:p>Quality loss for HD videos</text:p>
          </table:table-cell>
          <table:table-cell table:number-columns-repeated="2"/>
          <table:table-cell table:style-name="ce1" office:value-type="string">
            <text:p>Quality loss for SD videos</text:p>
          </table:table-cell>
          <table:table-cell table:number-columns-repeated="2"/>
          <table:table-cell table:style-name="ce1" office:value-type="string">
            <text:p>Speedup for SD videos</text:p>
          </table:table-cell>
          <table:table-cell table:style-name="ce1" office:value-type="string">
            <text:p>Speedup for HD videos</text:p>
          </table:table-cell>
        </table:table-row>
        <table:table-row table:style-name="ro1">
          <table:table-cell table:style-name="ce6" office:value-type="string">
            <text:p>01</text:p>
          </table:table-cell>
          <table:table-cell table:style-name="ce13" office:value-type="string">
            <text:p>orig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32" table:formula="of:= AVERAGE(['out-foreman_qcif-i420'.F4]; ['out-foreman_cif-i420'.F4]; ['out-mobile_cif'.F4]; ['out-city_4cif'.F4]; ['out-stockholm_720p'.F4]; ['out-sunflower_1080p-i420'.F4]; ['out-crowd_run_1080p-i420'.F4])" office:value-type="float" office:value="1">
            <text:p>1</text:p>
          </table:table-cell>
          <table:table-cell table:style-name="ce32" office:value-type="string">
            <text:p>-</text:p>
          </table:table-cell>
          <table:table-cell table:style-name="ce32" table:formula="of:= AVERAGE(ABS(['out-foreman_qcif-i420'.H4]); ABS(['out-foreman_cif-i420'.H4]); ABS(['out-mobile_cif'.H4]); ABS(['out-city_4cif'.H4]); ABS(['out-stockholm_720p'.H4]); ABS(['out-sunflower_1080p-i420'.H4]); ABS(['out-crowd_run_1080p-i420'.H4]))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42" table:formula="of:=[.F4]*[.I4]" office:value-type="float" office:value="-0">
            <text:p>0.0000</text:p>
          </table:table-cell>
          <table:table-cell table:style-name="ce42" table:formula="of:=[.G4]*[.I4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4]); ABS(['out-foreman_cif-i420'.H4]); ABS(['out-mobile_cif'.H4]); ABS(['out-city_4cif'.H4]))" office:value-type="float" office:value="0">
            <text:p>0</text:p>
          </table:table-cell>
          <table:table-cell/>
          <table:table-cell table:style-name="ce3" table:formula="of:= AVERAGE(ABS(['out-stockholm_720p'.H4]); ABS(['out-sunflower_1080p-i420'.H4]); ABS(['out-crowd_run_1080p-i420'.H4]))" office:value-type="float" office:value="0">
            <text:p>0</text:p>
          </table:table-cell>
          <table:table-cell table:number-columns-repeated="2"/>
          <table:table-cell table:style-name="ce3" table:formula="of:= AVERAGE(ABS(['out-foreman_qcif-i420'.H4]); ABS(['out-mobile_cif'.H4]); ABS(['out-city_4cif'.H4]))" office:value-type="float" office:value="0">
            <text:p>0</text:p>
          </table:table-cell>
          <table:table-cell table:number-columns-repeated="2"/>
          <table:table-cell table:style-name="ce3" table:formula="of:= AVERAGE(ABS(['out-foreman_qcif-i420'.F4]); ABS(['out-foreman_cif-i420'.F4]); ABS(['out-mobile_cif'.F4]); ABS(['out-city_4cif'.F4]))" office:value-type="float" office:value="1">
            <text:p>1</text:p>
          </table:table-cell>
          <table:table-cell table:style-name="ce3" table:formula="of:= AVERAGE(ABS(['out-stockholm_720p'.F4]); ABS(['out-sunflower_1080p-i420'.F4]); ABS(['out-crowd_run_1080p-i420'.F4])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05</text:p>
          </table:table-cell>
          <table:table-cell table:style-name="ce14" office:value-type="string">
            <text:p>trunc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5]; ['out-foreman_cif-i420'.F5]; ['out-mobile_cif'.F5]; ['out-city_4cif'.F5]; ['out-stockholm_720p'.F5]; ['out-sunflower_1080p-i420'.F5]; ['out-crowd_run_1080p-i420'.F5])" office:value-type="float" office:value="1.13815708995355">
            <text:p>1.14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5]); ABS(['out-foreman_cif-i420'.H5]); ABS(['out-mobile_cif'.H5]); ABS(['out-city_4cif'.H5]); ABS(['out-stockholm_720p'.H5]); ABS(['out-sunflower_1080p-i420'.H5]); ABS(['out-crowd_run_1080p-i420'.H5]))" office:value-type="float" office:value="0.0542857142857152">
            <text:p>0.05</text:p>
          </table:table-cell>
          <table:table-cell table:style-name="ce39" office:value-type="string">
            <text:p>-</text:p>
          </table:table-cell>
          <table:table-cell table:style-name="ce43" table:formula="of:=[.F5]*[.I5]" office:value-type="float" office:value="-0">
            <text:p>0.0000</text:p>
          </table:table-cell>
          <table:table-cell table:style-name="ce43" table:formula="of:=[.G5]*[.I5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5]); ABS(['out-foreman_cif-i420'.H5]); ABS(['out-mobile_cif'.H5]); ABS(['out-city_4cif'.H5]))" office:value-type="float" office:value="0.0275000000000007">
            <text:p>0.03</text:p>
          </table:table-cell>
          <table:table-cell/>
          <table:table-cell table:style-name="ce3" table:formula="of:= AVERAGE(ABS(['out-stockholm_720p'.H5]); ABS(['out-sunflower_1080p-i420'.H5]); ABS(['out-crowd_run_1080p-i420'.H5]))" office:value-type="float" office:value="0.090000000000001">
            <text:p>0.09</text:p>
          </table:table-cell>
          <table:table-cell table:number-columns-repeated="2"/>
          <table:table-cell table:style-name="ce3" table:formula="of:= AVERAGE(ABS(['out-foreman_qcif-i420'.H5]); ABS(['out-mobile_cif'.H5]); ABS(['out-city_4cif'.H5]))" office:value-type="float" office:value="0.0266666666666673">
            <text:p>0.03</text:p>
          </table:table-cell>
          <table:table-cell table:number-columns-repeated="2"/>
          <table:table-cell table:style-name="ce3" table:formula="of:= AVERAGE(ABS(['out-foreman_qcif-i420'.F5]); ABS(['out-foreman_cif-i420'.F5]); ABS(['out-mobile_cif'.F5]); ABS(['out-city_4cif'.F5]))" office:value-type="float" office:value="1.13291921060592">
            <text:p>1.13</text:p>
          </table:table-cell>
          <table:table-cell table:style-name="ce3" table:formula="of:= AVERAGE(ABS(['out-stockholm_720p'.F5]); ABS(['out-sunflower_1080p-i420'.F5]); ABS(['out-crowd_run_1080p-i420'.F5]))" office:value-type="float" office:value="1.14514092908371">
            <text:p>1.15</text:p>
          </table:table-cell>
        </table:table-row>
        <table:table-row table:style-name="ro1">
          <table:table-cell table:style-name="ce6" office:value-type="string">
            <text:p>09</text:p>
          </table:table-cell>
          <table:table-cell table:style-name="ce14" office:value-type="string">
            <text:p>trunc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6]; ['out-foreman_cif-i420'.F6]; ['out-mobile_cif'.F6]; ['out-city_4cif'.F6]; ['out-stockholm_720p'.F6]; ['out-sunflower_1080p-i420'.F6]; ['out-crowd_run_1080p-i420'.F6])" office:value-type="float" office:value="1.42909479107141">
            <text:p>1.43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6]); ABS(['out-foreman_cif-i420'.H6]); ABS(['out-mobile_cif'.H6]); ABS(['out-city_4cif'.H6]); ABS(['out-stockholm_720p'.H6]); ABS(['out-sunflower_1080p-i420'.H6]); ABS(['out-crowd_run_1080p-i420'.H6]))" office:value-type="float" office:value="0.0900000000000004">
            <text:p>0.09</text:p>
          </table:table-cell>
          <table:table-cell table:style-name="ce39" office:value-type="string">
            <text:p>-</text:p>
          </table:table-cell>
          <table:table-cell table:style-name="ce43" table:formula="of:=[.F6]*[.I6]" office:value-type="float" office:value="-0">
            <text:p>0.0000</text:p>
          </table:table-cell>
          <table:table-cell table:style-name="ce43" table:formula="of:=[.G6]*[.I6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6]); ABS(['out-foreman_cif-i420'.H6]); ABS(['out-mobile_cif'.H6]); ABS(['out-city_4cif'.H6]))" office:value-type="float" office:value="0.0650000000000013">
            <text:p>0.07</text:p>
          </table:table-cell>
          <table:table-cell/>
          <table:table-cell table:style-name="ce3" table:formula="of:= AVERAGE(ABS(['out-stockholm_720p'.H6]); ABS(['out-sunflower_1080p-i420'.H6]); ABS(['out-crowd_run_1080p-i420'.H6]))" office:value-type="float" office:value="0.123333333333332">
            <text:p>0.12</text:p>
          </table:table-cell>
          <table:table-cell table:number-columns-repeated="2"/>
          <table:table-cell table:style-name="ce3" table:formula="of:= AVERAGE(ABS(['out-foreman_qcif-i420'.H6]); ABS(['out-mobile_cif'.H6]); ABS(['out-city_4cif'.H6]))" office:value-type="float" office:value="0.0566666666666672">
            <text:p>0.06</text:p>
          </table:table-cell>
          <table:table-cell table:number-columns-repeated="2"/>
          <table:table-cell table:style-name="ce3" table:formula="of:= AVERAGE(ABS(['out-foreman_qcif-i420'.F6]); ABS(['out-foreman_cif-i420'.F6]); ABS(['out-mobile_cif'.F6]); ABS(['out-city_4cif'.F6]))" office:value-type="float" office:value="1.34821504358799">
            <text:p>1.35</text:p>
          </table:table-cell>
          <table:table-cell table:style-name="ce3" table:formula="of:= AVERAGE(ABS(['out-stockholm_720p'.F6]); ABS(['out-sunflower_1080p-i420'.F6]); ABS(['out-crowd_run_1080p-i420'.F6]))" office:value-type="float" office:value="1.53693445438264">
            <text:p>1.54</text:p>
          </table:table-cell>
        </table:table-row>
        <table:table-row table:style-name="ro1">
          <table:table-cell table:style-name="ce6" office:value-type="string">
            <text:p>13</text:p>
          </table:table-cell>
          <table:table-cell table:style-name="ce14" office:value-type="string">
            <text:p>trunc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7]; ['out-foreman_cif-i420'.F7]; ['out-mobile_cif'.F7]; ['out-city_4cif'.F7]; ['out-stockholm_720p'.F7]; ['out-sunflower_1080p-i420'.F7]; ['out-crowd_run_1080p-i420'.F7])" office:value-type="float" office:value="1.96129601494699">
            <text:p>1.96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7]); ABS(['out-foreman_cif-i420'.H7]); ABS(['out-mobile_cif'.H7]); ABS(['out-city_4cif'.H7]); ABS(['out-stockholm_720p'.H7]); ABS(['out-sunflower_1080p-i420'.H7]); ABS(['out-crowd_run_1080p-i420'.H7]))" office:value-type="float" office:value="0.150000000000001">
            <text:p>0.15</text:p>
          </table:table-cell>
          <table:table-cell table:style-name="ce39" office:value-type="string">
            <text:p>-</text:p>
          </table:table-cell>
          <table:table-cell table:style-name="ce43" table:formula="of:=[.F7]*[.I7]" office:value-type="float" office:value="-0">
            <text:p>0.0000</text:p>
          </table:table-cell>
          <table:table-cell table:style-name="ce43" table:formula="of:=[.G7]*[.I7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7]); ABS(['out-foreman_cif-i420'.H7]); ABS(['out-mobile_cif'.H7]); ABS(['out-city_4cif'.H7]))" office:value-type="float" office:value="0.140000000000001">
            <text:p>0.14</text:p>
          </table:table-cell>
          <table:table-cell/>
          <table:table-cell table:style-name="ce3" table:formula="of:= AVERAGE(ABS(['out-stockholm_720p'.H7]); ABS(['out-sunflower_1080p-i420'.H7]); ABS(['out-crowd_run_1080p-i420'.H7]))" office:value-type="float" office:value="0.163333333333334">
            <text:p>0.16</text:p>
          </table:table-cell>
          <table:table-cell table:number-columns-repeated="2"/>
          <table:table-cell table:style-name="ce3" table:formula="of:= AVERAGE(ABS(['out-foreman_qcif-i420'.H7]); ABS(['out-mobile_cif'.H7]); ABS(['out-city_4cif'.H7]))" office:value-type="float" office:value="0.116666666666667">
            <text:p>0.12</text:p>
          </table:table-cell>
          <table:table-cell table:number-columns-repeated="2"/>
          <table:table-cell table:style-name="ce3" table:formula="of:= AVERAGE(ABS(['out-foreman_qcif-i420'.F7]); ABS(['out-foreman_cif-i420'.F7]); ABS(['out-mobile_cif'.F7]); ABS(['out-city_4cif'.F7]))" office:value-type="float" office:value="1.75866155821365">
            <text:p>1.76</text:p>
          </table:table-cell>
          <table:table-cell table:style-name="ce3" table:formula="of:= AVERAGE(ABS(['out-stockholm_720p'.F7]); ABS(['out-sunflower_1080p-i420'.F7]); ABS(['out-crowd_run_1080p-i420'.F7]))" office:value-type="float" office:value="2.23147529059144">
            <text:p>2.23</text:p>
          </table:table-cell>
        </table:table-row>
        <table:table-row table:style-name="ro1">
          <table:table-cell table:style-name="ce6" office:value-type="string">
            <text:p>17</text:p>
          </table:table-cell>
          <table:table-cell table:style-name="ce14" office:value-type="string">
            <text:p>trunc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8]; ['out-foreman_cif-i420'.F8]; ['out-mobile_cif'.F8]; ['out-city_4cif'.F8]; ['out-stockholm_720p'.F8]; ['out-sunflower_1080p-i420'.F8]; ['out-crowd_run_1080p-i420'.F8])" office:value-type="float" office:value="2.68138363018653">
            <text:p>2.68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8]); ABS(['out-foreman_cif-i420'.H8]); ABS(['out-mobile_cif'.H8]); ABS(['out-city_4cif'.H8]); ABS(['out-stockholm_720p'.H8]); ABS(['out-sunflower_1080p-i420'.H8]); ABS(['out-crowd_run_1080p-i420'.H8]))" office:value-type="float" office:value="0.327142857142857">
            <text:p>0.33</text:p>
          </table:table-cell>
          <table:table-cell table:style-name="ce39" office:value-type="string">
            <text:p>-</text:p>
          </table:table-cell>
          <table:table-cell table:style-name="ce43" table:formula="of:=[.F8]*[.I8]" office:value-type="float" office:value="-0">
            <text:p>0.0000</text:p>
          </table:table-cell>
          <table:table-cell table:style-name="ce43" table:formula="of:=[.G8]*[.I8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8]); ABS(['out-foreman_cif-i420'.H8]); ABS(['out-mobile_cif'.H8]); ABS(['out-city_4cif'.H8]))" office:value-type="float" office:value="0.350000000000001">
            <text:p>0.35</text:p>
          </table:table-cell>
          <table:table-cell/>
          <table:table-cell table:style-name="ce3" table:formula="of:= AVERAGE(ABS(['out-stockholm_720p'.H8]); ABS(['out-sunflower_1080p-i420'.H8]); ABS(['out-crowd_run_1080p-i420'.H8]))" office:value-type="float" office:value="0.296666666666667">
            <text:p>0.30</text:p>
          </table:table-cell>
          <table:table-cell table:number-columns-repeated="2"/>
          <table:table-cell table:style-name="ce3" table:formula="of:= AVERAGE(ABS(['out-foreman_qcif-i420'.H8]); ABS(['out-mobile_cif'.H8]); ABS(['out-city_4cif'.H8]))" office:value-type="float" office:value="0.273333333333335">
            <text:p>0.27</text:p>
          </table:table-cell>
          <table:table-cell table:number-columns-repeated="2"/>
          <table:table-cell table:style-name="ce3" table:formula="of:= AVERAGE(ABS(['out-foreman_qcif-i420'.F8]); ABS(['out-foreman_cif-i420'.F8]); ABS(['out-mobile_cif'.F8]); ABS(['out-city_4cif'.F8]))" office:value-type="float" office:value="2.39674726150983">
            <text:p>2.40</text:p>
          </table:table-cell>
          <table:table-cell table:style-name="ce3" table:formula="of:= AVERAGE(ABS(['out-stockholm_720p'.F8]); ABS(['out-sunflower_1080p-i420'.F8]); ABS(['out-crowd_run_1080p-i420'.F8]))" office:value-type="float" office:value="3.06089878842212">
            <text:p>3.06</text:p>
          </table:table-cell>
        </table:table-row>
        <table:table-row table:style-name="ro1">
          <table:table-cell table:style-name="ce6" office:value-type="string">
            <text:p>21</text:p>
          </table:table-cell>
          <table:table-cell table:style-name="ce14" office:value-type="string">
            <text:p>trunc5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9]; ['out-foreman_cif-i420'.F9]; ['out-mobile_cif'.F9]; ['out-city_4cif'.F9]; ['out-stockholm_720p'.F9]; ['out-sunflower_1080p-i420'.F9]; ['out-crowd_run_1080p-i420'.F9])" office:value-type="float" office:value="3.32300947590288">
            <text:p>3.32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9]); ABS(['out-foreman_cif-i420'.H9]); ABS(['out-mobile_cif'.H9]); ABS(['out-city_4cif'.H9]); ABS(['out-stockholm_720p'.H9]); ABS(['out-sunflower_1080p-i420'.H9]); ABS(['out-crowd_run_1080p-i420'.H9]))" office:value-type="float" office:value="0.745714285714287">
            <text:p>0.75</text:p>
          </table:table-cell>
          <table:table-cell table:style-name="ce39" office:value-type="string">
            <text:p>-</text:p>
          </table:table-cell>
          <table:table-cell table:style-name="ce43" table:formula="of:=[.F9]*[.I9]" office:value-type="float" office:value="-0">
            <text:p>0.0000</text:p>
          </table:table-cell>
          <table:table-cell table:style-name="ce43" table:formula="of:=[.G9]*[.I9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9]); ABS(['out-foreman_cif-i420'.H9]); ABS(['out-mobile_cif'.H9]); ABS(['out-city_4cif'.H9]))" office:value-type="float" office:value="0.822500000000002">
            <text:p>0.82</text:p>
          </table:table-cell>
          <table:table-cell/>
          <table:table-cell table:style-name="ce3" table:formula="of:= AVERAGE(ABS(['out-stockholm_720p'.H9]); ABS(['out-sunflower_1080p-i420'.H9]); ABS(['out-crowd_run_1080p-i420'.H9]))" office:value-type="float" office:value="0.643333333333333">
            <text:p>0.64</text:p>
          </table:table-cell>
          <table:table-cell table:number-columns-repeated="2"/>
          <table:table-cell table:style-name="ce3" table:formula="of:= AVERAGE(ABS(['out-foreman_qcif-i420'.H9]); ABS(['out-mobile_cif'.H9]); ABS(['out-city_4cif'.H9]))" office:value-type="float" office:value="0.650000000000002">
            <text:p>0.65</text:p>
          </table:table-cell>
          <table:table-cell table:number-columns-repeated="2"/>
          <table:table-cell table:style-name="ce3" table:formula="of:= AVERAGE(ABS(['out-foreman_qcif-i420'.F9]); ABS(['out-foreman_cif-i420'.F9]); ABS(['out-mobile_cif'.F9]); ABS(['out-city_4cif'.F9]))" office:value-type="float" office:value="3.08978040216016">
            <text:p>3.09</text:p>
          </table:table-cell>
          <table:table-cell table:style-name="ce3" table:formula="of:= AVERAGE(ABS(['out-stockholm_720p'.F9]); ABS(['out-sunflower_1080p-i420'.F9]); ABS(['out-crowd_run_1080p-i420'.F9]))" office:value-type="float" office:value="3.63398157422651">
            <text:p>3.63</text:p>
          </table:table-cell>
        </table:table-row>
        <table:table-row table:style-name="ro1">
          <table:table-cell table:style-name="ce6" office:value-type="string">
            <text:p>25</text:p>
          </table:table-cell>
          <table:table-cell table:style-name="ce14" office:value-type="string">
            <text:p>trunc6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10]; ['out-foreman_cif-i420'.F10]; ['out-mobile_cif'.F10]; ['out-city_4cif'.F10]; ['out-stockholm_720p'.F10]; ['out-sunflower_1080p-i420'.F10]; ['out-crowd_run_1080p-i420'.F10])" office:value-type="float" office:value="3.68147100393615">
            <text:p>3.68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10]); ABS(['out-foreman_cif-i420'.H10]); ABS(['out-mobile_cif'.H10]); ABS(['out-city_4cif'.H10]); ABS(['out-stockholm_720p'.H10]); ABS(['out-sunflower_1080p-i420'.H10]); ABS(['out-crowd_run_1080p-i420'.H10]))" office:value-type="float" office:value="1.85428571428571">
            <text:p>1.85</text:p>
          </table:table-cell>
          <table:table-cell table:style-name="ce39" office:value-type="string">
            <text:p>-</text:p>
          </table:table-cell>
          <table:table-cell table:style-name="ce87" table:formula="of:=[.F10]*[.I10]" office:value-type="float" office:value="-0">
            <text:p>0.0000</text:p>
          </table:table-cell>
          <table:table-cell table:style-name="ce87" table:formula="of:=[.G10]*[.I10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0]); ABS(['out-foreman_cif-i420'.H10]); ABS(['out-mobile_cif'.H10]); ABS(['out-city_4cif'.H10]))" office:value-type="float" office:value="2.1825">
            <text:p>2.18</text:p>
          </table:table-cell>
          <table:table-cell/>
          <table:table-cell table:style-name="ce3" table:formula="of:= AVERAGE(ABS(['out-stockholm_720p'.H10]); ABS(['out-sunflower_1080p-i420'.H10]); ABS(['out-crowd_run_1080p-i420'.H10]))" office:value-type="float" office:value="1.41666666666667">
            <text:p>1.42</text:p>
          </table:table-cell>
          <table:table-cell table:number-columns-repeated="2"/>
          <table:table-cell table:style-name="ce3" table:formula="of:= AVERAGE(ABS(['out-foreman_qcif-i420'.H10]); ABS(['out-mobile_cif'.H10]); ABS(['out-city_4cif'.H10]))" office:value-type="float" office:value="1.84666666666667">
            <text:p>1.85</text:p>
          </table:table-cell>
          <table:table-cell table:number-columns-repeated="2"/>
          <table:table-cell table:style-name="ce3" table:formula="of:= AVERAGE(ABS(['out-foreman_qcif-i420'.F10]); ABS(['out-foreman_cif-i420'.F10]); ABS(['out-mobile_cif'.F10]); ABS(['out-city_4cif'.F10]))" office:value-type="float" office:value="3.44425599131229">
            <text:p>3.44</text:p>
          </table:table-cell>
          <table:table-cell table:style-name="ce3" table:formula="of:= AVERAGE(ABS(['out-stockholm_720p'.F10]); ABS(['out-sunflower_1080p-i420'.F10]); ABS(['out-crowd_run_1080p-i420'.F10]))" office:value-type="float" office:value="3.99775768743461">
            <text:p>4.00</text:p>
          </table:table-cell>
        </table:table-row>
        <table:table-row table:style-name="ro1">
          <table:table-cell table:style-name="ce6" office:value-type="string">
            <text:p>29</text:p>
          </table:table-cell>
          <table:table-cell table:style-name="ce14" office:value-type="string">
            <text:p>trunc7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AVERAGE(['out-foreman_qcif-i420'.F11]; ['out-foreman_cif-i420'.F11]; ['out-mobile_cif'.F11]; ['out-city_4cif'.F11]; ['out-stockholm_720p'.F11]; ['out-sunflower_1080p-i420'.F11]; ['out-crowd_run_1080p-i420'.F11])" office:value-type="float" office:value="3.76001754024699">
            <text:p>3.76</text:p>
          </table:table-cell>
          <table:table-cell table:style-name="ce33" office:value-type="string">
            <text:p>-</text:p>
          </table:table-cell>
          <table:table-cell table:style-name="ce33" table:formula="of:= AVERAGE(ABS(['out-foreman_qcif-i420'.H11]); ABS(['out-foreman_cif-i420'.H11]); ABS(['out-mobile_cif'.H11]); ABS(['out-city_4cif'.H11]); ABS(['out-stockholm_720p'.H11]); ABS(['out-sunflower_1080p-i420'.H11]); ABS(['out-crowd_run_1080p-i420'.H11]))" office:value-type="float" office:value="5.50142857142857">
            <text:p>5.50</text:p>
          </table:table-cell>
          <table:table-cell table:style-name="ce39" office:value-type="string">
            <text:p>-</text:p>
          </table:table-cell>
          <table:table-cell table:style-name="ce43" table:formula="of:=[.F11]*[.I11]" office:value-type="float" office:value="-0">
            <text:p>0.0000</text:p>
          </table:table-cell>
          <table:table-cell table:style-name="ce43" table:formula="of:=[.G11]*[.I11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1]); ABS(['out-foreman_cif-i420'.H11]); ABS(['out-mobile_cif'.H11]); ABS(['out-city_4cif'.H11]))" office:value-type="float" office:value="6.3525">
            <text:p>6.35</text:p>
          </table:table-cell>
          <table:table-cell/>
          <table:table-cell table:style-name="ce3" table:formula="of:= AVERAGE(ABS(['out-stockholm_720p'.H11]); ABS(['out-sunflower_1080p-i420'.H11]); ABS(['out-crowd_run_1080p-i420'.H11]))" office:value-type="float" office:value="4.36666666666667">
            <text:p>4.37</text:p>
          </table:table-cell>
          <table:table-cell table:number-columns-repeated="2"/>
          <table:table-cell table:style-name="ce3" table:formula="of:= AVERAGE(ABS(['out-foreman_qcif-i420'.H11]); ABS(['out-mobile_cif'.H11]); ABS(['out-city_4cif'.H11]))" office:value-type="float" office:value="6.89666666666667">
            <text:p>6.90</text:p>
          </table:table-cell>
          <table:table-cell table:number-columns-repeated="2"/>
          <table:table-cell table:style-name="ce3" table:formula="of:= AVERAGE(ABS(['out-foreman_qcif-i420'.F11]); ABS(['out-foreman_cif-i420'.F11]); ABS(['out-mobile_cif'.F11]); ABS(['out-city_4cif'.F11]))" office:value-type="float" office:value="3.49384095441718">
            <text:p>3.49</text:p>
          </table:table-cell>
          <table:table-cell table:style-name="ce3" table:formula="of:= AVERAGE(ABS(['out-stockholm_720p'.F11]); ABS(['out-sunflower_1080p-i420'.F11]); ABS(['out-crowd_run_1080p-i420'.F11]))" office:value-type="float" office:value="4.11491965468673">
            <text:p>4.11</text:p>
          </table:table-cell>
        </table:table-row>
        <table:table-row table:style-name="ro1">
          <table:table-cell table:style-name="ce6" office:value-type="string">
            <text:p>02</text:p>
          </table:table-cell>
          <table:table-cell table:style-name="ce15" office:value-type="string">
            <text:p>sub2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AVERAGE(['out-foreman_qcif-i420'.F12]; ['out-foreman_cif-i420'.F12]; ['out-mobile_cif'.F12]; ['out-city_4cif'.F12]; ['out-stockholm_720p'.F12]; ['out-sunflower_1080p-i420'.F12]; ['out-crowd_run_1080p-i420'.F12])" office:value-type="float" office:value="1.69243210214404">
            <text:p>1.69</text:p>
          </table:table-cell>
          <table:table-cell table:style-name="ce78" office:value-type="string">
            <text:p>-</text:p>
          </table:table-cell>
          <table:table-cell table:style-name="ce78" table:formula="of:= AVERAGE(ABS(['out-foreman_qcif-i420'.H12]); ABS(['out-foreman_cif-i420'.H12]); ABS(['out-mobile_cif'.H12]); ABS(['out-city_4cif'.H12]); ABS(['out-stockholm_720p'.H12]); ABS(['out-sunflower_1080p-i420'.H12]); ABS(['out-crowd_run_1080p-i420'.H12]))" office:value-type="float" office:value="0.191428571428573">
            <text:p>0.19</text:p>
          </table:table-cell>
          <table:table-cell table:style-name="ce85" office:value-type="string">
            <text:p>-</text:p>
          </table:table-cell>
          <table:table-cell table:style-name="ce45" table:formula="of:=[.F12]*[.I12]" office:value-type="float" office:value="-0">
            <text:p>0.0000</text:p>
          </table:table-cell>
          <table:table-cell table:style-name="ce45" table:formula="of:=[.G12]*[.I12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2]); ABS(['out-foreman_cif-i420'.H12]); ABS(['out-mobile_cif'.H12]); ABS(['out-city_4cif'.H12]))" office:value-type="float" office:value="0.182500000000002">
            <text:p>0.18</text:p>
          </table:table-cell>
          <table:table-cell/>
          <table:table-cell table:style-name="ce3" table:formula="of:= AVERAGE(ABS(['out-stockholm_720p'.H12]); ABS(['out-sunflower_1080p-i420'.H12]); ABS(['out-crowd_run_1080p-i420'.H12]))" office:value-type="float" office:value="0.203333333333335">
            <text:p>0.20</text:p>
          </table:table-cell>
          <table:table-cell table:number-columns-repeated="2"/>
          <table:table-cell table:style-name="ce3" table:formula="of:= AVERAGE(ABS(['out-foreman_qcif-i420'.H12]); ABS(['out-mobile_cif'.H12]); ABS(['out-city_4cif'.H12]))" office:value-type="float" office:value="0.176666666666668">
            <text:p>0.18</text:p>
          </table:table-cell>
          <table:table-cell table:number-columns-repeated="2"/>
          <table:table-cell table:style-name="ce3" table:formula="of:= AVERAGE(ABS(['out-foreman_qcif-i420'.F12]); ABS(['out-foreman_cif-i420'.F12]); ABS(['out-mobile_cif'.F12]); ABS(['out-city_4cif'.F12]))" office:value-type="float" office:value="1.69357340345589">
            <text:p>1.69</text:p>
          </table:table-cell>
          <table:table-cell table:style-name="ce3" table:formula="of:= AVERAGE(ABS(['out-stockholm_720p'.F12]); ABS(['out-sunflower_1080p-i420'.F12]); ABS(['out-crowd_run_1080p-i420'.F12]))" office:value-type="float" office:value="1.69091036706157">
            <text:p>1.69</text:p>
          </table:table-cell>
        </table:table-row>
        <table:table-row table:style-name="ro1">
          <table:table-cell table:style-name="ce6" office:value-type="string">
            <text:p>03</text:p>
          </table:table-cell>
          <table:table-cell table:style-name="ce15" office:value-type="string">
            <text:p>sub4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AVERAGE(['out-foreman_qcif-i420'.F13]; ['out-foreman_cif-i420'.F13]; ['out-mobile_cif'.F13]; ['out-city_4cif'.F13]; ['out-stockholm_720p'.F13]; ['out-sunflower_1080p-i420'.F13]; ['out-crowd_run_1080p-i420'.F13])" office:value-type="float" office:value="2.44452239937334">
            <text:p>2.44</text:p>
          </table:table-cell>
          <table:table-cell table:style-name="ce78" office:value-type="string">
            <text:p>-</text:p>
          </table:table-cell>
          <table:table-cell table:style-name="ce78" table:formula="of:= AVERAGE(ABS(['out-foreman_qcif-i420'.H13]); ABS(['out-foreman_cif-i420'.H13]); ABS(['out-mobile_cif'.H13]); ABS(['out-city_4cif'.H13]); ABS(['out-stockholm_720p'.H13]); ABS(['out-sunflower_1080p-i420'.H13]); ABS(['out-crowd_run_1080p-i420'.H13]))" office:value-type="float" office:value="0.30857142857143">
            <text:p>0.31</text:p>
          </table:table-cell>
          <table:table-cell table:style-name="ce85" office:value-type="string">
            <text:p>-</text:p>
          </table:table-cell>
          <table:table-cell table:style-name="ce45" table:formula="of:=[.F13]*[.I13]" office:value-type="float" office:value="-0">
            <text:p>0.0000</text:p>
          </table:table-cell>
          <table:table-cell table:style-name="ce45" table:formula="of:=[.G13]*[.I13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3]); ABS(['out-foreman_cif-i420'.H13]); ABS(['out-mobile_cif'.H13]); ABS(['out-city_4cif'.H13]))" office:value-type="float" office:value="0.355000000000001">
            <text:p>0.36</text:p>
          </table:table-cell>
          <table:table-cell/>
          <table:table-cell table:style-name="ce3" table:formula="of:= AVERAGE(ABS(['out-stockholm_720p'.H13]); ABS(['out-sunflower_1080p-i420'.H13]); ABS(['out-crowd_run_1080p-i420'.H13]))" office:value-type="float" office:value="0.246666666666667">
            <text:p>0.25</text:p>
          </table:table-cell>
          <table:table-cell table:number-columns-repeated="2"/>
          <table:table-cell table:style-name="ce3" table:formula="of:= AVERAGE(ABS(['out-foreman_qcif-i420'.H13]); ABS(['out-mobile_cif'.H13]); ABS(['out-city_4cif'.H13]))" office:value-type="float" office:value="0.323333333333334">
            <text:p>0.32</text:p>
          </table:table-cell>
          <table:table-cell table:number-columns-repeated="2"/>
          <table:table-cell table:style-name="ce3" table:formula="of:= AVERAGE(ABS(['out-foreman_qcif-i420'.F13]); ABS(['out-foreman_cif-i420'.F13]); ABS(['out-mobile_cif'.F13]); ABS(['out-city_4cif'.F13]))" office:value-type="float" office:value="2.41671201266424">
            <text:p>2.42</text:p>
          </table:table-cell>
          <table:table-cell table:style-name="ce3" table:formula="of:= AVERAGE(ABS(['out-stockholm_720p'.F13]); ABS(['out-sunflower_1080p-i420'.F13]); ABS(['out-crowd_run_1080p-i420'.F13]))" office:value-type="float" office:value="2.48160291498547">
            <text:p>2.48</text:p>
          </table:table-cell>
        </table:table-row>
        <table:table-row table:style-name="ro1">
          <table:table-cell table:style-name="ce6" office:value-type="string">
            <text:p>04</text:p>
          </table:table-cell>
          <table:table-cell table:style-name="ce15" office:value-type="string">
            <text:p>sub8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AVERAGE(['out-foreman_qcif-i420'.F14]; ['out-foreman_cif-i420'.F14]; ['out-mobile_cif'.F14]; ['out-city_4cif'.F14]; ['out-stockholm_720p'.F14]; ['out-sunflower_1080p-i420'.F14]; ['out-crowd_run_1080p-i420'.F14])" office:value-type="float" office:value="3.0898953994109">
            <text:p>3.09</text:p>
          </table:table-cell>
          <table:table-cell table:style-name="ce78" office:value-type="string">
            <text:p>-</text:p>
          </table:table-cell>
          <table:table-cell table:style-name="ce78" table:formula="of:= AVERAGE(ABS(['out-foreman_qcif-i420'.H14]); ABS(['out-foreman_cif-i420'.H14]); ABS(['out-mobile_cif'.H14]); ABS(['out-city_4cif'.H14]); ABS(['out-stockholm_720p'.H14]); ABS(['out-sunflower_1080p-i420'.H14]); ABS(['out-crowd_run_1080p-i420'.H14]))" office:value-type="float" office:value="0.547142857142859">
            <text:p>0.55</text:p>
          </table:table-cell>
          <table:table-cell table:style-name="ce85" office:value-type="string">
            <text:p>-</text:p>
          </table:table-cell>
          <table:table-cell table:style-name="ce88" table:formula="of:=[.F14]*[.I14]" office:value-type="float" office:value="-0">
            <text:p>0.0000</text:p>
          </table:table-cell>
          <table:table-cell table:style-name="ce88" table:formula="of:=[.G14]*[.I14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4]); ABS(['out-foreman_cif-i420'.H14]); ABS(['out-mobile_cif'.H14]); ABS(['out-city_4cif'.H14]))" office:value-type="float" office:value="0.662500000000001">
            <text:p>0.66</text:p>
          </table:table-cell>
          <table:table-cell/>
          <table:table-cell table:style-name="ce3" table:formula="of:= AVERAGE(ABS(['out-stockholm_720p'.H14]); ABS(['out-sunflower_1080p-i420'.H14]); ABS(['out-crowd_run_1080p-i420'.H14]))" office:value-type="float" office:value="0.393333333333336">
            <text:p>0.39</text:p>
          </table:table-cell>
          <table:table-cell table:number-columns-repeated="2"/>
          <table:table-cell table:style-name="ce3" table:formula="of:= AVERAGE(ABS(['out-foreman_qcif-i420'.H14]); ABS(['out-mobile_cif'.H14]); ABS(['out-city_4cif'.H14]))" office:value-type="float" office:value="0.620000000000002">
            <text:p>0.62</text:p>
          </table:table-cell>
          <table:table-cell table:number-columns-repeated="2"/>
          <table:table-cell table:style-name="ce3" table:formula="of:= AVERAGE(ABS(['out-foreman_qcif-i420'.F14]); ABS(['out-foreman_cif-i420'.F14]); ABS(['out-mobile_cif'.F14]); ABS(['out-city_4cif'.F14]))" office:value-type="float" office:value="3.02732222868791">
            <text:p>3.03</text:p>
          </table:table-cell>
          <table:table-cell table:style-name="ce3" table:formula="of:= AVERAGE(ABS(['out-stockholm_720p'.F14]); ABS(['out-sunflower_1080p-i420'.F14]); ABS(['out-crowd_run_1080p-i420'.F14]))" office:value-type="float" office:value="3.17332629370822">
            <text:p>3.17</text:p>
          </table:table-cell>
        </table:table-row>
        <table:table-row table:style-name="ro1">
          <table:table-cell table:style-name="ce6" office:value-type="string">
            <text:p>11</text:p>
          </table:table-cell>
          <table:table-cell table:style-name="ce16" office:value-type="string">
            <text:p>sub41trunc2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15]; ['out-foreman_cif-i420'.F15]; ['out-mobile_cif'.F15]; ['out-city_4cif'.F15]; ['out-stockholm_720p'.F15]; ['out-sunflower_1080p-i420'.F15]; ['out-crowd_run_1080p-i420'.F15])" office:value-type="float" office:value="2.82363341285026">
            <text:p>2.82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15]); ABS(['out-foreman_cif-i420'.H15]); ABS(['out-mobile_cif'.H15]); ABS(['out-city_4cif'.H15]); ABS(['out-stockholm_720p'.H15]); ABS(['out-sunflower_1080p-i420'.H15]); ABS(['out-crowd_run_1080p-i420'.H15]))" office:value-type="float" office:value="0.324285714285716">
            <text:p>0.32</text:p>
          </table:table-cell>
          <table:table-cell table:style-name="ce86" office:value-type="string">
            <text:p>-</text:p>
          </table:table-cell>
          <table:table-cell table:style-name="ce47" table:formula="of:=[.F15]*[.I15]" office:value-type="float" office:value="-0">
            <text:p>0.0000</text:p>
          </table:table-cell>
          <table:table-cell table:style-name="ce47" table:formula="of:=[.G15]*[.I15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5]); ABS(['out-foreman_cif-i420'.H15]); ABS(['out-mobile_cif'.H15]); ABS(['out-city_4cif'.H15]))" office:value-type="float" office:value="0.377500000000003">
            <text:p>0.38</text:p>
          </table:table-cell>
          <table:table-cell/>
          <table:table-cell table:style-name="ce3" table:formula="of:= AVERAGE(ABS(['out-stockholm_720p'.H15]); ABS(['out-sunflower_1080p-i420'.H15]); ABS(['out-crowd_run_1080p-i420'.H15]))" office:value-type="float" office:value="0.253333333333333">
            <text:p>0.25</text:p>
          </table:table-cell>
          <table:table-cell table:number-columns-repeated="2"/>
          <table:table-cell table:style-name="ce3" table:formula="of:= AVERAGE(ABS(['out-foreman_qcif-i420'.H15]); ABS(['out-mobile_cif'.H15]); ABS(['out-city_4cif'.H15]))" office:value-type="float" office:value="0.343333333333336">
            <text:p>0.34</text:p>
          </table:table-cell>
          <table:table-cell table:number-columns-repeated="2"/>
          <table:table-cell table:style-name="ce3" table:formula="of:= AVERAGE(ABS(['out-foreman_qcif-i420'.F15]); ABS(['out-foreman_cif-i420'.F15]); ABS(['out-mobile_cif'.F15]); ABS(['out-city_4cif'.F15]))" office:value-type="float" office:value="2.73562335990476">
            <text:p>2.74</text:p>
          </table:table-cell>
          <table:table-cell table:style-name="ce3" table:formula="of:= AVERAGE(ABS(['out-stockholm_720p'.F15]); ABS(['out-sunflower_1080p-i420'.F15]); ABS(['out-crowd_run_1080p-i420'.F15]))" office:value-type="float" office:value="2.94098015011092">
            <text:p>2.94</text:p>
          </table:table-cell>
        </table:table-row>
        <table:table-row table:style-name="ro1">
          <table:table-cell table:style-name="ce6" office:value-type="string">
            <text:p>06</text:p>
          </table:table-cell>
          <table:table-cell table:style-name="ce17" office:value-type="string">
            <text:p>sub21trunc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16]; ['out-foreman_cif-i420'.F16]; ['out-mobile_cif'.F16]; ['out-city_4cif'.F16]; ['out-stockholm_720p'.F16]; ['out-sunflower_1080p-i420'.F16]; ['out-crowd_run_1080p-i420'.F16])" office:value-type="float" office:value="1.83064695114536">
            <text:p>1.83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16]); ABS(['out-foreman_cif-i420'.H16]); ABS(['out-mobile_cif'.H16]); ABS(['out-city_4cif'.H16]); ABS(['out-stockholm_720p'.H16]); ABS(['out-sunflower_1080p-i420'.H16]); ABS(['out-crowd_run_1080p-i420'.H16]))" office:value-type="float" office:value="0.195714285714287">
            <text:p>0.20</text:p>
          </table:table-cell>
          <table:table-cell table:style-name="ce86" office:value-type="string">
            <text:p>-</text:p>
          </table:table-cell>
          <table:table-cell table:style-name="ce47" table:formula="of:=[.F16]*[.I16]" office:value-type="float" office:value="-0">
            <text:p>0.0000</text:p>
          </table:table-cell>
          <table:table-cell table:style-name="ce47" table:formula="of:=[.G16]*[.I16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6]); ABS(['out-foreman_cif-i420'.H16]); ABS(['out-mobile_cif'.H16]); ABS(['out-city_4cif'.H16]))" office:value-type="float" office:value="0.187500000000002">
            <text:p>0.19</text:p>
          </table:table-cell>
          <table:table-cell/>
          <table:table-cell table:style-name="ce3" table:formula="of:= AVERAGE(ABS(['out-stockholm_720p'.H16]); ABS(['out-sunflower_1080p-i420'.H16]); ABS(['out-crowd_run_1080p-i420'.H16]))" office:value-type="float" office:value="0.206666666666668">
            <text:p>0.21</text:p>
          </table:table-cell>
          <table:table-cell table:number-columns-repeated="2"/>
          <table:table-cell table:style-name="ce3" table:formula="of:= AVERAGE(ABS(['out-foreman_qcif-i420'.H16]); ABS(['out-mobile_cif'.H16]); ABS(['out-city_4cif'.H16]))" office:value-type="float" office:value="0.180000000000002">
            <text:p>0.18</text:p>
          </table:table-cell>
          <table:table-cell table:number-columns-repeated="2"/>
          <table:table-cell table:style-name="ce3" table:formula="of:= AVERAGE(ABS(['out-foreman_qcif-i420'.F16]); ABS(['out-foreman_cif-i420'.F16]); ABS(['out-mobile_cif'.F16]); ABS(['out-city_4cif'.F16]))" office:value-type="float" office:value="1.8059529128579">
            <text:p>1.81</text:p>
          </table:table-cell>
          <table:table-cell table:style-name="ce3" table:formula="of:= AVERAGE(ABS(['out-stockholm_720p'.F16]); ABS(['out-sunflower_1080p-i420'.F16]); ABS(['out-crowd_run_1080p-i420'.F16]))" office:value-type="float" office:value="1.86357233552864">
            <text:p>1.86</text:p>
          </table:table-cell>
        </table:table-row>
        <table:table-row table:style-name="ro1">
          <table:table-cell table:style-name="ce6" office:value-type="string">
            <text:p>07</text:p>
          </table:table-cell>
          <table:table-cell table:style-name="ce17" office:value-type="string">
            <text:p>sub41trunc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17]; ['out-foreman_cif-i420'.F17]; ['out-mobile_cif'.F17]; ['out-city_4cif'.F17]; ['out-stockholm_720p'.F17]; ['out-sunflower_1080p-i420'.F17]; ['out-crowd_run_1080p-i420'.F17])" office:value-type="float" office:value="1.66991991929405">
            <text:p>1.67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17]); ABS(['out-foreman_cif-i420'.H17]); ABS(['out-mobile_cif'.H17]); ABS(['out-city_4cif'.H17]); ABS(['out-stockholm_720p'.H17]); ABS(['out-sunflower_1080p-i420'.H17]); ABS(['out-crowd_run_1080p-i420'.H17]))" office:value-type="float" office:value="3.96">
            <text:p>3.96</text:p>
          </table:table-cell>
          <table:table-cell table:style-name="ce86" office:value-type="string">
            <text:p>-</text:p>
          </table:table-cell>
          <table:table-cell table:style-name="ce47" table:formula="of:=[.F17]*[.I17]" office:value-type="float" office:value="-0">
            <text:p>0.0000</text:p>
          </table:table-cell>
          <table:table-cell table:style-name="ce47" table:formula="of:=[.G17]*[.I17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7]); ABS(['out-foreman_cif-i420'.H17]); ABS(['out-mobile_cif'.H17]); ABS(['out-city_4cif'.H17]))" office:value-type="float" office:value="5.2575">
            <text:p>5.26</text:p>
          </table:table-cell>
          <table:table-cell/>
          <table:table-cell table:style-name="ce3" table:formula="of:= AVERAGE(ABS(['out-stockholm_720p'.H17]); ABS(['out-sunflower_1080p-i420'.H17]); ABS(['out-crowd_run_1080p-i420'.H17]))" office:value-type="float" office:value="2.23">
            <text:p>2.23</text:p>
          </table:table-cell>
          <table:table-cell table:number-columns-repeated="2"/>
          <table:table-cell table:style-name="ce3" table:formula="of:= AVERAGE(ABS(['out-foreman_qcif-i420'.H17]); ABS(['out-mobile_cif'.H17]); ABS(['out-city_4cif'.H17]))" office:value-type="float" office:value="5.25">
            <text:p>5.25</text:p>
          </table:table-cell>
          <table:table-cell table:number-columns-repeated="2"/>
          <table:table-cell table:style-name="ce3" table:formula="of:= AVERAGE(ABS(['out-foreman_qcif-i420'.F17]); ABS(['out-foreman_cif-i420'.F17]); ABS(['out-mobile_cif'.F17]); ABS(['out-city_4cif'.F17]))" office:value-type="float" office:value="1.5954174505141">
            <text:p>1.60</text:p>
          </table:table-cell>
          <table:table-cell table:style-name="ce3" table:formula="of:= AVERAGE(ABS(['out-stockholm_720p'.F17]); ABS(['out-sunflower_1080p-i420'.F17]); ABS(['out-crowd_run_1080p-i420'.F17]))" office:value-type="float" office:value="1.76925654433399">
            <text:p>1.77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7" office:value-type="string">
            <text:p>sub21trunc2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18]; ['out-foreman_cif-i420'.F18]; ['out-mobile_cif'.F18]; ['out-city_4cif'.F18]; ['out-stockholm_720p'.F18]; ['out-sunflower_1080p-i420'.F18]; ['out-crowd_run_1080p-i420'.F18])" office:value-type="float" office:value="1.01960443921495">
            <text:p>1.02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18]); ABS(['out-foreman_cif-i420'.H18]); ABS(['out-mobile_cif'.H18]); ABS(['out-city_4cif'.H18]); ABS(['out-stockholm_720p'.H18]); ABS(['out-sunflower_1080p-i420'.H18]); ABS(['out-crowd_run_1080p-i420'.H18]))" office:value-type="float" office:value="5">
            <text:p>5</text:p>
          </table:table-cell>
          <table:table-cell table:style-name="ce86" office:value-type="string">
            <text:p>-</text:p>
          </table:table-cell>
          <table:table-cell table:style-name="ce47" table:formula="of:=[.F18]*[.I18]" office:value-type="float" office:value="-0">
            <text:p>0.0000</text:p>
          </table:table-cell>
          <table:table-cell table:style-name="ce47" table:formula="of:=[.G18]*[.I18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8]); ABS(['out-foreman_cif-i420'.H18]); ABS(['out-mobile_cif'.H18]); ABS(['out-city_4cif'.H18]))" office:value-type="float" office:value="5.9675">
            <text:p>5.97</text:p>
          </table:table-cell>
          <table:table-cell/>
          <table:table-cell table:style-name="ce3" table:formula="of:= AVERAGE(ABS(['out-stockholm_720p'.H18]); ABS(['out-sunflower_1080p-i420'.H18]); ABS(['out-crowd_run_1080p-i420'.H18]))" office:value-type="float" office:value="3.71">
            <text:p>3.71</text:p>
          </table:table-cell>
          <table:table-cell table:number-columns-repeated="2"/>
          <table:table-cell table:style-name="ce3" table:formula="of:= AVERAGE(ABS(['out-foreman_qcif-i420'.H18]); ABS(['out-mobile_cif'.H18]); ABS(['out-city_4cif'.H18]))" office:value-type="float" office:value="6.03666666666667">
            <text:p>6.04</text:p>
          </table:table-cell>
          <table:table-cell table:number-columns-repeated="2"/>
          <table:table-cell table:style-name="ce3" table:formula="of:= AVERAGE(ABS(['out-foreman_qcif-i420'.F18]); ABS(['out-foreman_cif-i420'.F18]); ABS(['out-mobile_cif'.F18]); ABS(['out-city_4cif'.F18]))" office:value-type="float" office:value="0.934446712703363">
            <text:p>0.93</text:p>
          </table:table-cell>
          <table:table-cell table:style-name="ce3" table:formula="of:= AVERAGE(ABS(['out-stockholm_720p'.F18]); ABS(['out-sunflower_1080p-i420'.F18]); ABS(['out-crowd_run_1080p-i420'.F18]))" office:value-type="float" office:value="1.13314807456374">
            <text:p>1.13</text:p>
          </table:table-cell>
        </table:table-row>
        <table:table-row table:style-name="ro1">
          <table:table-cell table:style-name="ce6" office:value-type="string">
            <text:p>14</text:p>
          </table:table-cell>
          <table:table-cell table:style-name="ce17" office:value-type="string">
            <text:p>sub21trunc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19]; ['out-foreman_cif-i420'.F19]; ['out-mobile_cif'.F19]; ['out-city_4cif'.F19]; ['out-stockholm_720p'.F19]; ['out-sunflower_1080p-i420'.F19]; ['out-crowd_run_1080p-i420'.F19])" office:value-type="float" office:value="1.11292850003682">
            <text:p>1.11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19]); ABS(['out-foreman_cif-i420'.H19]); ABS(['out-mobile_cif'.H19]); ABS(['out-city_4cif'.H19]); ABS(['out-stockholm_720p'.H19]); ABS(['out-sunflower_1080p-i420'.H19]); ABS(['out-crowd_run_1080p-i420'.H19]))" office:value-type="float" office:value="5.62857142857143">
            <text:p>5.63</text:p>
          </table:table-cell>
          <table:table-cell table:style-name="ce86" office:value-type="string">
            <text:p>-</text:p>
          </table:table-cell>
          <table:table-cell table:style-name="ce47" table:formula="of:=[.F19]*[.I19]" office:value-type="float" office:value="-0">
            <text:p>0.0000</text:p>
          </table:table-cell>
          <table:table-cell table:style-name="ce47" table:formula="of:=[.G19]*[.I19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19]); ABS(['out-foreman_cif-i420'.H19]); ABS(['out-mobile_cif'.H19]); ABS(['out-city_4cif'.H19]))" office:value-type="float" office:value="6.6625">
            <text:p>6.66</text:p>
          </table:table-cell>
          <table:table-cell/>
          <table:table-cell table:style-name="ce3" table:formula="of:= AVERAGE(ABS(['out-stockholm_720p'.H19]); ABS(['out-sunflower_1080p-i420'.H19]); ABS(['out-crowd_run_1080p-i420'.H19]))" office:value-type="float" office:value="4.25">
            <text:p>4.25</text:p>
          </table:table-cell>
          <table:table-cell table:number-columns-repeated="2"/>
          <table:table-cell table:style-name="ce3" table:formula="of:= AVERAGE(ABS(['out-foreman_qcif-i420'.H19]); ABS(['out-mobile_cif'.H19]); ABS(['out-city_4cif'.H19]))" office:value-type="float" office:value="6.66333333333334">
            <text:p>6.66</text:p>
          </table:table-cell>
          <table:table-cell table:number-columns-repeated="2"/>
          <table:table-cell table:style-name="ce3" table:formula="of:= AVERAGE(ABS(['out-foreman_qcif-i420'.F19]); ABS(['out-foreman_cif-i420'.F19]); ABS(['out-mobile_cif'.F19]); ABS(['out-city_4cif'.F19]))" office:value-type="float" office:value="1.00291540651785">
            <text:p>1.00</text:p>
          </table:table-cell>
          <table:table-cell table:style-name="ce3" table:formula="of:= AVERAGE(ABS(['out-stockholm_720p'.F19]); ABS(['out-sunflower_1080p-i420'.F19]); ABS(['out-crowd_run_1080p-i420'.F19]))" office:value-type="float" office:value="1.25961262472879">
            <text:p>1.26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7" office:value-type="string">
            <text:p>sub41trunc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20]; ['out-foreman_cif-i420'.F20]; ['out-mobile_cif'.F20]; ['out-city_4cif'.F20]; ['out-stockholm_720p'.F20]; ['out-sunflower_1080p-i420'.F20]; ['out-crowd_run_1080p-i420'.F20])" office:value-type="float" office:value="1.86648725983331">
            <text:p>1.87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20]); ABS(['out-foreman_cif-i420'.H20]); ABS(['out-mobile_cif'.H20]); ABS(['out-city_4cif'.H20]); ABS(['out-stockholm_720p'.H20]); ABS(['out-sunflower_1080p-i420'.H20]); ABS(['out-crowd_run_1080p-i420'.H20]))" office:value-type="float" office:value="4.18285714285714">
            <text:p>4.18</text:p>
          </table:table-cell>
          <table:table-cell table:style-name="ce86" office:value-type="string">
            <text:p>-</text:p>
          </table:table-cell>
          <table:table-cell table:style-name="ce47" table:formula="of:=[.F20]*[.I20]" office:value-type="float" office:value="-0">
            <text:p>0.0000</text:p>
          </table:table-cell>
          <table:table-cell table:style-name="ce47" table:formula="of:=[.G20]*[.I20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20]); ABS(['out-foreman_cif-i420'.H20]); ABS(['out-mobile_cif'.H20]); ABS(['out-city_4cif'.H20]))" office:value-type="float" office:value="5.505">
            <text:p>5.51</text:p>
          </table:table-cell>
          <table:table-cell/>
          <table:table-cell table:style-name="ce3" table:formula="of:= AVERAGE(ABS(['out-stockholm_720p'.H20]); ABS(['out-sunflower_1080p-i420'.H20]); ABS(['out-crowd_run_1080p-i420'.H20]))" office:value-type="float" office:value="2.42">
            <text:p>2.42</text:p>
          </table:table-cell>
          <table:table-cell table:number-columns-repeated="2"/>
          <table:table-cell table:style-name="ce3" table:formula="of:= AVERAGE(ABS(['out-foreman_qcif-i420'.H20]); ABS(['out-mobile_cif'.H20]); ABS(['out-city_4cif'.H20]))" office:value-type="float" office:value="5.49">
            <text:p>5.49</text:p>
          </table:table-cell>
          <table:table-cell table:number-columns-repeated="2"/>
          <table:table-cell table:style-name="ce3" table:formula="of:= AVERAGE(ABS(['out-foreman_qcif-i420'.F20]); ABS(['out-foreman_cif-i420'.F20]); ABS(['out-mobile_cif'.F20]); ABS(['out-city_4cif'.F20]))" office:value-type="float" office:value="1.73299695591704">
            <text:p>1.73</text:p>
          </table:table-cell>
          <table:table-cell table:style-name="ce3" table:formula="of:= AVERAGE(ABS(['out-stockholm_720p'.F20]); ABS(['out-sunflower_1080p-i420'.F20]); ABS(['out-crowd_run_1080p-i420'.F20]))" office:value-type="float" office:value="2.04447433172167">
            <text:p>2.04</text:p>
          </table:table-cell>
        </table:table-row>
        <table:table-row table:style-name="ro1">
          <table:table-cell table:style-name="ce6" office:value-type="string">
            <text:p>18</text:p>
          </table:table-cell>
          <table:table-cell table:style-name="ce17" office:value-type="string">
            <text:p>sub21trunc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21]; ['out-foreman_cif-i420'.F21]; ['out-mobile_cif'.F21]; ['out-city_4cif'.F21]; ['out-stockholm_720p'.F21]; ['out-sunflower_1080p-i420'.F21]; ['out-crowd_run_1080p-i420'.F21])" office:value-type="float" office:value="1.24428678176255">
            <text:p>1.24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21]); ABS(['out-foreman_cif-i420'.H21]); ABS(['out-mobile_cif'.H21]); ABS(['out-city_4cif'.H21]); ABS(['out-stockholm_720p'.H21]); ABS(['out-sunflower_1080p-i420'.H21]); ABS(['out-crowd_run_1080p-i420'.H21]))" office:value-type="float" office:value="6.29571428571429">
            <text:p>6.30</text:p>
          </table:table-cell>
          <table:table-cell table:style-name="ce86" office:value-type="string">
            <text:p>-</text:p>
          </table:table-cell>
          <table:table-cell table:style-name="ce47" table:formula="of:=[.F21]*[.I21]" office:value-type="float" office:value="-0">
            <text:p>0.0000</text:p>
          </table:table-cell>
          <table:table-cell table:style-name="ce47" table:formula="of:=[.G21]*[.I21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21]); ABS(['out-foreman_cif-i420'.H21]); ABS(['out-mobile_cif'.H21]); ABS(['out-city_4cif'.H21]))" office:value-type="float" office:value="7.5275">
            <text:p>7.53</text:p>
          </table:table-cell>
          <table:table-cell/>
          <table:table-cell table:style-name="ce3" table:formula="of:= AVERAGE(ABS(['out-stockholm_720p'.H21]); ABS(['out-sunflower_1080p-i420'.H21]); ABS(['out-crowd_run_1080p-i420'.H21]))" office:value-type="float" office:value="4.65333333333334">
            <text:p>4.65</text:p>
          </table:table-cell>
          <table:table-cell table:number-columns-repeated="2"/>
          <table:table-cell table:style-name="ce3" table:formula="of:= AVERAGE(ABS(['out-foreman_qcif-i420'.H21]); ABS(['out-mobile_cif'.H21]); ABS(['out-city_4cif'.H21]))" office:value-type="float" office:value="7.44666666666667">
            <text:p>7.45</text:p>
          </table:table-cell>
          <table:table-cell table:number-columns-repeated="2"/>
          <table:table-cell table:style-name="ce3" table:formula="of:= AVERAGE(ABS(['out-foreman_qcif-i420'.F21]); ABS(['out-foreman_cif-i420'.F21]); ABS(['out-mobile_cif'.F21]); ABS(['out-city_4cif'.F21]))" office:value-type="float" office:value="1.1013600896912">
            <text:p>1.10</text:p>
          </table:table-cell>
          <table:table-cell table:style-name="ce3" table:formula="of:= AVERAGE(ABS(['out-stockholm_720p'.F21]); ABS(['out-sunflower_1080p-i420'.F21]); ABS(['out-crowd_run_1080p-i420'.F21]))" office:value-type="float" office:value="1.43485570452435">
            <text:p>1.43</text:p>
          </table:table-cell>
        </table:table-row>
        <table:table-row table:style-name="ro1">
          <table:table-cell table:style-name="ce6" office:value-type="string">
            <text:p>19</text:p>
          </table:table-cell>
          <table:table-cell table:style-name="ce17" office:value-type="string">
            <text:p>sub41trunc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AVERAGE(['out-foreman_qcif-i420'.F22]; ['out-foreman_cif-i420'.F22]; ['out-mobile_cif'.F22]; ['out-city_4cif'.F22]; ['out-stockholm_720p'.F22]; ['out-sunflower_1080p-i420'.F22]; ['out-crowd_run_1080p-i420'.F22])" office:value-type="float" office:value="2.06378468848684">
            <text:p>2.06</text:p>
          </table:table-cell>
          <table:table-cell table:style-name="ce84" office:value-type="string">
            <text:p>-</text:p>
          </table:table-cell>
          <table:table-cell table:style-name="ce35" table:formula="of:= AVERAGE(ABS(['out-foreman_qcif-i420'.H22]); ABS(['out-foreman_cif-i420'.H22]); ABS(['out-mobile_cif'.H22]); ABS(['out-city_4cif'.H22]); ABS(['out-stockholm_720p'.H22]); ABS(['out-sunflower_1080p-i420'.H22]); ABS(['out-crowd_run_1080p-i420'.H22]))" office:value-type="float" office:value="4.55">
            <text:p>4.55</text:p>
          </table:table-cell>
          <table:table-cell table:style-name="ce86" office:value-type="string">
            <text:p>-</text:p>
          </table:table-cell>
          <table:table-cell table:style-name="ce47" table:formula="of:=[.F22]*[.I22]" office:value-type="float" office:value="-0">
            <text:p>0.0000</text:p>
          </table:table-cell>
          <table:table-cell table:style-name="ce47" table:formula="of:=[.G22]*[.I22]" office:value-type="float" office:value="0">
            <text:p>0.0000</text:p>
          </table:table-cell>
          <table:table-cell table:number-columns-repeated="5"/>
          <table:table-cell table:style-name="ce3" table:formula="of:= AVERAGE(ABS(['out-foreman_qcif-i420'.H22]); ABS(['out-foreman_cif-i420'.H22]); ABS(['out-mobile_cif'.H22]); ABS(['out-city_4cif'.H22]))" office:value-type="float" office:value="5.895">
            <text:p>5.90</text:p>
          </table:table-cell>
          <table:table-cell/>
          <table:table-cell table:style-name="ce3" table:formula="of:= AVERAGE(ABS(['out-stockholm_720p'.H22]); ABS(['out-sunflower_1080p-i420'.H22]); ABS(['out-crowd_run_1080p-i420'.H22]))" office:value-type="float" office:value="2.75666666666667">
            <text:p>2.76</text:p>
          </table:table-cell>
          <table:table-cell table:number-columns-repeated="2"/>
          <table:table-cell table:style-name="ce3" table:formula="of:= AVERAGE(ABS(['out-foreman_qcif-i420'.H22]); ABS(['out-mobile_cif'.H22]); ABS(['out-city_4cif'.H22]))" office:value-type="float" office:value="5.88666666666667">
            <text:p>5.89</text:p>
          </table:table-cell>
          <table:table-cell table:number-columns-repeated="2"/>
          <table:table-cell table:style-name="ce3" table:formula="of:= AVERAGE(ABS(['out-foreman_qcif-i420'.F22]); ABS(['out-foreman_cif-i420'.F22]); ABS(['out-mobile_cif'.F22]); ABS(['out-city_4cif'.F22]))" office:value-type="float" office:value="1.89186283245657">
            <text:p>1.89</text:p>
          </table:table-cell>
          <table:table-cell table:style-name="ce3" table:formula="of:= AVERAGE(ABS(['out-stockholm_720p'.F22]); ABS(['out-sunflower_1080p-i420'.F22]); ABS(['out-crowd_run_1080p-i420'.F22]))" office:value-type="float" office:value="2.29301382986053">
            <text:p>2.29</text:p>
          </table:table-cell>
        </table:table-row>
        <table:table-row table:style-name="ro1">
          <table:table-cell table:style-name="ce6"/>
          <table:table-cell table:style-name="ce3"/>
          <table:table-cell table:style-name="ce9" table:number-columns-repeated="2"/>
          <table:table-cell table:style-name="ce24"/>
          <table:table-cell table:style-name="ce30"/>
          <table:table-cell/>
          <table:table-cell table:style-name="ce3" table:number-columns-repeated="3"/>
          <table:table-cell table:number-columns-repeated="8"/>
          <table:table-cell table:style-name="ce3"/>
          <table:table-cell table:number-columns-repeated="7"/>
        </table:table-row>
        <table:table-row table:style-name="ro1">
          <table:table-cell table:style-name="ce6"/>
          <table:table-cell table:style-name="ce18" office:value-type="string">
            <text:p>mean trunc</text:p>
          </table:table-cell>
          <table:table-cell table:style-name="ce9" table:number-columns-repeated="2"/>
          <table:table-cell table:style-name="ce24"/>
          <table:table-cell table:style-name="ce30" table:formula="of:=AVERAGE([.F5:.F11])" office:value-type="float" office:value="2.5677756494635">
            <text:p>2.57</text:p>
          </table:table-cell>
          <table:table-cell table:number-columns-repeated="2"/>
          <table:table-cell table:style-name="ce3" table:number-columns-repeated="2"/>
          <table:table-cell/>
          <table:table-cell table:style-name="ce12" office:value-type="string">
            <text:p>mean trunc (where diff &lt;= 0.5 db)</text:p>
          </table:table-cell>
          <table:table-cell table:number-columns-repeated="2"/>
          <table:table-cell table:formula="of:=AVERAGE([.F5:.F8])" office:value-type="float" office:value="1.80248288153962">
            <text:p>1.80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18" office:value-type="string">
            <text:p>mean sub</text:p>
          </table:table-cell>
          <table:table-cell table:style-name="ce9" table:number-columns-repeated="2"/>
          <table:table-cell table:style-name="ce24"/>
          <table:table-cell table:style-name="ce30" table:formula="of:= AVERAGE([.F12:.F14])" office:value-type="float" office:value="2.40894996697609">
            <text:p>2.41</text:p>
          </table:table-cell>
          <table:table-cell/>
          <table:table-cell table:style-name="ce3" table:number-columns-repeated="3"/>
          <table:table-cell table:number-columns-repeated="4"/>
          <table:table-cell table:formula="of:=AVERAGE([.F12:.F13])" office:value-type="float" office:value="2.06847725075869">
            <text:p>2.07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18" office:value-type="string">
            <text:p>mean comb</text:p>
          </table:table-cell>
          <table:table-cell table:style-name="ce9" table:number-columns-repeated="2"/>
          <table:table-cell table:style-name="ce24"/>
          <table:table-cell table:style-name="ce30" table:formula="of:=AVERAGE([.F15:.F22])" office:value-type="float" office:value="1.70391149407802">
            <text:p>1.70</text:p>
          </table:table-cell>
          <table:table-cell/>
          <table:table-cell table:style-name="ce3" table:number-columns-repeated="3"/>
          <table:table-cell table:number-columns-repeated="4"/>
          <table:table-cell table:formula="of:=AVERAGE([.F15:.F16])" office:value-type="float" office:value="2.32714018199781">
            <text:p>2.33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3"/>
          <table:table-cell table:style-name="ce9" table:number-columns-repeated="2"/>
          <table:table-cell table:style-name="ce24"/>
          <table:table-cell table:style-name="ce30"/>
          <table:table-cell/>
          <table:table-cell table:style-name="ce3" table:number-columns-repeated="3"/>
          <table:table-cell table:number-columns-repeated="16"/>
        </table:table-row>
        <table:table-row table:style-name="ro1" table:number-rows-repeated="65509">
          <table:table-cell/>
          <table:table-cell table:style-name="ce3"/>
          <table:table-cell table:style-name="ce9" table:number-columns-repeated="2"/>
          <table:table-cell table:style-name="ce24"/>
          <table:table-cell table:style-name="ce30"/>
          <table:table-cell/>
          <table:table-cell table:style-name="ce3" table:number-columns-repeated="3"/>
          <table:table-cell table:number-columns-repeated="16"/>
        </table:table-row>
        <table:table-row table:style-name="ro1" table:number-rows-repeated="98303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out-max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46" table:default-cell-style-name="ce9"/>
        <table:table-column table:style-name="co20" table:visibility="collapse" table:default-cell-style-name="ce9"/>
        <table:table-column table:style-name="co21" table:visibility="collapse" table:default-cell-style-name="ce24"/>
        <table:table-column table:style-name="co47" table:default-cell-style-name="ce30"/>
        <table:table-column table:style-name="co46" table:default-cell-style-name="Default"/>
        <table:table-column table:style-name="co23" table:default-cell-style-name="ce3"/>
        <table:table-column table:style-name="co48" table:number-columns-repeated="2" table:default-cell-style-name="ce3"/>
        <table:table-column table:style-name="co49" table:default-cell-style-name="Default"/>
        <table:table-row table:style-name="ro1">
          <table:table-cell table:style-name="ce12" office:value-type="string">
            <text:p>max</text:p>
          </table:table-cell>
          <table:table-cell table:style-name="Default" office:value-type="string">
            <text:p>Videos: Foreman QCIF (i420), Foreman CIF, Mobile CIF, City 4CIF, Stockholm 720p, Crown Run 1080p, Sunflower 1080p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8" office:value-type="string">
            <text:p>Total speed up / PSNR → orig/opt</text:p>
          </table:table-cell>
          <table:table-cell/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 table:style-name="ce18" office:value-type="string">
            <text:p>ME speed up * PSNR → opt/orig</text:p>
          </table:table-cell>
        </table:table-row>
        <table:table-row table:style-name="ro1">
          <table:table-cell table:style-name="ce6" office:value-type="string">
            <text:p>01</text:p>
          </table:table-cell>
          <table:table-cell table:style-name="ce13" office:value-type="string">
            <text:p>orig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32" table:formula="of:= MAX(['out-foreman_cif-i420'.F4]; ['out-mobile_cif'.F4]; ['out-city_4cif'.F4]; ['out-stockholm_720p'.F4]; ['out-sunflower_1080p-i420'.F4]; ['out-crowd_run_1080p-i420'.F4]; [combinacoes.F4])" office:value-type="float" office:value="1">
            <text:p>1</text:p>
          </table:table-cell>
          <table:table-cell table:style-name="ce32" office:value-type="string">
            <text:p>-</text:p>
          </table:table-cell>
          <table:table-cell table:style-name="ce32" table:formula="of:= MAX(ABS(['out-foreman_cif-i420'.H4]); ABS(['out-mobile_cif'.H4]); ABS(['out-city_4cif'.H4]); ABS(['out-stockholm_720p'.H4]); ABS(['out-sunflower_1080p-i420'.H4]); ABS(['out-crowd_run_1080p-i420'.H4]); ABS([combinacoes.H4]))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42" table:formula="of:=[.F4]*[.I4]" office:value-type="float" office:value="-0">
            <text:p>0.0000</text:p>
          </table:table-cell>
          <table:table-cell table:style-name="ce42" table:formula="of:=[.G4]*[.I4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5</text:p>
          </table:table-cell>
          <table:table-cell table:style-name="ce14" office:value-type="string">
            <text:p>trunc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5]; ['out-mobile_cif'.F5]; ['out-city_4cif'.F5]; ['out-stockholm_720p'.F5]; ['out-sunflower_1080p-i420'.F5]; ['out-crowd_run_1080p-i420'.F5]; [combinacoes.F5])" office:value-type="float" office:value="1.25819107716712">
            <text:p>1.26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5]); ABS(['out-mobile_cif'.H5]); ABS(['out-city_4cif'.H5]); ABS(['out-stockholm_720p'.H5]); ABS(['out-sunflower_1080p-i420'.H5]); ABS(['out-crowd_run_1080p-i420'.H5]); ABS([combinacoes.H5]))" office:value-type="float" office:value="0.140000000000001">
            <text:p>0.14</text:p>
          </table:table-cell>
          <table:table-cell table:style-name="ce39" office:value-type="string">
            <text:p>-</text:p>
          </table:table-cell>
          <table:table-cell table:style-name="ce43" table:formula="of:=[.F5]*[.I5]" office:value-type="float" office:value="-0">
            <text:p>0.0000</text:p>
          </table:table-cell>
          <table:table-cell table:style-name="ce43" table:formula="of:=[.G5]*[.I5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9</text:p>
          </table:table-cell>
          <table:table-cell table:style-name="ce14" office:value-type="string">
            <text:p>trunc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6]; ['out-mobile_cif'.F6]; ['out-city_4cif'.F6]; ['out-stockholm_720p'.F6]; ['out-sunflower_1080p-i420'.F6]; ['out-crowd_run_1080p-i420'.F6]; [combinacoes.F6])" office:value-type="float" office:value="1.987498956674">
            <text:p>1.99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6]); ABS(['out-mobile_cif'.H6]); ABS(['out-city_4cif'.H6]); ABS(['out-stockholm_720p'.H6]); ABS(['out-sunflower_1080p-i420'.H6]); ABS(['out-crowd_run_1080p-i420'.H6]); ABS([combinacoes.H6]))" office:value-type="float" office:value="0.169999999999995">
            <text:p>0.17</text:p>
          </table:table-cell>
          <table:table-cell table:style-name="ce39" office:value-type="string">
            <text:p>-</text:p>
          </table:table-cell>
          <table:table-cell table:style-name="ce43" table:formula="of:=[.F6]*[.I6]" office:value-type="float" office:value="-0">
            <text:p>0.0000</text:p>
          </table:table-cell>
          <table:table-cell table:style-name="ce43" table:formula="of:=[.G6]*[.I6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3</text:p>
          </table:table-cell>
          <table:table-cell table:style-name="ce14" office:value-type="string">
            <text:p>trunc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7]; ['out-mobile_cif'.F7]; ['out-city_4cif'.F7]; ['out-stockholm_720p'.F7]; ['out-sunflower_1080p-i420'.F7]; ['out-crowd_run_1080p-i420'.F7]; [combinacoes.F7])" office:value-type="float" office:value="2.82193831238417">
            <text:p>2.82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7]); ABS(['out-mobile_cif'.H7]); ABS(['out-city_4cif'.H7]); ABS(['out-stockholm_720p'.H7]); ABS(['out-sunflower_1080p-i420'.H7]); ABS(['out-crowd_run_1080p-i420'.H7]); ABS([combinacoes.H7]))" office:value-type="float" office:value="0.210000000000001">
            <text:p>0.21</text:p>
          </table:table-cell>
          <table:table-cell table:style-name="ce39" office:value-type="string">
            <text:p>-</text:p>
          </table:table-cell>
          <table:table-cell table:style-name="ce43" table:formula="of:=[.F7]*[.I7]" office:value-type="float" office:value="-0">
            <text:p>0.0000</text:p>
          </table:table-cell>
          <table:table-cell table:style-name="ce43" table:formula="of:=[.G7]*[.I7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7</text:p>
          </table:table-cell>
          <table:table-cell table:style-name="ce14" office:value-type="string">
            <text:p>trunc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8]; ['out-mobile_cif'.F8]; ['out-city_4cif'.F8]; ['out-stockholm_720p'.F8]; ['out-sunflower_1080p-i420'.F8]; ['out-crowd_run_1080p-i420'.F8]; [combinacoes.F8])" office:value-type="float" office:value="3.37995704667456">
            <text:p>3.38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8]); ABS(['out-mobile_cif'.H8]); ABS(['out-city_4cif'.H8]); ABS(['out-stockholm_720p'.H8]); ABS(['out-sunflower_1080p-i420'.H8]); ABS(['out-crowd_run_1080p-i420'.H8]); ABS([combinacoes.H8]))" office:value-type="float" office:value="0.579999999999998">
            <text:p>0.58</text:p>
          </table:table-cell>
          <table:table-cell table:style-name="ce39" office:value-type="string">
            <text:p>-</text:p>
          </table:table-cell>
          <table:table-cell table:style-name="ce43" table:formula="of:=[.F8]*[.I8]" office:value-type="float" office:value="-0">
            <text:p>0.0000</text:p>
          </table:table-cell>
          <table:table-cell table:style-name="ce43" table:formula="of:=[.G8]*[.I8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21</text:p>
          </table:table-cell>
          <table:table-cell table:style-name="ce14" office:value-type="string">
            <text:p>trunc5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9]; ['out-mobile_cif'.F9]; ['out-city_4cif'.F9]; ['out-stockholm_720p'.F9]; ['out-sunflower_1080p-i420'.F9]; ['out-crowd_run_1080p-i420'.F9]; [combinacoes.F9])" office:value-type="float" office:value="4.00576518455783">
            <text:p>4.01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9]); ABS(['out-mobile_cif'.H9]); ABS(['out-city_4cif'.H9]); ABS(['out-stockholm_720p'.H9]); ABS(['out-sunflower_1080p-i420'.H9]); ABS(['out-crowd_run_1080p-i420'.H9]); ABS([combinacoes.H9]))" office:value-type="float" office:value="1.34">
            <text:p>1.34</text:p>
          </table:table-cell>
          <table:table-cell table:style-name="ce39" office:value-type="string">
            <text:p>-</text:p>
          </table:table-cell>
          <table:table-cell table:style-name="ce43" table:formula="of:=[.F9]*[.I9]" office:value-type="float" office:value="-0">
            <text:p>0.0000</text:p>
          </table:table-cell>
          <table:table-cell table:style-name="ce43" table:formula="of:=[.G9]*[.I9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25</text:p>
          </table:table-cell>
          <table:table-cell table:style-name="ce14" office:value-type="string">
            <text:p>trunc6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10]; ['out-mobile_cif'.F10]; ['out-city_4cif'.F10]; ['out-stockholm_720p'.F10]; ['out-sunflower_1080p-i420'.F10]; ['out-crowd_run_1080p-i420'.F10]; [combinacoes.F10])" office:value-type="float" office:value="4.14021778659753">
            <text:p>4.14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10]); ABS(['out-mobile_cif'.H10]); ABS(['out-city_4cif'.H10]); ABS(['out-stockholm_720p'.H10]); ABS(['out-sunflower_1080p-i420'.H10]); ABS(['out-crowd_run_1080p-i420'.H10]); ABS([combinacoes.H10]))" office:value-type="float" office:value="3.19">
            <text:p>3.19</text:p>
          </table:table-cell>
          <table:table-cell table:style-name="ce39" office:value-type="string">
            <text:p>-</text:p>
          </table:table-cell>
          <table:table-cell table:style-name="ce87" table:formula="of:=[.F10]*[.I10]" office:value-type="float" office:value="-0">
            <text:p>0.0000</text:p>
          </table:table-cell>
          <table:table-cell table:style-name="ce87" table:formula="of:=[.G10]*[.I10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29</text:p>
          </table:table-cell>
          <table:table-cell table:style-name="ce14" office:value-type="string">
            <text:p>trunc7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33" table:formula="of:= MAX(['out-foreman_cif-i420'.F11]; ['out-mobile_cif'.F11]; ['out-city_4cif'.F11]; ['out-stockholm_720p'.F11]; ['out-sunflower_1080p-i420'.F11]; ['out-crowd_run_1080p-i420'.F11]; [combinacoes.F11])" office:value-type="float" office:value="4.23387768732229">
            <text:p>4.23</text:p>
          </table:table-cell>
          <table:table-cell table:style-name="ce33" office:value-type="string">
            <text:p>-</text:p>
          </table:table-cell>
          <table:table-cell table:style-name="ce33" table:formula="of:= MAX(ABS(['out-foreman_cif-i420'.H11]); ABS(['out-mobile_cif'.H11]); ABS(['out-city_4cif'.H11]); ABS(['out-stockholm_720p'.H11]); ABS(['out-sunflower_1080p-i420'.H11]); ABS(['out-crowd_run_1080p-i420'.H11]); ABS([combinacoes.H11]))" office:value-type="float" office:value="7.25">
            <text:p>7.25</text:p>
          </table:table-cell>
          <table:table-cell table:style-name="ce39" office:value-type="string">
            <text:p>-</text:p>
          </table:table-cell>
          <table:table-cell table:style-name="ce43" table:formula="of:=[.F11]*[.I11]" office:value-type="float" office:value="-0">
            <text:p>0.0000</text:p>
          </table:table-cell>
          <table:table-cell table:style-name="ce43" table:formula="of:=[.G11]*[.I11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2</text:p>
          </table:table-cell>
          <table:table-cell table:style-name="ce15" office:value-type="string">
            <text:p>sub2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MAX(['out-foreman_cif-i420'.F12]; ['out-mobile_cif'.F12]; ['out-city_4cif'.F12]; ['out-stockholm_720p'.F12]; ['out-sunflower_1080p-i420'.F12]; ['out-crowd_run_1080p-i420'.F12]; [combinacoes.F12])" office:value-type="float" office:value="1.81710028342074">
            <text:p>1.82</text:p>
          </table:table-cell>
          <table:table-cell table:style-name="ce78" office:value-type="string">
            <text:p>-</text:p>
          </table:table-cell>
          <table:table-cell table:style-name="ce78" table:formula="of:= MAX(ABS(['out-foreman_cif-i420'.H12]); ABS(['out-mobile_cif'.H12]); ABS(['out-city_4cif'.H12]); ABS(['out-stockholm_720p'.H12]); ABS(['out-sunflower_1080p-i420'.H12]); ABS(['out-crowd_run_1080p-i420'.H12]); ABS([combinacoes.H12]))" office:value-type="float" office:value="0.240000000000002">
            <text:p>0.24</text:p>
          </table:table-cell>
          <table:table-cell table:style-name="ce85" office:value-type="string">
            <text:p>-</text:p>
          </table:table-cell>
          <table:table-cell table:style-name="ce45" table:formula="of:=[.F12]*[.I12]" office:value-type="float" office:value="-0">
            <text:p>0.0000</text:p>
          </table:table-cell>
          <table:table-cell table:style-name="ce45" table:formula="of:=[.G12]*[.I12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3</text:p>
          </table:table-cell>
          <table:table-cell table:style-name="ce15" office:value-type="string">
            <text:p>sub4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MAX(['out-foreman_cif-i420'.F13]; ['out-mobile_cif'.F13]; ['out-city_4cif'.F13]; ['out-stockholm_720p'.F13]; ['out-sunflower_1080p-i420'.F13]; ['out-crowd_run_1080p-i420'.F13]; [combinacoes.F13])" office:value-type="float" office:value="2.7548431804205">
            <text:p>2.75</text:p>
          </table:table-cell>
          <table:table-cell table:style-name="ce78" office:value-type="string">
            <text:p>-</text:p>
          </table:table-cell>
          <table:table-cell table:style-name="ce78" table:formula="of:= MAX(ABS(['out-foreman_cif-i420'.H13]); ABS(['out-mobile_cif'.H13]); ABS(['out-city_4cif'.H13]); ABS(['out-stockholm_720p'.H13]); ABS(['out-sunflower_1080p-i420'.H13]); ABS(['out-crowd_run_1080p-i420'.H13]); ABS([combinacoes.H13]))" office:value-type="float" office:value="0.450000000000003">
            <text:p>0.45</text:p>
          </table:table-cell>
          <table:table-cell table:style-name="ce85" office:value-type="string">
            <text:p>-</text:p>
          </table:table-cell>
          <table:table-cell table:style-name="ce45" table:formula="of:=[.F13]*[.I13]" office:value-type="float" office:value="-0">
            <text:p>0.0000</text:p>
          </table:table-cell>
          <table:table-cell table:style-name="ce45" table:formula="of:=[.G13]*[.I13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4</text:p>
          </table:table-cell>
          <table:table-cell table:style-name="ce15" office:value-type="string">
            <text:p>sub8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8" table:formula="of:= MAX(['out-foreman_cif-i420'.F14]; ['out-mobile_cif'.F14]; ['out-city_4cif'.F14]; ['out-stockholm_720p'.F14]; ['out-sunflower_1080p-i420'.F14]; ['out-crowd_run_1080p-i420'.F14]; [combinacoes.F14])" office:value-type="float" office:value="3.52238852744663">
            <text:p>3.52</text:p>
          </table:table-cell>
          <table:table-cell table:style-name="ce78" office:value-type="string">
            <text:p>-</text:p>
          </table:table-cell>
          <table:table-cell table:style-name="ce78" table:formula="of:= MAX(ABS(['out-foreman_cif-i420'.H14]); ABS(['out-mobile_cif'.H14]); ABS(['out-city_4cif'.H14]); ABS(['out-stockholm_720p'.H14]); ABS(['out-sunflower_1080p-i420'.H14]); ABS(['out-crowd_run_1080p-i420'.H14]); ABS([combinacoes.H14]))" office:value-type="float" office:value="0.850000000000001">
            <text:p>0.85</text:p>
          </table:table-cell>
          <table:table-cell table:style-name="ce85" office:value-type="string">
            <text:p>-</text:p>
          </table:table-cell>
          <table:table-cell table:style-name="ce88" table:formula="of:=[.F14]*[.I14]" office:value-type="float" office:value="-0">
            <text:p>0.0000</text:p>
          </table:table-cell>
          <table:table-cell table:style-name="ce88" table:formula="of:=[.G14]*[.I14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1</text:p>
          </table:table-cell>
          <table:table-cell table:style-name="ce16" office:value-type="string">
            <text:p>sub41trunc2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15]; ['out-mobile_cif'.F15]; ['out-city_4cif'.F15]; ['out-stockholm_720p'.F15]; ['out-sunflower_1080p-i420'.F15]; ['out-crowd_run_1080p-i420'.F15]; [combinacoes.F15])" office:value-type="float" office:value="3.17557038195326">
            <text:p>3.18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15]); ABS(['out-mobile_cif'.H15]); ABS(['out-city_4cif'.H15]); ABS(['out-stockholm_720p'.H15]); ABS(['out-sunflower_1080p-i420'.H15]); ABS(['out-crowd_run_1080p-i420'.H15]); ABS([combinacoes.H15]))" office:value-type="float" office:value="0.480000000000004">
            <text:p>0.48</text:p>
          </table:table-cell>
          <table:table-cell table:style-name="ce86" office:value-type="string">
            <text:p>-</text:p>
          </table:table-cell>
          <table:table-cell table:style-name="ce47" table:formula="of:=[.F15]*[.I15]" office:value-type="float" office:value="-0">
            <text:p>0.0000</text:p>
          </table:table-cell>
          <table:table-cell table:style-name="ce47" table:formula="of:=[.G15]*[.I15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6</text:p>
          </table:table-cell>
          <table:table-cell table:style-name="ce17" office:value-type="string">
            <text:p>sub21trunc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16]; ['out-mobile_cif'.F16]; ['out-city_4cif'.F16]; ['out-stockholm_720p'.F16]; ['out-sunflower_1080p-i420'.F16]; ['out-crowd_run_1080p-i420'.F16]; [combinacoes.F16])" office:value-type="float" office:value="2.02801401647883">
            <text:p>2.03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16]); ABS(['out-mobile_cif'.H16]); ABS(['out-city_4cif'.H16]); ABS(['out-stockholm_720p'.H16]); ABS(['out-sunflower_1080p-i420'.H16]); ABS(['out-crowd_run_1080p-i420'.H16]); ABS([combinacoes.H16]))" office:value-type="float" office:value="0.240000000000002">
            <text:p>0.24</text:p>
          </table:table-cell>
          <table:table-cell table:style-name="ce86" office:value-type="string">
            <text:p>-</text:p>
          </table:table-cell>
          <table:table-cell table:style-name="ce47" table:formula="of:=[.F16]*[.I16]" office:value-type="float" office:value="-0">
            <text:p>0.0000</text:p>
          </table:table-cell>
          <table:table-cell table:style-name="ce47" table:formula="of:=[.G16]*[.I16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07</text:p>
          </table:table-cell>
          <table:table-cell table:style-name="ce17" office:value-type="string">
            <text:p>sub41trunc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17]; ['out-mobile_cif'.F17]; ['out-city_4cif'.F17]; ['out-stockholm_720p'.F17]; ['out-sunflower_1080p-i420'.F17]; ['out-crowd_run_1080p-i420'.F17]; [combinacoes.F17])" office:value-type="float" office:value="1.86402320359959">
            <text:p>1.86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17]); ABS(['out-mobile_cif'.H17]); ABS(['out-city_4cif'.H17]); ABS(['out-stockholm_720p'.H17]); ABS(['out-sunflower_1080p-i420'.H17]); ABS(['out-crowd_run_1080p-i420'.H17]); ABS([combinacoes.H17]))" office:value-type="float" office:value="7.18">
            <text:p>7.18</text:p>
          </table:table-cell>
          <table:table-cell table:style-name="ce86" office:value-type="string">
            <text:p>-</text:p>
          </table:table-cell>
          <table:table-cell table:style-name="ce47" table:formula="of:=[.F17]*[.I17]" office:value-type="float" office:value="-0">
            <text:p>0.0000</text:p>
          </table:table-cell>
          <table:table-cell table:style-name="ce47" table:formula="of:=[.G17]*[.I17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7" office:value-type="string">
            <text:p>sub21trunc2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18]; ['out-mobile_cif'.F18]; ['out-city_4cif'.F18]; ['out-stockholm_720p'.F18]; ['out-sunflower_1080p-i420'.F18]; ['out-crowd_run_1080p-i420'.F18]; [combinacoes.F18])" office:value-type="float" office:value="1.16292438994475">
            <text:p>1.16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18]); ABS(['out-mobile_cif'.H18]); ABS(['out-city_4cif'.H18]); ABS(['out-stockholm_720p'.H18]); ABS(['out-sunflower_1080p-i420'.H18]); ABS(['out-crowd_run_1080p-i420'.H18]); ABS([combinacoes.H18]))" office:value-type="float" office:value="7.47">
            <text:p>7.47</text:p>
          </table:table-cell>
          <table:table-cell table:style-name="ce86" office:value-type="string">
            <text:p>-</text:p>
          </table:table-cell>
          <table:table-cell table:style-name="ce47" table:formula="of:=[.F18]*[.I18]" office:value-type="float" office:value="-0">
            <text:p>0.0000</text:p>
          </table:table-cell>
          <table:table-cell table:style-name="ce47" table:formula="of:=[.G18]*[.I18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4</text:p>
          </table:table-cell>
          <table:table-cell table:style-name="ce17" office:value-type="string">
            <text:p>sub21trunc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19]; ['out-mobile_cif'.F19]; ['out-city_4cif'.F19]; ['out-stockholm_720p'.F19]; ['out-sunflower_1080p-i420'.F19]; ['out-crowd_run_1080p-i420'.F19]; [combinacoes.F19])" office:value-type="float" office:value="1.28144751150788">
            <text:p>1.28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19]); ABS(['out-mobile_cif'.H19]); ABS(['out-city_4cif'.H19]); ABS(['out-stockholm_720p'.H19]); ABS(['out-sunflower_1080p-i420'.H19]); ABS(['out-crowd_run_1080p-i420'.H19]); ABS([combinacoes.H19]))" office:value-type="float" office:value="7.55">
            <text:p>7.55</text:p>
          </table:table-cell>
          <table:table-cell table:style-name="ce86" office:value-type="string">
            <text:p>-</text:p>
          </table:table-cell>
          <table:table-cell table:style-name="ce47" table:formula="of:=[.F19]*[.I19]" office:value-type="float" office:value="-0">
            <text:p>0.0000</text:p>
          </table:table-cell>
          <table:table-cell table:style-name="ce47" table:formula="of:=[.G19]*[.I19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7" office:value-type="string">
            <text:p>sub41trunc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20]; ['out-mobile_cif'.F20]; ['out-city_4cif'.F20]; ['out-stockholm_720p'.F20]; ['out-sunflower_1080p-i420'.F20]; ['out-crowd_run_1080p-i420'.F20]; [combinacoes.F20])" office:value-type="float" office:value="2.10610461748958">
            <text:p>2.11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20]); ABS(['out-mobile_cif'.H20]); ABS(['out-city_4cif'.H20]); ABS(['out-stockholm_720p'.H20]); ABS(['out-sunflower_1080p-i420'.H20]); ABS(['out-crowd_run_1080p-i420'.H20]); ABS([combinacoes.H20]))" office:value-type="float" office:value="7.26">
            <text:p>7.26</text:p>
          </table:table-cell>
          <table:table-cell table:style-name="ce86" office:value-type="string">
            <text:p>-</text:p>
          </table:table-cell>
          <table:table-cell table:style-name="ce47" table:formula="of:=[.F20]*[.I20]" office:value-type="float" office:value="-0">
            <text:p>0.0000</text:p>
          </table:table-cell>
          <table:table-cell table:style-name="ce47" table:formula="of:=[.G20]*[.I20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8</text:p>
          </table:table-cell>
          <table:table-cell table:style-name="ce17" office:value-type="string">
            <text:p>sub21trunc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21]; ['out-mobile_cif'.F21]; ['out-city_4cif'.F21]; ['out-stockholm_720p'.F21]; ['out-sunflower_1080p-i420'.F21]; ['out-crowd_run_1080p-i420'.F21]; [combinacoes.F21])" office:value-type="float" office:value="1.47788325074023">
            <text:p>1.48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21]); ABS(['out-mobile_cif'.H21]); ABS(['out-city_4cif'.H21]); ABS(['out-stockholm_720p'.H21]); ABS(['out-sunflower_1080p-i420'.H21]); ABS(['out-crowd_run_1080p-i420'.H21]); ABS([combinacoes.H21]))" office:value-type="float" office:value="7.77">
            <text:p>7.77</text:p>
          </table:table-cell>
          <table:table-cell table:style-name="ce86" office:value-type="string">
            <text:p>-</text:p>
          </table:table-cell>
          <table:table-cell table:style-name="ce47" table:formula="of:=[.F21]*[.I21]" office:value-type="float" office:value="-0">
            <text:p>0.0000</text:p>
          </table:table-cell>
          <table:table-cell table:style-name="ce47" table:formula="of:=[.G21]*[.I21]" office:value-type="float" office:value="0">
            <text:p>0.0000</text:p>
          </table:table-cell>
        </table:table-row>
        <table:table-row table:style-name="ro1">
          <table:table-cell table:style-name="ce6" office:value-type="string">
            <text:p>19</text:p>
          </table:table-cell>
          <table:table-cell table:style-name="ce17" office:value-type="string">
            <text:p>sub41trunc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35" table:formula="of:= MAX(['out-foreman_cif-i420'.F22]; ['out-mobile_cif'.F22]; ['out-city_4cif'.F22]; ['out-stockholm_720p'.F22]; ['out-sunflower_1080p-i420'.F22]; ['out-crowd_run_1080p-i420'.F22]; [combinacoes.F22])" office:value-type="float" office:value="2.31839916516912">
            <text:p>2.32</text:p>
          </table:table-cell>
          <table:table-cell table:style-name="ce84" office:value-type="string">
            <text:p>-</text:p>
          </table:table-cell>
          <table:table-cell table:style-name="ce35" table:formula="of:= MAX(ABS(['out-foreman_cif-i420'.H22]); ABS(['out-mobile_cif'.H22]); ABS(['out-city_4cif'.H22]); ABS(['out-stockholm_720p'.H22]); ABS(['out-sunflower_1080p-i420'.H22]); ABS(['out-crowd_run_1080p-i420'.H22]); ABS([combinacoes.H22]))" office:value-type="float" office:value="7.27">
            <text:p>7.27</text:p>
          </table:table-cell>
          <table:table-cell table:style-name="ce86" office:value-type="string">
            <text:p>-</text:p>
          </table:table-cell>
          <table:table-cell table:style-name="ce47" table:formula="of:=[.F22]*[.I22]" office:value-type="float" office:value="-0">
            <text:p>0.0000</text:p>
          </table:table-cell>
          <table:table-cell table:style-name="ce47" table:formula="of:=[.G22]*[.I22]" office:value-type="float" office:value="0">
            <text:p>0.0000</text:p>
          </table:table-cell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6"/>
          <table:table-cell table:style-name="ce18" office:value-type="string">
            <text:p>mean trunc</text:p>
          </table:table-cell>
          <table:table-cell table:number-columns-repeated="3"/>
          <table:table-cell table:formula="of:=AVERAGE([.F5:.F11])" office:value-type="float" office:value="3.11820657876822">
            <text:p>3.12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8" office:value-type="string">
            <text:p>mean sub</text:p>
          </table:table-cell>
          <table:table-cell table:number-columns-repeated="3"/>
          <table:table-cell table:formula="of:= AVERAGE([.F12:.F14])" office:value-type="float" office:value="2.69811066376262">
            <text:p>2.70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8" office:value-type="string">
            <text:p>mean comb</text:p>
          </table:table-cell>
          <table:table-cell table:number-columns-repeated="3"/>
          <table:table-cell table:formula="of:=AVERAGE([.F15:.F22])" office:value-type="float" office:value="1.9267958171104">
            <text:p>1.93</text:p>
          </table:table-cell>
          <table:table-cell table:number-columns-repeated="5"/>
        </table:table-row>
        <table:table-row table:style-name="ro1">
          <table:table-cell table:style-name="ce6"/>
          <table:table-cell table:number-columns-repeated="10"/>
        </table:table-row>
        <table:table-row table:style-name="ro1" table:number-rows-repeated="6550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lean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MD5 – config file name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0">
            <text:p>0.000</text:p>
          </table:table-cell>
          <table:table-cell table:style-name="ce20" office:value-type="float" office:value="0">
            <text:p>0.000</text:p>
          </table:table-cell>
          <table:table-cell table:style-name="ce26" office:value-type="float" office:value="0">
            <text:p>0.00</text:p>
          </table:table-cell>
          <table:table-cell table:style-name="ce32" table:formula="of:=[.C4]/[.C4]" office:value-type="float" office:value="0">
            <text:p>#DIV/0!</text:p>
          </table:table-cell>
          <table:table-cell table:style-name="ce32" table:formula="of:=[.D4]/[.D4]" office:value-type="float" office:value="0">
            <text:p>#DIV/0!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0">
            <text:p>#DIV/0!</text:p>
          </table:table-cell>
          <table:table-cell table:style-name="ce42" table:formula="of:=[.F4]*[.I4]" office:value-type="float" office:value="0">
            <text:p>#DIV/0!</text:p>
          </table:table-cell>
          <table:table-cell/>
          <table:table-cell table:style-name="ce38" table:formula="of:=[.E4]/[.E4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33" table:formula="of:=[.C4]/[.C5]" office:value-type="float" office:value="0">
            <text:p>#DIV/0!</text:p>
          </table:table-cell>
          <table:table-cell table:style-name="ce33" table:formula="of:=[.D4]/[.D5]" office:value-type="float" office:value="0">
            <text:p>#DIV/0!</text:p>
          </table:table-cell>
          <table:table-cell table:style-name="ce14" table:formula="of:=[.E5] - [.E4]" office:value-type="float" office:value="0">
            <text:p>0</text:p>
          </table:table-cell>
          <table:table-cell table:style-name="ce39" table:formula="of:=[.E5]/[.E4]" office:value-type="float" office:value="0">
            <text:p>#DIV/0!</text:p>
          </table:table-cell>
          <table:table-cell table:style-name="ce43" table:formula="of:=[.F5]*[.I5]" office:value-type="float" office:value="0">
            <text:p>#DIV/0!</text:p>
          </table:table-cell>
          <table:table-cell/>
          <table:table-cell table:style-name="ce39" table:formula="of:=[.E4]/[.E5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48" table:formula="of:=[.C4]/[.C6]" office:value-type="float" office:value="0">
            <text:p>#DIV/0!</text:p>
          </table:table-cell>
          <table:table-cell table:style-name="ce33" table:formula="of:=[.D4]/[.D6]" office:value-type="float" office:value="0">
            <text:p>#DIV/0!</text:p>
          </table:table-cell>
          <table:table-cell table:style-name="ce55" table:formula="of:=[.E6] - [.E4]" office:value-type="float" office:value="0">
            <text:p>0</text:p>
          </table:table-cell>
          <table:table-cell table:style-name="ce39" table:formula="of:=[.E6]/[.E4]" office:value-type="float" office:value="0">
            <text:p>#DIV/0!</text:p>
          </table:table-cell>
          <table:table-cell table:style-name="ce43" table:formula="of:=[.F6]*[.I6]" office:value-type="float" office:value="0">
            <text:p>#DIV/0!</text:p>
          </table:table-cell>
          <table:table-cell/>
          <table:table-cell table:style-name="ce61" table:formula="of:=[.E4]/[.E6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33" table:formula="of:=[.C4]/[.C7]" office:value-type="float" office:value="0">
            <text:p>#DIV/0!</text:p>
          </table:table-cell>
          <table:table-cell table:style-name="ce33" table:formula="of:=[.D4]/[.D7]" office:value-type="float" office:value="0">
            <text:p>#DIV/0!</text:p>
          </table:table-cell>
          <table:table-cell table:style-name="ce56" table:formula="of:=[.E7] - [.E4]" office:value-type="float" office:value="0">
            <text:p>0</text:p>
          </table:table-cell>
          <table:table-cell table:style-name="ce43" table:formula="of:=[.E7]/[.E4]" office:value-type="float" office:value="0">
            <text:p>#DIV/0!</text:p>
          </table:table-cell>
          <table:table-cell table:style-name="ce43" table:formula="of:=[.F7]*[.I7]" office:value-type="float" office:value="0">
            <text:p>#DIV/0!</text:p>
          </table:table-cell>
          <table:table-cell/>
          <table:table-cell table:style-name="ce61" table:formula="of:=[.E4]/[.E7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33" table:formula="of:=[.C4]/[.C8]" office:value-type="float" office:value="0">
            <text:p>#DIV/0!</text:p>
          </table:table-cell>
          <table:table-cell table:style-name="ce33" table:formula="of:=[.D4]/[.D8]" office:value-type="float" office:value="0">
            <text:p>#DIV/0!</text:p>
          </table:table-cell>
          <table:table-cell table:style-name="ce56" table:formula="of:=[.E8] - [.E4]" office:value-type="float" office:value="0">
            <text:p>0</text:p>
          </table:table-cell>
          <table:table-cell table:style-name="ce61" table:formula="of:=[.E8]/[.E4]" office:value-type="float" office:value="0">
            <text:p>#DIV/0!</text:p>
          </table:table-cell>
          <table:table-cell table:style-name="ce43" table:formula="of:=[.F8]*[.I8]" office:value-type="float" office:value="0">
            <text:p>#DIV/0!</text:p>
          </table:table-cell>
          <table:table-cell/>
          <table:table-cell table:style-name="ce61" table:formula="of:=[.E4]/[.E8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33" table:formula="of:=[.C4]/[.C9]" office:value-type="float" office:value="0">
            <text:p>#DIV/0!</text:p>
          </table:table-cell>
          <table:table-cell table:style-name="ce33" table:formula="of:=[.D4]/[.D9]" office:value-type="float" office:value="0">
            <text:p>#DIV/0!</text:p>
          </table:table-cell>
          <table:table-cell table:style-name="ce56" table:formula="of:=[.E9] - [.E4]" office:value-type="float" office:value="0">
            <text:p>0</text:p>
          </table:table-cell>
          <table:table-cell table:style-name="ce61" table:formula="of:=[.E9]/[.E4]" office:value-type="float" office:value="0">
            <text:p>#DIV/0!</text:p>
          </table:table-cell>
          <table:table-cell table:style-name="ce43" table:formula="of:=[.F9]*[.I9]" office:value-type="float" office:value="0">
            <text:p>#DIV/0!</text:p>
          </table:table-cell>
          <table:table-cell/>
          <table:table-cell table:style-name="ce61" table:formula="of:=[.E4]/[.E9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49" table:formula="of:=[.C4]/[.C10]" office:value-type="float" office:value="0">
            <text:p>#DIV/0!</text:p>
          </table:table-cell>
          <table:table-cell table:style-name="ce49" table:formula="of:=[.D4]/[.D10]" office:value-type="float" office:value="0">
            <text:p>#DIV/0!</text:p>
          </table:table-cell>
          <table:table-cell table:style-name="ce56" table:formula="of:=[.E10] - [.E4]" office:value-type="float" office:value="0">
            <text:p>0</text:p>
          </table:table-cell>
          <table:table-cell table:style-name="ce61" table:formula="of:=[.E10]/[.E4]" office:value-type="float" office:value="0">
            <text:p>#DIV/0!</text:p>
          </table:table-cell>
          <table:table-cell table:style-name="ce43" table:formula="of:=[.F10]*[.I10]" office:value-type="float" office:value="0">
            <text:p>#DIV/0!</text:p>
          </table:table-cell>
          <table:table-cell/>
          <table:table-cell table:style-name="ce61" table:formula="of:=[.E4]/[.E10]" office:value-type="float" office:value="0">
            <text:p>#DIV/0!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0">
            <text:p>0.000</text:p>
          </table:table-cell>
          <table:table-cell table:style-name="ce21" office:value-type="float" office:value="0">
            <text:p>0.000</text:p>
          </table:table-cell>
          <table:table-cell table:style-name="ce27" office:value-type="float" office:value="0">
            <text:p>0.00</text:p>
          </table:table-cell>
          <table:table-cell table:style-name="ce49" table:formula="of:=[.C4]/[.C11]" office:value-type="float" office:value="0">
            <text:p>#DIV/0!</text:p>
          </table:table-cell>
          <table:table-cell table:style-name="ce49" table:formula="of:=[.D4]/[.D11]" office:value-type="float" office:value="0">
            <text:p>#DIV/0!</text:p>
          </table:table-cell>
          <table:table-cell table:style-name="ce56" table:formula="of:=[.E11] - [.E4]" office:value-type="float" office:value="0">
            <text:p>0</text:p>
          </table:table-cell>
          <table:table-cell table:style-name="ce61" table:formula="of:=[.E11]/[.E4]" office:value-type="float" office:value="0">
            <text:p>#DIV/0!</text:p>
          </table:table-cell>
          <table:table-cell table:style-name="ce43" table:formula="of:=[.F11]*[.I11]" office:value-type="float" office:value="0">
            <text:p>#DIV/0!</text:p>
          </table:table-cell>
          <table:table-cell/>
          <table:table-cell table:style-name="ce61" table:formula="of:=[.E4]/[.E11]" office:value-type="float" office:value="0">
            <text:p>#DIV/0!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0">
            <text:p>0.000</text:p>
          </table:table-cell>
          <table:table-cell table:style-name="ce22" office:value-type="float" office:value="0">
            <text:p>0.000</text:p>
          </table:table-cell>
          <table:table-cell table:style-name="ce28" office:value-type="float" office:value="0">
            <text:p>0.00</text:p>
          </table:table-cell>
          <table:table-cell table:style-name="ce50" table:formula="of:=[.C4]/[.C12]" office:value-type="float" office:value="0">
            <text:p>#DIV/0!</text:p>
          </table:table-cell>
          <table:table-cell table:style-name="ce50" table:formula="of:=[.D4]/[.D12]" office:value-type="float" office:value="0">
            <text:p>#DIV/0!</text:p>
          </table:table-cell>
          <table:table-cell table:style-name="ce15" table:formula="of:=[.E12] - [.E4]" office:value-type="float" office:value="0">
            <text:p>0</text:p>
          </table:table-cell>
          <table:table-cell table:style-name="ce62" table:formula="of:=[.E12]/[.E4]" office:value-type="float" office:value="0">
            <text:p>#DIV/0!</text:p>
          </table:table-cell>
          <table:table-cell table:style-name="ce45" table:formula="of:=[.F12]*[.I12]" office:value-type="float" office:value="0">
            <text:p>#DIV/0!</text:p>
          </table:table-cell>
          <table:table-cell/>
          <table:table-cell table:style-name="ce62" table:formula="of:=[.E4]/[.E12]" office:value-type="float" office:value="0">
            <text:p>#DIV/0!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0">
            <text:p>0.000</text:p>
          </table:table-cell>
          <table:table-cell table:style-name="ce22" office:value-type="float" office:value="0">
            <text:p>0.000</text:p>
          </table:table-cell>
          <table:table-cell table:style-name="ce28" office:value-type="float" office:value="0">
            <text:p>0.00</text:p>
          </table:table-cell>
          <table:table-cell table:style-name="ce51" table:formula="of:=[.C4]/[.C13]" office:value-type="float" office:value="0">
            <text:p>#DIV/0!</text:p>
          </table:table-cell>
          <table:table-cell table:style-name="ce50" table:formula="of:=[.D4]/[.D13]" office:value-type="float" office:value="0">
            <text:p>#DIV/0!</text:p>
          </table:table-cell>
          <table:table-cell table:style-name="ce57" table:formula="of:=[.E13] - [.E4]" office:value-type="float" office:value="0">
            <text:p>0</text:p>
          </table:table-cell>
          <table:table-cell table:style-name="ce62" table:formula="of:=[.E13]/[.E4]" office:value-type="float" office:value="0">
            <text:p>#DIV/0!</text:p>
          </table:table-cell>
          <table:table-cell table:style-name="ce45" table:formula="of:=[.F13]*[.I13]" office:value-type="float" office:value="0">
            <text:p>#DIV/0!</text:p>
          </table:table-cell>
          <table:table-cell/>
          <table:table-cell table:style-name="ce62" table:formula="of:=[.E4]/[.E13]" office:value-type="float" office:value="0">
            <text:p>#DIV/0!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0">
            <text:p>0.000</text:p>
          </table:table-cell>
          <table:table-cell table:style-name="ce22" office:value-type="float" office:value="0">
            <text:p>0.000</text:p>
          </table:table-cell>
          <table:table-cell table:style-name="ce28" office:value-type="float" office:value="0">
            <text:p>0.00</text:p>
          </table:table-cell>
          <table:table-cell table:style-name="ce50" table:formula="of:=[.C4]/[.C14]" office:value-type="float" office:value="0">
            <text:p>#DIV/0!</text:p>
          </table:table-cell>
          <table:table-cell table:style-name="ce50" table:formula="of:=[.D4]/[.D14]" office:value-type="float" office:value="0">
            <text:p>#DIV/0!</text:p>
          </table:table-cell>
          <table:table-cell table:style-name="ce58" table:formula="of:=[.E14] - [.E4]" office:value-type="float" office:value="0">
            <text:p>0</text:p>
          </table:table-cell>
          <table:table-cell table:style-name="ce62" table:formula="of:=[.E14]/[.E4]" office:value-type="float" office:value="0">
            <text:p>#DIV/0!</text:p>
          </table:table-cell>
          <table:table-cell table:style-name="ce45" table:formula="of:=[.F14]*[.I14]" office:value-type="float" office:value="0">
            <text:p>#DIV/0!</text:p>
          </table:table-cell>
          <table:table-cell/>
          <table:table-cell table:style-name="ce45" table:formula="of:=[.E4]/[.E14]" office:value-type="float" office:value="0">
            <text:p>#DIV/0!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2" table:formula="of:=[.C4]/[.C15]" office:value-type="float" office:value="0">
            <text:p>#DIV/0!</text:p>
          </table:table-cell>
          <table:table-cell table:style-name="ce53" table:formula="of:=[.D4]/[.D15]" office:value-type="float" office:value="0">
            <text:p>#DIV/0!</text:p>
          </table:table-cell>
          <table:table-cell table:style-name="ce59" table:formula="of:=[.E15] - [.E4]" office:value-type="float" office:value="0">
            <text:p>0</text:p>
          </table:table-cell>
          <table:table-cell table:style-name="ce63" table:formula="of:=[.E15]/[.E4]" office:value-type="float" office:value="0">
            <text:p>#DIV/0!</text:p>
          </table:table-cell>
          <table:table-cell table:style-name="ce47" table:formula="of:=[.F15]*[.I15]" office:value-type="float" office:value="0">
            <text:p>#DIV/0!</text:p>
          </table:table-cell>
          <table:table-cell/>
          <table:table-cell table:style-name="ce47" table:formula="of:=[.E4]/[.E15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35" table:formula="of:=[.C4]/[.C16]" office:value-type="float" office:value="0">
            <text:p>#DIV/0!</text:p>
          </table:table-cell>
          <table:table-cell table:style-name="ce54" table:formula="of:=[.D4]/[.D16]" office:value-type="float" office:value="0">
            <text:p>#DIV/0!</text:p>
          </table:table-cell>
          <table:table-cell table:style-name="ce60" table:formula="of:=[.E16] - [.E4]" office:value-type="float" office:value="0">
            <text:p>0</text:p>
          </table:table-cell>
          <table:table-cell table:style-name="ce63" table:formula="of:=[.E16]/[.E4]" office:value-type="float" office:value="0">
            <text:p>#DIV/0!</text:p>
          </table:table-cell>
          <table:table-cell table:style-name="ce47" table:formula="of:=[.F16]*[.I16]" office:value-type="float" office:value="0">
            <text:p>#DIV/0!</text:p>
          </table:table-cell>
          <table:table-cell/>
          <table:table-cell table:style-name="ce63" table:formula="of:=[.E4]/[.E16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17]" office:value-type="float" office:value="0">
            <text:p>#DIV/0!</text:p>
          </table:table-cell>
          <table:table-cell table:style-name="ce54" table:formula="of:=[.D4]/[.D17]" office:value-type="float" office:value="0">
            <text:p>#DIV/0!</text:p>
          </table:table-cell>
          <table:table-cell table:style-name="ce60" table:formula="of:=[.E17] - [.E4]" office:value-type="float" office:value="0">
            <text:p>0</text:p>
          </table:table-cell>
          <table:table-cell table:style-name="ce63" table:formula="of:=[.E17]/[.E4]" office:value-type="float" office:value="0">
            <text:p>#DIV/0!</text:p>
          </table:table-cell>
          <table:table-cell table:style-name="ce47" table:formula="of:=[.F17]*[.I17]" office:value-type="float" office:value="0">
            <text:p>#DIV/0!</text:p>
          </table:table-cell>
          <table:table-cell/>
          <table:table-cell table:style-name="ce63" table:formula="of:=[.E4]/[.E17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18]" office:value-type="float" office:value="0">
            <text:p>#DIV/0!</text:p>
          </table:table-cell>
          <table:table-cell table:style-name="ce54" table:formula="of:=[.D4]/[.D18]" office:value-type="float" office:value="0">
            <text:p>#DIV/0!</text:p>
          </table:table-cell>
          <table:table-cell table:style-name="ce60" table:formula="of:=[.E18] - [.E4]" office:value-type="float" office:value="0">
            <text:p>0</text:p>
          </table:table-cell>
          <table:table-cell table:style-name="ce63" table:formula="of:=[.E18]/[.E4]" office:value-type="float" office:value="0">
            <text:p>#DIV/0!</text:p>
          </table:table-cell>
          <table:table-cell table:style-name="ce47" table:formula="of:=[.F18]*[.I18]" office:value-type="float" office:value="0">
            <text:p>#DIV/0!</text:p>
          </table:table-cell>
          <table:table-cell/>
          <table:table-cell table:style-name="ce63" table:formula="of:=[.E4]/[.E18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19]" office:value-type="float" office:value="0">
            <text:p>#DIV/0!</text:p>
          </table:table-cell>
          <table:table-cell table:style-name="ce54" table:formula="of:=[.D4]/[.D19]" office:value-type="float" office:value="0">
            <text:p>#DIV/0!</text:p>
          </table:table-cell>
          <table:table-cell table:style-name="ce60" table:formula="of:=[.E19] - [.E4]" office:value-type="float" office:value="0">
            <text:p>0</text:p>
          </table:table-cell>
          <table:table-cell table:style-name="ce63" table:formula="of:=[.E19]/[.E4]" office:value-type="float" office:value="0">
            <text:p>#DIV/0!</text:p>
          </table:table-cell>
          <table:table-cell table:style-name="ce47" table:formula="of:=[.F19]*[.I19]" office:value-type="float" office:value="0">
            <text:p>#DIV/0!</text:p>
          </table:table-cell>
          <table:table-cell/>
          <table:table-cell table:style-name="ce63" table:formula="of:=[.E4]/[.E19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20]" office:value-type="float" office:value="0">
            <text:p>#DIV/0!</text:p>
          </table:table-cell>
          <table:table-cell table:style-name="ce54" table:formula="of:=[.D4]/[.D20]" office:value-type="float" office:value="0">
            <text:p>#DIV/0!</text:p>
          </table:table-cell>
          <table:table-cell table:style-name="ce60" table:formula="of:=[.E20] - [.E4]" office:value-type="float" office:value="0">
            <text:p>0</text:p>
          </table:table-cell>
          <table:table-cell table:style-name="ce63" table:formula="of:=[.E20]/[.E4]" office:value-type="float" office:value="0">
            <text:p>#DIV/0!</text:p>
          </table:table-cell>
          <table:table-cell table:style-name="ce47" table:formula="of:=[.F20]*[.I20]" office:value-type="float" office:value="0">
            <text:p>#DIV/0!</text:p>
          </table:table-cell>
          <table:table-cell/>
          <table:table-cell table:style-name="ce63" table:formula="of:=[.E4]/[.E20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21]" office:value-type="float" office:value="0">
            <text:p>#DIV/0!</text:p>
          </table:table-cell>
          <table:table-cell table:style-name="ce54" table:formula="of:=[.D4]/[.D21]" office:value-type="float" office:value="0">
            <text:p>#DIV/0!</text:p>
          </table:table-cell>
          <table:table-cell table:style-name="ce60" table:formula="of:=[.E21] - [.E4]" office:value-type="float" office:value="0">
            <text:p>0</text:p>
          </table:table-cell>
          <table:table-cell table:style-name="ce63" table:formula="of:=[.E21]/[.E4]" office:value-type="float" office:value="0">
            <text:p>#DIV/0!</text:p>
          </table:table-cell>
          <table:table-cell table:style-name="ce47" table:formula="of:=[.F21]*[.I21]" office:value-type="float" office:value="0">
            <text:p>#DIV/0!</text:p>
          </table:table-cell>
          <table:table-cell/>
          <table:table-cell table:style-name="ce63" table:formula="of:=[.E4]/[.E21]" office:value-type="float" office:value="0">
            <text:p>#DIV/0!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9" office:value-type="float" office:value="0">
            <text:p>0.00</text:p>
          </table:table-cell>
          <table:table-cell table:style-name="ce53" table:formula="of:=[.C4]/[.C22]" office:value-type="float" office:value="0">
            <text:p>#DIV/0!</text:p>
          </table:table-cell>
          <table:table-cell table:style-name="ce54" table:formula="of:=[.D4]/[.D22]" office:value-type="float" office:value="0">
            <text:p>#DIV/0!</text:p>
          </table:table-cell>
          <table:table-cell table:style-name="ce60" table:formula="of:=[.E22] - [.E4]" office:value-type="float" office:value="0">
            <text:p>0</text:p>
          </table:table-cell>
          <table:table-cell table:style-name="ce47" table:formula="of:=[.E22]/[.E4]" office:value-type="float" office:value="0">
            <text:p>#DIV/0!</text:p>
          </table:table-cell>
          <table:table-cell table:style-name="ce47" table:formula="of:=[.F22]*[.I22]" office:value-type="float" office:value="0">
            <text:p>#DIV/0!</text:p>
          </table:table-cell>
          <table:table-cell/>
          <table:table-cell table:style-name="ce63" table:formula="of:=[.E4]/[.E22]" office:value-type="float" office:value="0">
            <text:p>#DIV/0!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-foreman_qcif-i420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4992612156c3d5abc96bc9975fbce416 <text:s/>foreman_qcif.cfg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50.593">
            <text:p>50.593</text:p>
          </table:table-cell>
          <table:table-cell table:style-name="ce20" office:value-type="float" office:value="46.739">
            <text:p>46.739</text:p>
          </table:table-cell>
          <table:table-cell table:style-name="ce26" office:value-type="float" office:value="42.42">
            <text:p>42.42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  <table:table-cell/>
          <table:table-cell table:style-name="ce38" table:formula="of:=[.E4]/[.E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43.112">
            <text:p>43.112</text:p>
          </table:table-cell>
          <table:table-cell table:style-name="ce21" office:value-type="float" office:value="39.214">
            <text:p>39.214</text:p>
          </table:table-cell>
          <table:table-cell table:style-name="ce27" office:value-type="float" office:value="42.41">
            <text:p>42.41</text:p>
          </table:table-cell>
          <table:table-cell table:style-name="ce33" table:formula="of:=[.C4]/[.C5]" office:value-type="float" office:value="1.1735247726851">
            <text:p>1.17</text:p>
          </table:table-cell>
          <table:table-cell table:style-name="ce33" table:formula="of:=[.D4]/[.D5]" office:value-type="float" office:value="1.19189575151732">
            <text:p>1.19</text:p>
          </table:table-cell>
          <table:table-cell table:style-name="ce14" table:formula="of:=[.E5] - [.E4]" office:value-type="float" office:value="-0.0100000000000051">
            <text:p>-0.01</text:p>
          </table:table-cell>
          <table:table-cell table:style-name="ce39" table:formula="of:=[.E5]/[.E4]" office:value-type="float" office:value="0.9997642621405">
            <text:p>0.9998</text:p>
          </table:table-cell>
          <table:table-cell table:style-name="ce43" table:formula="of:=[.F5]*[.I5]" office:value-type="float" office:value="1.17324812846712">
            <text:p>1.1732</text:p>
          </table:table-cell>
          <table:table-cell/>
          <table:table-cell table:style-name="ce39" table:formula="of:=[.E4]/[.E5]" office:value-type="float" office:value="1.00023579344494">
            <text:p>1.0002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35.388">
            <text:p>35.388</text:p>
          </table:table-cell>
          <table:table-cell table:style-name="ce21" office:value-type="float" office:value="31.555">
            <text:p>31.555</text:p>
          </table:table-cell>
          <table:table-cell table:style-name="ce27" office:value-type="float" office:value="42.36">
            <text:p>42.36</text:p>
          </table:table-cell>
          <table:table-cell table:style-name="ce48" table:formula="of:=[.C4]/[.C6]" office:value-type="float" office:value="1.42966542330734">
            <text:p>1.43</text:p>
          </table:table-cell>
          <table:table-cell table:style-name="ce33" table:formula="of:=[.D4]/[.D6]" office:value-type="float" office:value="1.48119157027412">
            <text:p>1.48</text:p>
          </table:table-cell>
          <table:table-cell table:style-name="ce55" table:formula="of:=[.E6] - [.E4]" office:value-type="float" office:value="-0.0600000000000023">
            <text:p>-0.06</text:p>
          </table:table-cell>
          <table:table-cell table:style-name="ce39" table:formula="of:=[.E6]/[.E4]" office:value-type="float" office:value="0.998585572842999">
            <text:p>0.9986</text:p>
          </table:table-cell>
          <table:table-cell table:style-name="ce43" table:formula="of:=[.F6]*[.I6]" office:value-type="float" office:value="1.42764326570718">
            <text:p>1.4276</text:p>
          </table:table-cell>
          <table:table-cell/>
          <table:table-cell table:style-name="ce61" table:formula="of:=[.E4]/[.E6]" office:value-type="float" office:value="1.0014164305949">
            <text:p>1.0014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26.73">
            <text:p>26.730</text:p>
          </table:table-cell>
          <table:table-cell table:style-name="ce21" office:value-type="float" office:value="22.862">
            <text:p>22.862</text:p>
          </table:table-cell>
          <table:table-cell table:style-name="ce27" office:value-type="float" office:value="42.18">
            <text:p>42.18</text:p>
          </table:table-cell>
          <table:table-cell table:style-name="ce33" table:formula="of:=[.C4]/[.C7]" office:value-type="float" office:value="1.89274223718668">
            <text:p>1.89</text:p>
          </table:table-cell>
          <table:table-cell table:style-name="ce33" table:formula="of:=[.D4]/[.D7]" office:value-type="float" office:value="2.04439681567667">
            <text:p>2.04</text:p>
          </table:table-cell>
          <table:table-cell table:style-name="ce56" table:formula="of:=[.E7] - [.E4]" office:value-type="float" office:value="-0.240000000000002">
            <text:p>-0.24</text:p>
          </table:table-cell>
          <table:table-cell table:style-name="ce43" table:formula="of:=[.E7]/[.E4]" office:value-type="float" office:value="0.994342291371994">
            <text:p>0.9943</text:p>
          </table:table-cell>
          <table:table-cell table:style-name="ce43" table:formula="of:=[.F7]*[.I7]" office:value-type="float" office:value="1.88203365310076">
            <text:p>1.8820</text:p>
          </table:table-cell>
          <table:table-cell/>
          <table:table-cell table:style-name="ce61" table:formula="of:=[.E4]/[.E7]" office:value-type="float" office:value="1.00568990042674">
            <text:p>1.0057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19.562">
            <text:p>19.562</text:p>
          </table:table-cell>
          <table:table-cell table:style-name="ce21" office:value-type="float" office:value="15.733">
            <text:p>15.733</text:p>
          </table:table-cell>
          <table:table-cell table:style-name="ce27" office:value-type="float" office:value="41.78">
            <text:p>41.78</text:p>
          </table:table-cell>
          <table:table-cell table:style-name="ce33" table:formula="of:=[.C4]/[.C8]" office:value-type="float" office:value="2.5862897454248">
            <text:p>2.59</text:p>
          </table:table-cell>
          <table:table-cell table:style-name="ce33" table:formula="of:=[.D4]/[.D8]" office:value-type="float" office:value="2.97076209241721">
            <text:p>2.97</text:p>
          </table:table-cell>
          <table:table-cell table:style-name="ce56" table:formula="of:=[.E8] - [.E4]" office:value-type="float" office:value="-0.640000000000001">
            <text:p>-0.64</text:p>
          </table:table-cell>
          <table:table-cell table:style-name="ce61" table:formula="of:=[.E8]/[.E4]" office:value-type="float" office:value="0.984912776991985">
            <text:p>0.9849</text:p>
          </table:table-cell>
          <table:table-cell table:style-name="ce43" table:formula="of:=[.F8]*[.I8]" office:value-type="float" office:value="2.54726981527224">
            <text:p>2.5473</text:p>
          </table:table-cell>
          <table:table-cell/>
          <table:table-cell table:style-name="ce61" table:formula="of:=[.E4]/[.E8]" office:value-type="float" office:value="1.01531833413116">
            <text:p>1.0153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14.965">
            <text:p>14.965</text:p>
          </table:table-cell>
          <table:table-cell table:style-name="ce21" office:value-type="float" office:value="10.995">
            <text:p>10.995</text:p>
          </table:table-cell>
          <table:table-cell table:style-name="ce27" office:value-type="float" office:value="41.01">
            <text:p>41.01</text:p>
          </table:table-cell>
          <table:table-cell table:style-name="ce33" table:formula="of:=[.C4]/[.C9]" office:value-type="float" office:value="3.38075509522219">
            <text:p>3.38</text:p>
          </table:table-cell>
          <table:table-cell table:style-name="ce33" table:formula="of:=[.D4]/[.D9]" office:value-type="float" office:value="4.25093224192815">
            <text:p>4.25</text:p>
          </table:table-cell>
          <table:table-cell table:style-name="ce56" table:formula="of:=[.E9] - [.E4]" office:value-type="float" office:value="-1.41">
            <text:p>-1.41</text:p>
          </table:table-cell>
          <table:table-cell table:style-name="ce61" table:formula="of:=[.E9]/[.E4]" office:value-type="float" office:value="0.966760961810467">
            <text:p>0.9668</text:p>
          </table:table-cell>
          <table:table-cell table:style-name="ce43" table:formula="of:=[.F9]*[.I9]" office:value-type="float" office:value="3.26838204750264">
            <text:p>3.2684</text:p>
          </table:table-cell>
          <table:table-cell/>
          <table:table-cell table:style-name="ce61" table:formula="of:=[.E4]/[.E9]" office:value-type="float" office:value="1.03438185808339">
            <text:p>1.0344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13.544">
            <text:p>13.544</text:p>
          </table:table-cell>
          <table:table-cell table:style-name="ce21" office:value-type="float" office:value="9.579">
            <text:p>9.579</text:p>
          </table:table-cell>
          <table:table-cell table:style-name="ce27" office:value-type="float" office:value="39.56">
            <text:p>39.56</text:p>
          </table:table-cell>
          <table:table-cell table:style-name="ce49" table:formula="of:=[.C4]/[.C10]" office:value-type="float" office:value="3.73545481393975">
            <text:p>3.74</text:p>
          </table:table-cell>
          <table:table-cell table:style-name="ce49" table:formula="of:=[.D4]/[.D10]" office:value-type="float" office:value="4.87931934439921">
            <text:p>4.88</text:p>
          </table:table-cell>
          <table:table-cell table:style-name="ce56" table:formula="of:=[.E10] - [.E4]" office:value-type="float" office:value="-2.86">
            <text:p>-2.86</text:p>
          </table:table-cell>
          <table:table-cell table:style-name="ce61" table:formula="of:=[.E10]/[.E4]" office:value-type="float" office:value="0.932578972182933">
            <text:p>0.9326</text:p>
          </table:table-cell>
          <table:table-cell table:style-name="ce43" table:formula="of:=[.F10]*[.I10]" office:value-type="float" office:value="3.48360661101972">
            <text:p>3.4836</text:p>
          </table:table-cell>
          <table:table-cell/>
          <table:table-cell table:style-name="ce61" table:formula="of:=[.E4]/[.E10]" office:value-type="float" office:value="1.07229524772497">
            <text:p>1.0723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13.844">
            <text:p>13.844</text:p>
          </table:table-cell>
          <table:table-cell table:style-name="ce21" office:value-type="float" office:value="9.982">
            <text:p>9.982</text:p>
          </table:table-cell>
          <table:table-cell table:style-name="ce27" office:value-type="float" office:value="31.53">
            <text:p>31.53</text:p>
          </table:table-cell>
          <table:table-cell table:style-name="ce49" table:formula="of:=[.C4]/[.C11]" office:value-type="float" office:value="3.65450736781277">
            <text:p>3.65</text:p>
          </table:table-cell>
          <table:table-cell table:style-name="ce49" table:formula="of:=[.D4]/[.D11]" office:value-type="float" office:value="4.68232819074334">
            <text:p>4.68</text:p>
          </table:table-cell>
          <table:table-cell table:style-name="ce56" table:formula="of:=[.E11] - [.E4]" office:value-type="float" office:value="-10.89">
            <text:p>-10.89</text:p>
          </table:table-cell>
          <table:table-cell table:style-name="ce61" table:formula="of:=[.E11]/[.E4]" office:value-type="float" office:value="0.743281471004243">
            <text:p>0.7433</text:p>
          </table:table-cell>
          <table:table-cell table:style-name="ce43" table:formula="of:=[.F11]*[.I11]" office:value-type="float" office:value="2.71632761214372">
            <text:p>2.7163</text:p>
          </table:table-cell>
          <table:table-cell/>
          <table:table-cell table:style-name="ce61" table:formula="of:=[.E4]/[.E11]" office:value-type="float" office:value="1.3453853472883">
            <text:p>1.3454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30.901">
            <text:p>30.901</text:p>
          </table:table-cell>
          <table:table-cell table:style-name="ce22" office:value-type="float" office:value="26.954">
            <text:p>26.954</text:p>
          </table:table-cell>
          <table:table-cell table:style-name="ce28" office:value-type="float" office:value="42.25">
            <text:p>42.25</text:p>
          </table:table-cell>
          <table:table-cell table:style-name="ce50" table:formula="of:=[.C4]/[.C12]" office:value-type="float" office:value="1.63726093006699">
            <text:p>1.64</text:p>
          </table:table-cell>
          <table:table-cell table:style-name="ce50" table:formula="of:=[.D4]/[.D12]" office:value-type="float" office:value="1.73402834458707">
            <text:p>1.73</text:p>
          </table:table-cell>
          <table:table-cell table:style-name="ce15" table:formula="of:=[.E12] - [.E4]" office:value-type="float" office:value="-0.170000000000002">
            <text:p>-0.17</text:p>
          </table:table-cell>
          <table:table-cell table:style-name="ce62" table:formula="of:=[.E12]/[.E4]" office:value-type="float" office:value="0.995992456388496">
            <text:p>0.9960</text:p>
          </table:table-cell>
          <table:table-cell table:style-name="ce45" table:formula="of:=[.F12]*[.I12]" office:value-type="float" office:value="1.63069953548633">
            <text:p>1.6307</text:p>
          </table:table-cell>
          <table:table-cell/>
          <table:table-cell table:style-name="ce62" table:formula="of:=[.E4]/[.E12]" office:value-type="float" office:value="1.00402366863905">
            <text:p>1.0040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21.747">
            <text:p>21.747</text:p>
          </table:table-cell>
          <table:table-cell table:style-name="ce22" office:value-type="float" office:value="17.797">
            <text:p>17.797</text:p>
          </table:table-cell>
          <table:table-cell table:style-name="ce28" office:value-type="float" office:value="42.09">
            <text:p>42.09</text:p>
          </table:table-cell>
          <table:table-cell table:style-name="ce51" table:formula="of:=[.C4]/[.C13]" office:value-type="float" office:value="2.32643583022946">
            <text:p>2.33</text:p>
          </table:table-cell>
          <table:table-cell table:style-name="ce50" table:formula="of:=[.D4]/[.D13]" office:value-type="float" office:value="2.62622913974265">
            <text:p>2.63</text:p>
          </table:table-cell>
          <table:table-cell table:style-name="ce57" table:formula="of:=[.E13] - [.E4]" office:value-type="float" office:value="-0.329999999999998">
            <text:p>-0.33</text:p>
          </table:table-cell>
          <table:table-cell table:style-name="ce62" table:formula="of:=[.E13]/[.E4]" office:value-type="float" office:value="0.992220650636492">
            <text:p>0.9922</text:p>
          </table:table-cell>
          <table:table-cell table:style-name="ce45" table:formula="of:=[.F13]*[.I13]" office:value-type="float" office:value="2.30833767313432">
            <text:p>2.3083</text:p>
          </table:table-cell>
          <table:table-cell/>
          <table:table-cell table:style-name="ce62" table:formula="of:=[.E4]/[.E13]" office:value-type="float" office:value="1.00784034212402">
            <text:p>1.0078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16.669">
            <text:p>16.669</text:p>
          </table:table-cell>
          <table:table-cell table:style-name="ce22" office:value-type="float" office:value="12.875">
            <text:p>12.875</text:p>
          </table:table-cell>
          <table:table-cell table:style-name="ce28" office:value-type="float" office:value="41.74">
            <text:p>41.74</text:p>
          </table:table-cell>
          <table:table-cell table:style-name="ce50" table:formula="of:=[.C4]/[.C14]" office:value-type="float" office:value="3.03515507828904">
            <text:p>3.04</text:p>
          </table:table-cell>
          <table:table-cell table:style-name="ce50" table:formula="of:=[.D4]/[.D14]" office:value-type="float" office:value="3.63021359223301">
            <text:p>3.63</text:p>
          </table:table-cell>
          <table:table-cell table:style-name="ce58" table:formula="of:=[.E14] - [.E4]" office:value-type="float" office:value="-0.68">
            <text:p>-0.68</text:p>
          </table:table-cell>
          <table:table-cell table:style-name="ce62" table:formula="of:=[.E14]/[.E4]" office:value-type="float" office:value="0.983969825553984">
            <text:p>0.9840</text:p>
          </table:table-cell>
          <table:table-cell table:style-name="ce45" table:formula="of:=[.F14]*[.I14]" office:value-type="float" office:value="2.98650101291335">
            <text:p>2.9865</text:p>
          </table:table-cell>
          <table:table-cell/>
          <table:table-cell table:style-name="ce45" table:formula="of:=[.E4]/[.E14]" office:value-type="float" office:value="1.01629132726402">
            <text:p>1.0163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18.338">
            <text:p>18.338</text:p>
          </table:table-cell>
          <table:table-cell table:style-name="ce23" office:value-type="float" office:value="14.4">
            <text:p>14.400</text:p>
          </table:table-cell>
          <table:table-cell table:style-name="ce29" office:value-type="float" office:value="42.05">
            <text:p>42.05</text:p>
          </table:table-cell>
          <table:table-cell table:style-name="ce52" table:formula="of:=[.C4]/[.C15]" office:value-type="float" office:value="2.75891591231323">
            <text:p>2.76</text:p>
          </table:table-cell>
          <table:table-cell table:style-name="ce53" table:formula="of:=[.D4]/[.D15]" office:value-type="float" office:value="3.24576388888889">
            <text:p>3.25</text:p>
          </table:table-cell>
          <table:table-cell table:style-name="ce59" table:formula="of:=[.E15] - [.E4]" office:value-type="float" office:value="-0.370000000000005">
            <text:p>-0.37</text:p>
          </table:table-cell>
          <table:table-cell table:style-name="ce63" table:formula="of:=[.E15]/[.E4]" office:value-type="float" office:value="0.991277699198491">
            <text:p>0.9913</text:p>
          </table:table-cell>
          <table:table-cell table:style-name="ce47" table:formula="of:=[.F15]*[.I15]" office:value-type="float" office:value="2.73485181783996">
            <text:p>2.7349</text:p>
          </table:table-cell>
          <table:table-cell/>
          <table:table-cell table:style-name="ce47" table:formula="of:=[.E4]/[.E15]" office:value-type="float" office:value="1.00879904875149">
            <text:p>1.0088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27.839">
            <text:p>27.839</text:p>
          </table:table-cell>
          <table:table-cell table:style-name="ce23" office:value-type="float" office:value="24.032">
            <text:p>24.032</text:p>
          </table:table-cell>
          <table:table-cell table:style-name="ce29" office:value-type="float" office:value="42.25">
            <text:p>42.25</text:p>
          </table:table-cell>
          <table:table-cell table:style-name="ce35" table:formula="of:=[.C4]/[.C16]" office:value-type="float" office:value="1.81734257696038">
            <text:p>1.82</text:p>
          </table:table-cell>
          <table:table-cell table:style-name="ce54" table:formula="of:=[.D4]/[.D16]" office:value-type="float" office:value="1.94486517976032">
            <text:p>1.94</text:p>
          </table:table-cell>
          <table:table-cell table:style-name="ce60" table:formula="of:=[.E16] - [.E4]" office:value-type="float" office:value="-0.170000000000002">
            <text:p>-0.17</text:p>
          </table:table-cell>
          <table:table-cell table:style-name="ce63" table:formula="of:=[.E16]/[.E4]" office:value-type="float" office:value="0.995992456388496">
            <text:p>0.9960</text:p>
          </table:table-cell>
          <table:table-cell table:style-name="ce47" table:formula="of:=[.F16]*[.I16]" office:value-type="float" office:value="1.81005949732617">
            <text:p>1.8101</text:p>
          </table:table-cell>
          <table:table-cell/>
          <table:table-cell table:style-name="ce63" table:formula="of:=[.E4]/[.E16]" office:value-type="float" office:value="1.00402366863905">
            <text:p>1.0040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35.569">
            <text:p>35.569</text:p>
          </table:table-cell>
          <table:table-cell table:style-name="ce23" office:value-type="float" office:value="31.816">
            <text:p>31.816</text:p>
          </table:table-cell>
          <table:table-cell table:style-name="ce29" office:value-type="float" office:value="37.06">
            <text:p>37.06</text:p>
          </table:table-cell>
          <table:table-cell table:style-name="ce53" table:formula="of:=[.C4]/[.C17]" office:value-type="float" office:value="1.42239028367399">
            <text:p>1.42</text:p>
          </table:table-cell>
          <table:table-cell table:style-name="ce54" table:formula="of:=[.D4]/[.D17]" office:value-type="float" office:value="1.46904073422178">
            <text:p>1.47</text:p>
          </table:table-cell>
          <table:table-cell table:style-name="ce60" table:formula="of:=[.E17] - [.E4]" office:value-type="float" office:value="-5.36">
            <text:p>-5.36</text:p>
          </table:table-cell>
          <table:table-cell table:style-name="ce63" table:formula="of:=[.E17]/[.E4]" office:value-type="float" office:value="0.873644507307874">
            <text:p>0.8736</text:p>
          </table:table-cell>
          <table:table-cell table:style-name="ce47" table:formula="of:=[.F17]*[.I17]" office:value-type="float" office:value="1.24266345857987">
            <text:p>1.2427</text:p>
          </table:table-cell>
          <table:table-cell/>
          <table:table-cell table:style-name="ce63" table:formula="of:=[.E4]/[.E17]" office:value-type="float" office:value="1.1446303291959">
            <text:p>1.1446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63.005">
            <text:p>63.005</text:p>
          </table:table-cell>
          <table:table-cell table:style-name="ce23" office:value-type="float" office:value="59.124">
            <text:p>59.124</text:p>
          </table:table-cell>
          <table:table-cell table:style-name="ce29" office:value-type="float" office:value="37.02">
            <text:p>37.02</text:p>
          </table:table-cell>
          <table:table-cell table:style-name="ce53" table:formula="of:=[.C4]/[.C18]" office:value-type="float" office:value="0.802999761923657">
            <text:p>0.80</text:p>
          </table:table-cell>
          <table:table-cell table:style-name="ce54" table:formula="of:=[.D4]/[.D18]" office:value-type="float" office:value="0.790524998308639">
            <text:p>0.79</text:p>
          </table:table-cell>
          <table:table-cell table:style-name="ce60" table:formula="of:=[.E18] - [.E4]" office:value-type="float" office:value="-5.4">
            <text:p>-5.4</text:p>
          </table:table-cell>
          <table:table-cell table:style-name="ce63" table:formula="of:=[.E18]/[.E4]" office:value-type="float" office:value="0.872701555869873">
            <text:p>0.8727</text:p>
          </table:table-cell>
          <table:table-cell table:style-name="ce47" table:formula="of:=[.F18]*[.I18]" office:value-type="float" office:value="0.700779141593913">
            <text:p>0.7008</text:p>
          </table:table-cell>
          <table:table-cell/>
          <table:table-cell table:style-name="ce63" table:formula="of:=[.E4]/[.E18]" office:value-type="float" office:value="1.14586709886548">
            <text:p>1.1459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57.769">
            <text:p>57.769</text:p>
          </table:table-cell>
          <table:table-cell table:style-name="ce23" office:value-type="float" office:value="53.912">
            <text:p>53.912</text:p>
          </table:table-cell>
          <table:table-cell table:style-name="ce29" office:value-type="float" office:value="35.93">
            <text:p>35.93</text:p>
          </table:table-cell>
          <table:table-cell table:style-name="ce53" table:formula="of:=[.C4]/[.C19]" office:value-type="float" office:value="0.875781128286797">
            <text:p>0.88</text:p>
          </table:table-cell>
          <table:table-cell table:style-name="ce54" table:formula="of:=[.D4]/[.D19]" office:value-type="float" office:value="0.866949844190533">
            <text:p>0.87</text:p>
          </table:table-cell>
          <table:table-cell table:style-name="ce60" table:formula="of:=[.E19] - [.E4]" office:value-type="float" office:value="-6.49">
            <text:p>-6.49</text:p>
          </table:table-cell>
          <table:table-cell table:style-name="ce63" table:formula="of:=[.E19]/[.E4]" office:value-type="float" office:value="0.847006129184347">
            <text:p>0.8470</text:p>
          </table:table-cell>
          <table:table-cell table:style-name="ce47" table:formula="of:=[.F19]*[.I19]" office:value-type="float" office:value="0.7417919834829">
            <text:p>0.7418</text:p>
          </table:table-cell>
          <table:table-cell/>
          <table:table-cell table:style-name="ce63" table:formula="of:=[.E4]/[.E19]" office:value-type="float" office:value="1.18062900083496">
            <text:p>1.1806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31.796">
            <text:p>31.796</text:p>
          </table:table-cell>
          <table:table-cell table:style-name="ce23" office:value-type="float" office:value="28.019">
            <text:p>28.019</text:p>
          </table:table-cell>
          <table:table-cell table:style-name="ce29" office:value-type="float" office:value="36.63">
            <text:p>36.63</text:p>
          </table:table-cell>
          <table:table-cell table:style-name="ce53" table:formula="of:=[.C4]/[.C20]" office:value-type="float" office:value="1.59117499056485">
            <text:p>1.59</text:p>
          </table:table-cell>
          <table:table-cell table:style-name="ce54" table:formula="of:=[.D4]/[.D20]" office:value-type="float" office:value="1.66811806274314">
            <text:p>1.67</text:p>
          </table:table-cell>
          <table:table-cell table:style-name="ce60" table:formula="of:=[.E20] - [.E4]" office:value-type="float" office:value="-5.79">
            <text:p>-5.79</text:p>
          </table:table-cell>
          <table:table-cell table:style-name="ce63" table:formula="of:=[.E20]/[.E4]" office:value-type="float" office:value="0.863507779349363">
            <text:p>0.8635</text:p>
          </table:table-cell>
          <table:table-cell table:style-name="ce47" table:formula="of:=[.F20]*[.I20]" office:value-type="float" office:value="1.3739919826589">
            <text:p>1.3740</text:p>
          </table:table-cell>
          <table:table-cell/>
          <table:table-cell table:style-name="ce63" table:formula="of:=[.E4]/[.E20]" office:value-type="float" office:value="1.15806715806716">
            <text:p>1.1581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52.167">
            <text:p>52.167</text:p>
          </table:table-cell>
          <table:table-cell table:style-name="ce23" office:value-type="float" office:value="48.389">
            <text:p>48.389</text:p>
          </table:table-cell>
          <table:table-cell table:style-name="ce29" office:value-type="float" office:value="34.27">
            <text:p>34.27</text:p>
          </table:table-cell>
          <table:table-cell table:style-name="ce53" table:formula="of:=[.C4]/[.C21]" office:value-type="float" office:value="0.969827668832787">
            <text:p>0.97</text:p>
          </table:table-cell>
          <table:table-cell table:style-name="ce54" table:formula="of:=[.D4]/[.D21]" office:value-type="float" office:value="0.965901341213912">
            <text:p>0.97</text:p>
          </table:table-cell>
          <table:table-cell table:style-name="ce60" table:formula="of:=[.E21] - [.E4]" office:value-type="float" office:value="-8.15">
            <text:p>-8.15</text:p>
          </table:table-cell>
          <table:table-cell table:style-name="ce63" table:formula="of:=[.E21]/[.E4]" office:value-type="float" office:value="0.807873644507308">
            <text:p>0.8079</text:p>
          </table:table-cell>
          <table:table-cell table:style-name="ce47" table:formula="of:=[.F21]*[.I21]" office:value-type="float" office:value="0.78349821336397">
            <text:p>0.7835</text:p>
          </table:table-cell>
          <table:table-cell/>
          <table:table-cell table:style-name="ce63" table:formula="of:=[.E4]/[.E21]" office:value-type="float" office:value="1.23781733294427">
            <text:p>1.2378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29.004">
            <text:p>29.004</text:p>
          </table:table-cell>
          <table:table-cell table:style-name="ce23" office:value-type="float" office:value="25.235">
            <text:p>25.235</text:p>
          </table:table-cell>
          <table:table-cell table:style-name="ce29" office:value-type="float" office:value="35.99">
            <text:p>35.99</text:p>
          </table:table-cell>
          <table:table-cell table:style-name="ce53" table:formula="of:=[.C4]/[.C22]" office:value-type="float" office:value="1.74434560750241">
            <text:p>1.74</text:p>
          </table:table-cell>
          <table:table-cell table:style-name="ce54" table:formula="of:=[.D4]/[.D22]" office:value-type="float" office:value="1.85214979195562">
            <text:p>1.85</text:p>
          </table:table-cell>
          <table:table-cell table:style-name="ce60" table:formula="of:=[.E22] - [.E4]" office:value-type="float" office:value="-6.43">
            <text:p>-6.43</text:p>
          </table:table-cell>
          <table:table-cell table:style-name="ce47" table:formula="of:=[.E22]/[.E4]" office:value-type="float" office:value="0.848420556341348">
            <text:p>0.8484</text:p>
          </table:table-cell>
          <table:table-cell table:style-name="ce47" table:formula="of:=[.F22]*[.I22]" office:value-type="float" office:value="1.47993867076879">
            <text:p>1.4799</text:p>
          </table:table-cell>
          <table:table-cell/>
          <table:table-cell table:style-name="ce63" table:formula="of:=[.E4]/[.E22]" office:value-type="float" office:value="1.17866073909419">
            <text:p>1.1787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-foreman_cif-i420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9b838f32e417e314a1713367be2cb150 <text:s/>foreman_cif.cfg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214.138">
            <text:p>214.138</text:p>
          </table:table-cell>
          <table:table-cell table:style-name="ce20" office:value-type="float" office:value="197.8">
            <text:p>197.800</text:p>
          </table:table-cell>
          <table:table-cell table:style-name="ce26" office:value-type="float" office:value="39.96">
            <text:p>39.96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  <table:table-cell/>
          <table:table-cell table:style-name="ce38" table:formula="of:=[.E4]/[.E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172.186">
            <text:p>172.186</text:p>
          </table:table-cell>
          <table:table-cell table:style-name="ce21" office:value-type="float" office:value="155.972">
            <text:p>155.972</text:p>
          </table:table-cell>
          <table:table-cell table:style-name="ce27" office:value-type="float" office:value="39.93">
            <text:p>39.93</text:p>
          </table:table-cell>
          <table:table-cell table:style-name="ce33" table:formula="of:=[.C4]/[.C5]" office:value-type="float" office:value="1.24364350179457">
            <text:p>1.24</text:p>
          </table:table-cell>
          <table:table-cell table:style-name="ce33" table:formula="of:=[.D4]/[.D5]" office:value-type="float" office:value="1.26817633934296">
            <text:p>1.27</text:p>
          </table:table-cell>
          <table:table-cell table:style-name="ce14" table:formula="of:=[.E5] - [.E4]" office:value-type="float" office:value="-0.0300000000000011">
            <text:p>-0.03</text:p>
          </table:table-cell>
          <table:table-cell table:style-name="ce39" table:formula="of:=[.E5]/[.E4]" office:value-type="float" office:value="0.999249249249249">
            <text:p>0.9992</text:p>
          </table:table-cell>
          <table:table-cell table:style-name="ce43" table:formula="of:=[.F5]*[.I5]" office:value-type="float" office:value="1.24270983550193">
            <text:p>1.2427</text:p>
          </table:table-cell>
          <table:table-cell/>
          <table:table-cell table:style-name="ce39" table:formula="of:=[.E4]/[.E5]" office:value-type="float" office:value="1.0007513148009">
            <text:p>1.0008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134.56">
            <text:p>134.560</text:p>
          </table:table-cell>
          <table:table-cell table:style-name="ce21" office:value-type="float" office:value="118.683">
            <text:p>118.683</text:p>
          </table:table-cell>
          <table:table-cell table:style-name="ce27" office:value-type="float" office:value="39.87">
            <text:p>39.87</text:p>
          </table:table-cell>
          <table:table-cell table:style-name="ce48" table:formula="of:=[.C4]/[.C6]" office:value-type="float" office:value="1.59139417360285">
            <text:p>1.59</text:p>
          </table:table-cell>
          <table:table-cell table:style-name="ce33" table:formula="of:=[.D4]/[.D6]" office:value-type="float" office:value="1.66662453763387">
            <text:p>1.67</text:p>
          </table:table-cell>
          <table:table-cell table:style-name="ce55" table:formula="of:=[.E6] - [.E4]" office:value-type="float" office:value="-0.0900000000000034">
            <text:p>-0.09</text:p>
          </table:table-cell>
          <table:table-cell table:style-name="ce39" table:formula="of:=[.E6]/[.E4]" office:value-type="float" office:value="0.997747747747748">
            <text:p>0.9977</text:p>
          </table:table-cell>
          <table:table-cell table:style-name="ce43" table:formula="of:=[.F6]*[.I6]" office:value-type="float" office:value="1.58780995249114">
            <text:p>1.5878</text:p>
          </table:table-cell>
          <table:table-cell/>
          <table:table-cell table:style-name="ce61" table:formula="of:=[.E4]/[.E6]" office:value-type="float" office:value="1.00225733634312">
            <text:p>1.0023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99.654">
            <text:p>99.654</text:p>
          </table:table-cell>
          <table:table-cell table:style-name="ce21" office:value-type="float" office:value="83.691">
            <text:p>83.691</text:p>
          </table:table-cell>
          <table:table-cell table:style-name="ce27" office:value-type="float" office:value="39.75">
            <text:p>39.75</text:p>
          </table:table-cell>
          <table:table-cell table:style-name="ce33" table:formula="of:=[.C4]/[.C7]" office:value-type="float" office:value="2.14881489955245">
            <text:p>2.15</text:p>
          </table:table-cell>
          <table:table-cell table:style-name="ce33" table:formula="of:=[.D4]/[.D7]" office:value-type="float" office:value="2.36345604664779">
            <text:p>2.36</text:p>
          </table:table-cell>
          <table:table-cell table:style-name="ce56" table:formula="of:=[.E7] - [.E4]" office:value-type="float" office:value="-0.210000000000001">
            <text:p>-0.21</text:p>
          </table:table-cell>
          <table:table-cell table:style-name="ce43" table:formula="of:=[.E7]/[.E4]" office:value-type="float" office:value="0.994744744744745">
            <text:p>0.9947</text:p>
          </table:table-cell>
          <table:table-cell table:style-name="ce43" table:formula="of:=[.F7]*[.I7]" office:value-type="float" office:value="2.13752232875901">
            <text:p>2.1375</text:p>
          </table:table-cell>
          <table:table-cell/>
          <table:table-cell table:style-name="ce61" table:formula="of:=[.E4]/[.E7]" office:value-type="float" office:value="1.00528301886792">
            <text:p>1.0053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74.628">
            <text:p>74.628</text:p>
          </table:table-cell>
          <table:table-cell table:style-name="ce21" office:value-type="float" office:value="58.66">
            <text:p>58.660</text:p>
          </table:table-cell>
          <table:table-cell table:style-name="ce27" office:value-type="float" office:value="39.38">
            <text:p>39.38</text:p>
          </table:table-cell>
          <table:table-cell table:style-name="ce33" table:formula="of:=[.C4]/[.C8]" office:value-type="float" office:value="2.86940558503511">
            <text:p>2.87</text:p>
          </table:table-cell>
          <table:table-cell table:style-name="ce33" table:formula="of:=[.D4]/[.D8]" office:value-type="float" office:value="3.37197408796454">
            <text:p>3.37</text:p>
          </table:table-cell>
          <table:table-cell table:style-name="ce56" table:formula="of:=[.E8] - [.E4]" office:value-type="float" office:value="-0.579999999999998">
            <text:p>-0.58</text:p>
          </table:table-cell>
          <table:table-cell table:style-name="ce61" table:formula="of:=[.E8]/[.E4]" office:value-type="float" office:value="0.985485485485486">
            <text:p>0.9855</text:p>
          </table:table-cell>
          <table:table-cell table:style-name="ce43" table:formula="of:=[.F8]*[.I8]" office:value-type="float" office:value="2.82775755602309">
            <text:p>2.8278</text:p>
          </table:table-cell>
          <table:table-cell/>
          <table:table-cell table:style-name="ce61" table:formula="of:=[.E4]/[.E8]" office:value-type="float" office:value="1.01472828847131">
            <text:p>1.0147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59.688">
            <text:p>59.688</text:p>
          </table:table-cell>
          <table:table-cell table:style-name="ce21" office:value-type="float" office:value="43.861">
            <text:p>43.861</text:p>
          </table:table-cell>
          <table:table-cell table:style-name="ce27" office:value-type="float" office:value="38.62">
            <text:p>38.62</text:p>
          </table:table-cell>
          <table:table-cell table:style-name="ce33" table:formula="of:=[.C4]/[.C9]" office:value-type="float" office:value="3.5876223026404">
            <text:p>3.59</text:p>
          </table:table-cell>
          <table:table-cell table:style-name="ce33" table:formula="of:=[.D4]/[.D9]" office:value-type="float" office:value="4.50970110120608">
            <text:p>4.51</text:p>
          </table:table-cell>
          <table:table-cell table:style-name="ce56" table:formula="of:=[.E9] - [.E4]" office:value-type="float" office:value="-1.34">
            <text:p>-1.34</text:p>
          </table:table-cell>
          <table:table-cell table:style-name="ce61" table:formula="of:=[.E9]/[.E4]" office:value-type="float" office:value="0.966466466466466">
            <text:p>0.9665</text:p>
          </table:table-cell>
          <table:table-cell table:style-name="ce43" table:formula="of:=[.F9]*[.I9]" office:value-type="float" office:value="3.46731664984915">
            <text:p>3.4673</text:p>
          </table:table-cell>
          <table:table-cell/>
          <table:table-cell table:style-name="ce61" table:formula="of:=[.E4]/[.E9]" office:value-type="float" office:value="1.03469704816157">
            <text:p>1.0347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54.892">
            <text:p>54.892</text:p>
          </table:table-cell>
          <table:table-cell table:style-name="ce21" office:value-type="float" office:value="39.173">
            <text:p>39.173</text:p>
          </table:table-cell>
          <table:table-cell table:style-name="ce27" office:value-type="float" office:value="36.77">
            <text:p>36.77</text:p>
          </table:table-cell>
          <table:table-cell table:style-name="ce49" table:formula="of:=[.C4]/[.C10]" office:value-type="float" office:value="3.90107848138162">
            <text:p>3.90</text:p>
          </table:table-cell>
          <table:table-cell table:style-name="ce49" table:formula="of:=[.D4]/[.D10]" office:value-type="float" office:value="5.04939626783754">
            <text:p>5.05</text:p>
          </table:table-cell>
          <table:table-cell table:style-name="ce56" table:formula="of:=[.E10] - [.E4]" office:value-type="float" office:value="-3.19">
            <text:p>-3.19</text:p>
          </table:table-cell>
          <table:table-cell table:style-name="ce61" table:formula="of:=[.E10]/[.E4]" office:value-type="float" office:value="0.92017017017017">
            <text:p>0.9202</text:p>
          </table:table-cell>
          <table:table-cell table:style-name="ce43" table:formula="of:=[.F10]*[.I10]" office:value-type="float" office:value="3.58965605006012">
            <text:p>3.5897</text:p>
          </table:table-cell>
          <table:table-cell/>
          <table:table-cell table:style-name="ce61" table:formula="of:=[.E4]/[.E10]" office:value-type="float" office:value="1.08675550720696">
            <text:p>1.0868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53.316">
            <text:p>53.316</text:p>
          </table:table-cell>
          <table:table-cell table:style-name="ce21" office:value-type="float" office:value="37.862">
            <text:p>37.862</text:p>
          </table:table-cell>
          <table:table-cell table:style-name="ce27" office:value-type="float" office:value="35.24">
            <text:p>35.24</text:p>
          </table:table-cell>
          <table:table-cell table:style-name="ce49" table:formula="of:=[.C4]/[.C11]" office:value-type="float" office:value="4.01639282766899">
            <text:p>4.02</text:p>
          </table:table-cell>
          <table:table-cell table:style-name="ce49" table:formula="of:=[.D4]/[.D11]" office:value-type="float" office:value="5.22423538112091">
            <text:p>5.22</text:p>
          </table:table-cell>
          <table:table-cell table:style-name="ce56" table:formula="of:=[.E11] - [.E4]" office:value-type="float" office:value="-4.72">
            <text:p>-4.72</text:p>
          </table:table-cell>
          <table:table-cell table:style-name="ce61" table:formula="of:=[.E11]/[.E4]" office:value-type="float" office:value="0.881881881881882">
            <text:p>0.8819</text:p>
          </table:table-cell>
          <table:table-cell table:style-name="ce43" table:formula="of:=[.F11]*[.I11]" office:value-type="float" office:value="3.54198406524162">
            <text:p>3.5420</text:p>
          </table:table-cell>
          <table:table-cell/>
          <table:table-cell table:style-name="ce61" table:formula="of:=[.E4]/[.E11]" office:value-type="float" office:value="1.13393870601589">
            <text:p>1.1339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117.846">
            <text:p>117.846</text:p>
          </table:table-cell>
          <table:table-cell table:style-name="ce22" office:value-type="float" office:value="101.96">
            <text:p>101.960</text:p>
          </table:table-cell>
          <table:table-cell table:style-name="ce28" office:value-type="float" office:value="39.76">
            <text:p>39.76</text:p>
          </table:table-cell>
          <table:table-cell table:style-name="ce50" table:formula="of:=[.C4]/[.C12]" office:value-type="float" office:value="1.81710028342074">
            <text:p>1.82</text:p>
          </table:table-cell>
          <table:table-cell table:style-name="ce50" table:formula="of:=[.D4]/[.D12]" office:value-type="float" office:value="1.9399764613574">
            <text:p>1.94</text:p>
          </table:table-cell>
          <table:table-cell table:style-name="ce15" table:formula="of:=[.E12] - [.E4]" office:value-type="float" office:value="-0.200000000000003">
            <text:p>-0.20</text:p>
          </table:table-cell>
          <table:table-cell table:style-name="ce62" table:formula="of:=[.E12]/[.E4]" office:value-type="float" office:value="0.994994994994995">
            <text:p>0.9950</text:p>
          </table:table-cell>
          <table:table-cell table:style-name="ce45" table:formula="of:=[.F12]*[.I12]" office:value-type="float" office:value="1.80800568740762">
            <text:p>1.8080</text:p>
          </table:table-cell>
          <table:table-cell/>
          <table:table-cell table:style-name="ce62" table:formula="of:=[.E4]/[.E12]" office:value-type="float" office:value="1.00503018108652">
            <text:p>1.0050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80.144">
            <text:p>80.144</text:p>
          </table:table-cell>
          <table:table-cell table:style-name="ce22" office:value-type="float" office:value="64.067">
            <text:p>64.067</text:p>
          </table:table-cell>
          <table:table-cell table:style-name="ce28" office:value-type="float" office:value="39.51">
            <text:p>39.51</text:p>
          </table:table-cell>
          <table:table-cell table:style-name="ce51" table:formula="of:=[.C4]/[.C13]" office:value-type="float" office:value="2.67191555200639">
            <text:p>2.67</text:p>
          </table:table-cell>
          <table:table-cell table:style-name="ce50" table:formula="of:=[.D4]/[.D13]" office:value-type="float" office:value="3.08739288557292">
            <text:p>3.09</text:p>
          </table:table-cell>
          <table:table-cell table:style-name="ce57" table:formula="of:=[.E13] - [.E4]" office:value-type="float" office:value="-0.450000000000003">
            <text:p>-0.45</text:p>
          </table:table-cell>
          <table:table-cell table:style-name="ce62" table:formula="of:=[.E13]/[.E4]" office:value-type="float" office:value="0.988738738738739">
            <text:p>0.9887</text:p>
          </table:table-cell>
          <table:table-cell table:style-name="ce45" table:formula="of:=[.F13]*[.I13]" office:value-type="float" office:value="2.64182641290722">
            <text:p>2.6418</text:p>
          </table:table-cell>
          <table:table-cell/>
          <table:table-cell table:style-name="ce62" table:formula="of:=[.E4]/[.E13]" office:value-type="float" office:value="1.01138952164009">
            <text:p>1.0114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62.875">
            <text:p>62.875</text:p>
          </table:table-cell>
          <table:table-cell table:style-name="ce22" office:value-type="float" office:value="46.749">
            <text:p>46.749</text:p>
          </table:table-cell>
          <table:table-cell table:style-name="ce28" office:value-type="float" office:value="39.17">
            <text:p>39.17</text:p>
          </table:table-cell>
          <table:table-cell table:style-name="ce50" table:formula="of:=[.C4]/[.C14]" office:value-type="float" office:value="3.40577335984095">
            <text:p>3.41</text:p>
          </table:table-cell>
          <table:table-cell table:style-name="ce50" table:formula="of:=[.D4]/[.D14]" office:value-type="float" office:value="4.23110654773364">
            <text:p>4.23</text:p>
          </table:table-cell>
          <table:table-cell table:style-name="ce58" table:formula="of:=[.E14] - [.E4]" office:value-type="float" office:value="-0.789999999999999">
            <text:p>-0.79</text:p>
          </table:table-cell>
          <table:table-cell table:style-name="ce62" table:formula="of:=[.E14]/[.E4]" office:value-type="float" office:value="0.98023023023023">
            <text:p>0.9802</text:p>
          </table:table-cell>
          <table:table-cell table:style-name="ce45" table:formula="of:=[.F14]*[.I14]" office:value-type="float" office:value="3.33844200462888">
            <text:p>3.3384</text:p>
          </table:table-cell>
          <table:table-cell/>
          <table:table-cell table:style-name="ce45" table:formula="of:=[.E4]/[.E14]" office:value-type="float" office:value="1.02016849629819">
            <text:p>1.0202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68.174">
            <text:p>68.174</text:p>
          </table:table-cell>
          <table:table-cell table:style-name="ce23" office:value-type="float" office:value="52.307">
            <text:p>52.307</text:p>
          </table:table-cell>
          <table:table-cell table:style-name="ce29" office:value-type="float" office:value="39.48">
            <text:p>39.48</text:p>
          </table:table-cell>
          <table:table-cell table:style-name="ce52" table:formula="of:=[.C4]/[.C15]" office:value-type="float" office:value="3.14105084049638">
            <text:p>3.14</text:p>
          </table:table-cell>
          <table:table-cell table:style-name="ce53" table:formula="of:=[.D4]/[.D15]" office:value-type="float" office:value="3.78152063777315">
            <text:p>3.78</text:p>
          </table:table-cell>
          <table:table-cell table:style-name="ce59" table:formula="of:=[.E15] - [.E4]" office:value-type="float" office:value="-0.480000000000004">
            <text:p>-0.48</text:p>
          </table:table-cell>
          <table:table-cell table:style-name="ce63" table:formula="of:=[.E15]/[.E4]" office:value-type="float" office:value="0.987987987987988">
            <text:p>0.9880</text:p>
          </table:table-cell>
          <table:table-cell table:style-name="ce47" table:formula="of:=[.F15]*[.I15]" office:value-type="float" office:value="3.10332050006999">
            <text:p>3.1033</text:p>
          </table:table-cell>
          <table:table-cell/>
          <table:table-cell table:style-name="ce47" table:formula="of:=[.E4]/[.E15]" office:value-type="float" office:value="1.01215805471125">
            <text:p>1.0122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105.59">
            <text:p>105.590</text:p>
          </table:table-cell>
          <table:table-cell table:style-name="ce23" office:value-type="float" office:value="89.419">
            <text:p>89.419</text:p>
          </table:table-cell>
          <table:table-cell table:style-name="ce29" office:value-type="float" office:value="39.75">
            <text:p>39.75</text:p>
          </table:table-cell>
          <table:table-cell table:style-name="ce35" table:formula="of:=[.C4]/[.C16]" office:value-type="float" office:value="2.02801401647883">
            <text:p>2.03</text:p>
          </table:table-cell>
          <table:table-cell table:style-name="ce54" table:formula="of:=[.D4]/[.D16]" office:value-type="float" office:value="2.21205784005636">
            <text:p>2.21</text:p>
          </table:table-cell>
          <table:table-cell table:style-name="ce60" table:formula="of:=[.E16] - [.E4]" office:value-type="float" office:value="-0.210000000000001">
            <text:p>-0.21</text:p>
          </table:table-cell>
          <table:table-cell table:style-name="ce63" table:formula="of:=[.E16]/[.E4]" office:value-type="float" office:value="0.994744744744745">
            <text:p>0.9947</text:p>
          </table:table-cell>
          <table:table-cell table:style-name="ce47" table:formula="of:=[.F16]*[.I16]" office:value-type="float" office:value="2.017356285161">
            <text:p>2.0174</text:p>
          </table:table-cell>
          <table:table-cell/>
          <table:table-cell table:style-name="ce63" table:formula="of:=[.E4]/[.E16]" office:value-type="float" office:value="1.00528301886792">
            <text:p>1.0053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121.096">
            <text:p>121.096</text:p>
          </table:table-cell>
          <table:table-cell table:style-name="ce23" office:value-type="float" office:value="106.064">
            <text:p>106.064</text:p>
          </table:table-cell>
          <table:table-cell table:style-name="ce29" office:value-type="float" office:value="34.68">
            <text:p>34.68</text:p>
          </table:table-cell>
          <table:table-cell table:style-name="ce53" table:formula="of:=[.C4]/[.C17]" office:value-type="float" office:value="1.76833256259497">
            <text:p>1.77</text:p>
          </table:table-cell>
          <table:table-cell table:style-name="ce54" table:formula="of:=[.D4]/[.D17]" office:value-type="float" office:value="1.86491175139538">
            <text:p>1.86</text:p>
          </table:table-cell>
          <table:table-cell table:style-name="ce60" table:formula="of:=[.E17] - [.E4]" office:value-type="float" office:value="-5.28">
            <text:p>-5.28</text:p>
          </table:table-cell>
          <table:table-cell table:style-name="ce63" table:formula="of:=[.E17]/[.E4]" office:value-type="float" office:value="0.867867867867868">
            <text:p>0.8679</text:p>
          </table:table-cell>
          <table:table-cell table:style-name="ce47" table:formula="of:=[.F17]*[.I17]" office:value-type="float" office:value="1.53467901078062">
            <text:p>1.5347</text:p>
          </table:table-cell>
          <table:table-cell/>
          <table:table-cell table:style-name="ce63" table:formula="of:=[.E4]/[.E17]" office:value-type="float" office:value="1.1522491349481">
            <text:p>1.1522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208.867">
            <text:p>208.867</text:p>
          </table:table-cell>
          <table:table-cell table:style-name="ce23" office:value-type="float" office:value="193.589">
            <text:p>193.589</text:p>
          </table:table-cell>
          <table:table-cell table:style-name="ce29" office:value-type="float" office:value="34.2">
            <text:p>34.20</text:p>
          </table:table-cell>
          <table:table-cell table:style-name="ce53" table:formula="of:=[.C4]/[.C18]" office:value-type="float" office:value="1.02523615506519">
            <text:p>1.03</text:p>
          </table:table-cell>
          <table:table-cell table:style-name="ce54" table:formula="of:=[.D4]/[.D18]" office:value-type="float" office:value="1.02175226898223">
            <text:p>1.02</text:p>
          </table:table-cell>
          <table:table-cell table:style-name="ce60" table:formula="of:=[.E18] - [.E4]" office:value-type="float" office:value="-5.76">
            <text:p>-5.76</text:p>
          </table:table-cell>
          <table:table-cell table:style-name="ce63" table:formula="of:=[.E18]/[.E4]" office:value-type="float" office:value="0.855855855855856">
            <text:p>0.8559</text:p>
          </table:table-cell>
          <table:table-cell table:style-name="ce47" table:formula="of:=[.F18]*[.I18]" office:value-type="float" office:value="0.877454366947681">
            <text:p>0.8775</text:p>
          </table:table-cell>
          <table:table-cell/>
          <table:table-cell table:style-name="ce63" table:formula="of:=[.E4]/[.E18]" office:value-type="float" office:value="1.16842105263158">
            <text:p>1.1684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192.686">
            <text:p>192.686</text:p>
          </table:table-cell>
          <table:table-cell table:style-name="ce23" office:value-type="float" office:value="177.676">
            <text:p>177.676</text:p>
          </table:table-cell>
          <table:table-cell table:style-name="ce29" office:value-type="float" office:value="33.3">
            <text:p>33.30</text:p>
          </table:table-cell>
          <table:table-cell table:style-name="ce53" table:formula="of:=[.C4]/[.C19]" office:value-type="float" office:value="1.11133138889177">
            <text:p>1.11</text:p>
          </table:table-cell>
          <table:table-cell table:style-name="ce54" table:formula="of:=[.D4]/[.D19]" office:value-type="float" office:value="1.11326234269119">
            <text:p>1.11</text:p>
          </table:table-cell>
          <table:table-cell table:style-name="ce60" table:formula="of:=[.E19] - [.E4]" office:value-type="float" office:value="-6.66">
            <text:p>-6.66</text:p>
          </table:table-cell>
          <table:table-cell table:style-name="ce63" table:formula="of:=[.E19]/[.E4]" office:value-type="float" office:value="0.833333333333333">
            <text:p>0.8333</text:p>
          </table:table-cell>
          <table:table-cell table:style-name="ce47" table:formula="of:=[.F19]*[.I19]" office:value-type="float" office:value="0.926109490743143">
            <text:p>0.9261</text:p>
          </table:table-cell>
          <table:table-cell/>
          <table:table-cell table:style-name="ce63" table:formula="of:=[.E4]/[.E19]" office:value-type="float" office:value="1.2">
            <text:p>1.2000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112.912">
            <text:p>112.912</text:p>
          </table:table-cell>
          <table:table-cell table:style-name="ce23" office:value-type="float" office:value="97.823">
            <text:p>97.823</text:p>
          </table:table-cell>
          <table:table-cell table:style-name="ce29" office:value-type="float" office:value="34.41">
            <text:p>34.41</text:p>
          </table:table-cell>
          <table:table-cell table:style-name="ce53" table:formula="of:=[.C4]/[.C20]" office:value-type="float" office:value="1.8965034717302">
            <text:p>1.90</text:p>
          </table:table-cell>
          <table:table-cell table:style-name="ce54" table:formula="of:=[.D4]/[.D20]" office:value-type="float" office:value="2.02201936149985">
            <text:p>2.02</text:p>
          </table:table-cell>
          <table:table-cell table:style-name="ce60" table:formula="of:=[.E20] - [.E4]" office:value-type="float" office:value="-5.55">
            <text:p>-5.55</text:p>
          </table:table-cell>
          <table:table-cell table:style-name="ce63" table:formula="of:=[.E20]/[.E4]" office:value-type="float" office:value="0.861111111111111">
            <text:p>0.8611</text:p>
          </table:table-cell>
          <table:table-cell table:style-name="ce47" table:formula="of:=[.F20]*[.I20]" office:value-type="float" office:value="1.63310021176767">
            <text:p>1.6331</text:p>
          </table:table-cell>
          <table:table-cell/>
          <table:table-cell table:style-name="ce63" table:formula="of:=[.E4]/[.E20]" office:value-type="float" office:value="1.16129032258065">
            <text:p>1.1613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175.224">
            <text:p>175.224</text:p>
          </table:table-cell>
          <table:table-cell table:style-name="ce23" office:value-type="float" office:value="160.127">
            <text:p>160.127</text:p>
          </table:table-cell>
          <table:table-cell table:style-name="ce29" office:value-type="float" office:value="32.19">
            <text:p>32.19</text:p>
          </table:table-cell>
          <table:table-cell table:style-name="ce53" table:formula="of:=[.C4]/[.C21]" office:value-type="float" office:value="1.22208145002968">
            <text:p>1.22</text:p>
          </table:table-cell>
          <table:table-cell table:style-name="ce54" table:formula="of:=[.D4]/[.D21]" office:value-type="float" office:value="1.23526950483054">
            <text:p>1.24</text:p>
          </table:table-cell>
          <table:table-cell table:style-name="ce60" table:formula="of:=[.E21] - [.E4]" office:value-type="float" office:value="-7.77">
            <text:p>-7.77</text:p>
          </table:table-cell>
          <table:table-cell table:style-name="ce63" table:formula="of:=[.E21]/[.E4]" office:value-type="float" office:value="0.805555555555555">
            <text:p>0.8056</text:p>
          </table:table-cell>
          <table:table-cell table:style-name="ce47" table:formula="of:=[.F21]*[.I21]" office:value-type="float" office:value="0.984454501412795">
            <text:p>0.9845</text:p>
          </table:table-cell>
          <table:table-cell/>
          <table:table-cell table:style-name="ce63" table:formula="of:=[.E4]/[.E21]" office:value-type="float" office:value="1.24137931034483">
            <text:p>1.2414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102.127">
            <text:p>102.127</text:p>
          </table:table-cell>
          <table:table-cell table:style-name="ce23" office:value-type="float" office:value="86.923">
            <text:p>86.923</text:p>
          </table:table-cell>
          <table:table-cell table:style-name="ce29" office:value-type="float" office:value="34.04">
            <text:p>34.04</text:p>
          </table:table-cell>
          <table:table-cell table:style-name="ce53" table:formula="of:=[.C4]/[.C22]" office:value-type="float" office:value="2.09678145838025">
            <text:p>2.10</text:p>
          </table:table-cell>
          <table:table-cell table:style-name="ce54" table:formula="of:=[.D4]/[.D22]" office:value-type="float" office:value="2.2755772350241">
            <text:p>2.28</text:p>
          </table:table-cell>
          <table:table-cell table:style-name="ce60" table:formula="of:=[.E22] - [.E4]" office:value-type="float" office:value="-5.92">
            <text:p>-5.92</text:p>
          </table:table-cell>
          <table:table-cell table:style-name="ce47" table:formula="of:=[.E22]/[.E4]" office:value-type="float" office:value="0.851851851851852">
            <text:p>0.8519</text:p>
          </table:table-cell>
          <table:table-cell table:style-name="ce47" table:formula="of:=[.F22]*[.I22]" office:value-type="float" office:value="1.78614716824984">
            <text:p>1.7861</text:p>
          </table:table-cell>
          <table:table-cell/>
          <table:table-cell table:style-name="ce63" table:formula="of:=[.E4]/[.E22]" office:value-type="float" office:value="1.17391304347826">
            <text:p>1.1739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-mobile_cif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12" office:value-type="string">
            <text:p>mobile_cif-9abcb7a34043d58473cecbe985bebfa3.cf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202.21">
            <text:p>202.210</text:p>
          </table:table-cell>
          <table:table-cell table:style-name="ce20" office:value-type="float" office:value="178.845">
            <text:p>178.845</text:p>
          </table:table-cell>
          <table:table-cell table:style-name="ce26" office:value-type="float" office:value="27.46">
            <text:p>27.46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197.293">
            <text:p>197.293</text:p>
          </table:table-cell>
          <table:table-cell table:style-name="ce21" office:value-type="float" office:value="173.691">
            <text:p>173.691</text:p>
          </table:table-cell>
          <table:table-cell table:style-name="ce27" office:value-type="float" office:value="27.49">
            <text:p>27.49</text:p>
          </table:table-cell>
          <table:table-cell table:style-name="ce33" table:formula="of:=[.C4]/[.C5]" office:value-type="float" office:value="1.02492232365061">
            <text:p>1.02</text:p>
          </table:table-cell>
          <table:table-cell table:style-name="ce33" table:formula="of:=[.D4]/[.D5]" office:value-type="float" office:value="1.02967338549493">
            <text:p>1.03</text:p>
          </table:table-cell>
          <table:table-cell table:style-name="ce14" table:formula="of:=[.E5] - [.E4]" office:value-type="float" office:value="0.0299999999999976">
            <text:p>0.03</text:p>
          </table:table-cell>
          <table:table-cell table:style-name="ce39" table:formula="of:=[.E5]/[.E4]" office:value-type="float" office:value="1.00109249817917">
            <text:p>1.0011</text:p>
          </table:table-cell>
          <table:table-cell table:style-name="ce43" table:formula="of:=[.F5]*[.I5]" office:value-type="float" office:value="1.02604204942299">
            <text:p>1.0260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186.54">
            <text:p>186.540</text:p>
          </table:table-cell>
          <table:table-cell table:style-name="ce21" office:value-type="float" office:value="163.011">
            <text:p>163.011</text:p>
          </table:table-cell>
          <table:table-cell table:style-name="ce27" office:value-type="float" office:value="27.5">
            <text:p>27.50</text:p>
          </table:table-cell>
          <table:table-cell table:style-name="ce89" table:formula="of:=[.C4]/[.C6]" office:value-type="float" office:value="1.08400343089954">
            <text:p>1.08</text:p>
          </table:table-cell>
          <table:table-cell table:style-name="ce33" table:formula="of:=[.D4]/[.D6]" office:value-type="float" office:value="1.0971345492022">
            <text:p>1.10</text:p>
          </table:table-cell>
          <table:table-cell table:style-name="ce92" table:formula="of:=[.E6] - [.E4]" office:value-type="float" office:value="0.0399999999999991">
            <text:p>0.04</text:p>
          </table:table-cell>
          <table:table-cell table:style-name="ce39" table:formula="of:=[.E6]/[.E4]" office:value-type="float" office:value="1.00145666423889">
            <text:p>1.0015</text:p>
          </table:table-cell>
          <table:table-cell table:style-name="ce43" table:formula="of:=[.F6]*[.I6]" office:value-type="float" office:value="1.08558245993217">
            <text:p>1.0856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171.656">
            <text:p>171.656</text:p>
          </table:table-cell>
          <table:table-cell table:style-name="ce21" office:value-type="float" office:value="148.162">
            <text:p>148.162</text:p>
          </table:table-cell>
          <table:table-cell table:style-name="ce27" office:value-type="float" office:value="27.47">
            <text:p>27.47</text:p>
          </table:table-cell>
          <table:table-cell table:style-name="ce33" table:formula="of:=[.C4]/[.C7]" office:value-type="float" office:value="1.17799552593559">
            <text:p>1.18</text:p>
          </table:table-cell>
          <table:table-cell table:style-name="ce33" table:formula="of:=[.D4]/[.D7]" office:value-type="float" office:value="1.20709088700207">
            <text:p>1.21</text:p>
          </table:table-cell>
          <table:table-cell table:style-name="ce56" table:formula="of:=[.E7] - [.E4]" office:value-type="float" office:value="0.00999999999999801">
            <text:p>0.01</text:p>
          </table:table-cell>
          <table:table-cell table:style-name="ce43" table:formula="of:=[.E7]/[.E4]" office:value-type="float" office:value="1.00036416605972">
            <text:p>1.0004</text:p>
          </table:table-cell>
          <table:table-cell table:style-name="ce43" table:formula="of:=[.F7]*[.I7]" office:value-type="float" office:value="1.17842451192464">
            <text:p>1.1784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145.694">
            <text:p>145.694</text:p>
          </table:table-cell>
          <table:table-cell table:style-name="ce21" office:value-type="float" office:value="122.066">
            <text:p>122.066</text:p>
          </table:table-cell>
          <table:table-cell table:style-name="ce27" office:value-type="float" office:value="27.44">
            <text:p>27.44</text:p>
          </table:table-cell>
          <table:table-cell table:style-name="ce33" table:formula="of:=[.C4]/[.C8]" office:value-type="float" office:value="1.3879089049652">
            <text:p>1.39</text:p>
          </table:table-cell>
          <table:table-cell table:style-name="ce33" table:formula="of:=[.D4]/[.D8]" office:value-type="float" office:value="1.46515000081923">
            <text:p>1.47</text:p>
          </table:table-cell>
          <table:table-cell table:style-name="ce56" table:formula="of:=[.E8] - [.E4]" office:value-type="float" office:value="-0.0199999999999996">
            <text:p>-0.02</text:p>
          </table:table-cell>
          <table:table-cell table:style-name="ce61" table:formula="of:=[.E8]/[.E4]" office:value-type="float" office:value="0.999271667880553">
            <text:p>0.9993</text:p>
          </table:table-cell>
          <table:table-cell table:style-name="ce43" table:formula="of:=[.F8]*[.I8]" office:value-type="float" office:value="1.38689804633085">
            <text:p>1.3869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114.001">
            <text:p>114.001</text:p>
          </table:table-cell>
          <table:table-cell table:style-name="ce21" office:value-type="float" office:value="90.574">
            <text:p>90.574</text:p>
          </table:table-cell>
          <table:table-cell table:style-name="ce27" office:value-type="float" office:value="27.3">
            <text:p>27.30</text:p>
          </table:table-cell>
          <table:table-cell table:style-name="ce33" table:formula="of:=[.C4]/[.C9]" office:value-type="float" office:value="1.77375637055815">
            <text:p>1.77</text:p>
          </table:table-cell>
          <table:table-cell table:style-name="ce33" table:formula="of:=[.D4]/[.D9]" office:value-type="float" office:value="1.97457327709939">
            <text:p>1.97</text:p>
          </table:table-cell>
          <table:table-cell table:style-name="ce56" table:formula="of:=[.E9] - [.E4]" office:value-type="float" office:value="-0.16">
            <text:p>-0.16</text:p>
          </table:table-cell>
          <table:table-cell table:style-name="ce61" table:formula="of:=[.E9]/[.E4]" office:value-type="float" office:value="0.994173343044428">
            <text:p>0.9942</text:p>
          </table:table-cell>
          <table:table-cell table:style-name="ce43" table:formula="of:=[.F9]*[.I9]" office:value-type="float" office:value="1.76342130066415">
            <text:p>1.7634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86.904">
            <text:p>86.904</text:p>
          </table:table-cell>
          <table:table-cell table:style-name="ce21" office:value-type="float" office:value="62.959">
            <text:p>62.959</text:p>
          </table:table-cell>
          <table:table-cell table:style-name="ce27" office:value-type="float" office:value="26.87">
            <text:p>26.87</text:p>
          </table:table-cell>
          <table:table-cell table:style-name="ce49" table:formula="of:=[.C4]/[.C10]" office:value-type="float" office:value="2.32682039952131">
            <text:p>2.33</text:p>
          </table:table-cell>
          <table:table-cell table:style-name="ce49" table:formula="of:=[.D4]/[.D10]" office:value-type="float" office:value="2.84065820613415">
            <text:p>2.84</text:p>
          </table:table-cell>
          <table:table-cell table:style-name="ce56" table:formula="of:=[.E10] - [.E4]" office:value-type="float" office:value="-0.59">
            <text:p>-0.59</text:p>
          </table:table-cell>
          <table:table-cell table:style-name="ce61" table:formula="of:=[.E10]/[.E4]" office:value-type="float" office:value="0.978514202476329">
            <text:p>0.9785</text:p>
          </table:table-cell>
          <table:table-cell table:style-name="ce43" table:formula="of:=[.F10]*[.I10]" office:value-type="float" office:value="2.27682680754325">
            <text:p>2.2768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78.283">
            <text:p>78.283</text:p>
          </table:table-cell>
          <table:table-cell table:style-name="ce21" office:value-type="float" office:value="54.42">
            <text:p>54.420</text:p>
          </table:table-cell>
          <table:table-cell table:style-name="ce27" office:value-type="float" office:value="24.91">
            <text:p>24.91</text:p>
          </table:table-cell>
          <table:table-cell table:style-name="ce49" table:formula="of:=[.C4]/[.C11]" office:value-type="float" office:value="2.58306401134346">
            <text:p>2.58</text:p>
          </table:table-cell>
          <table:table-cell table:style-name="ce49" table:formula="of:=[.D4]/[.D11]" office:value-type="float" office:value="3.28638368246968">
            <text:p>3.29</text:p>
          </table:table-cell>
          <table:table-cell table:style-name="ce56" table:formula="of:=[.E11] - [.E4]" office:value-type="float" office:value="-2.55">
            <text:p>-2.55</text:p>
          </table:table-cell>
          <table:table-cell table:style-name="ce61" table:formula="of:=[.E11]/[.E4]" office:value-type="float" office:value="0.907137654770575">
            <text:p>0.9071</text:p>
          </table:table-cell>
          <table:table-cell table:style-name="ce43" table:formula="of:=[.F11]*[.I11]" office:value-type="float" office:value="2.34319462937238">
            <text:p>2.3432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122.624">
            <text:p>122.624</text:p>
          </table:table-cell>
          <table:table-cell table:style-name="ce22" office:value-type="float" office:value="98.621">
            <text:p>98.621</text:p>
          </table:table-cell>
          <table:table-cell table:style-name="ce28" office:value-type="float" office:value="27.23">
            <text:p>27.23</text:p>
          </table:table-cell>
          <table:table-cell table:style-name="ce50" table:formula="of:=[.C4]/[.C12]" office:value-type="float" office:value="1.64902466075157">
            <text:p>1.65</text:p>
          </table:table-cell>
          <table:table-cell table:style-name="ce50" table:formula="of:=[.D4]/[.D12]" office:value-type="float" office:value="1.81345758002859">
            <text:p>1.81</text:p>
          </table:table-cell>
          <table:table-cell table:style-name="ce15" table:formula="of:=[.E12] - [.E4]" office:value-type="float" office:value="-0.23">
            <text:p>-0.23</text:p>
          </table:table-cell>
          <table:table-cell table:style-name="ce62" table:formula="of:=[.E12]/[.E4]" office:value-type="float" office:value="0.991624180626366">
            <text:p>0.9916</text:p>
          </table:table-cell>
          <table:table-cell table:style-name="ce45" table:formula="of:=[.F12]*[.I12]" office:value-type="float" office:value="1.63521272805044">
            <text:p>1.6352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91.413">
            <text:p>91.413</text:p>
          </table:table-cell>
          <table:table-cell table:style-name="ce22" office:value-type="float" office:value="67.451">
            <text:p>67.451</text:p>
          </table:table-cell>
          <table:table-cell table:style-name="ce28" office:value-type="float" office:value="27.02">
            <text:p>27.02</text:p>
          </table:table-cell>
          <table:table-cell table:style-name="ce90" table:formula="of:=[.C4]/[.C13]" office:value-type="float" office:value="2.21204861452966">
            <text:p>2.21</text:p>
          </table:table-cell>
          <table:table-cell table:style-name="ce50" table:formula="of:=[.D4]/[.D13]" office:value-type="float" office:value="2.651480333872">
            <text:p>2.65</text:p>
          </table:table-cell>
          <table:table-cell table:style-name="ce93" table:formula="of:=[.E13] - [.E4]" office:value-type="float" office:value="-0.440000000000001">
            <text:p>-0.44</text:p>
          </table:table-cell>
          <table:table-cell table:style-name="ce62" table:formula="of:=[.E13]/[.E4]" office:value-type="float" office:value="0.983976693372178">
            <text:p>0.9840</text:p>
          </table:table-cell>
          <table:table-cell table:style-name="ce45" table:formula="of:=[.F13]*[.I13]" office:value-type="float" office:value="2.1766042813034">
            <text:p>2.1766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79.501">
            <text:p>79.501</text:p>
          </table:table-cell>
          <table:table-cell table:style-name="ce22" office:value-type="float" office:value="55.805">
            <text:p>55.805</text:p>
          </table:table-cell>
          <table:table-cell table:style-name="ce28" office:value-type="float" office:value="26.61">
            <text:p>26.61</text:p>
          </table:table-cell>
          <table:table-cell table:style-name="ce50" table:formula="of:=[.C4]/[.C14]" office:value-type="float" office:value="2.54349001899347">
            <text:p>2.54</text:p>
          </table:table-cell>
          <table:table-cell table:style-name="ce50" table:formula="of:=[.D4]/[.D14]" office:value-type="float" office:value="3.20482035659887">
            <text:p>3.20</text:p>
          </table:table-cell>
          <table:table-cell table:style-name="ce58" table:formula="of:=[.E14] - [.E4]" office:value-type="float" office:value="-0.850000000000001">
            <text:p>-0.85</text:p>
          </table:table-cell>
          <table:table-cell table:style-name="ce62" table:formula="of:=[.E14]/[.E4]" office:value-type="float" office:value="0.969045884923525">
            <text:p>0.9690</text:p>
          </table:table-cell>
          <table:table-cell table:style-name="ce45" table:formula="of:=[.F14]*[.I14]" office:value-type="float" office:value="2.46475853624968">
            <text:p>2.4648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89.44">
            <text:p>89.440</text:p>
          </table:table-cell>
          <table:table-cell table:style-name="ce23" office:value-type="float" office:value="65.788">
            <text:p>65.788</text:p>
          </table:table-cell>
          <table:table-cell table:style-name="ce29" office:value-type="float" office:value="27">
            <text:p>27.00</text:p>
          </table:table-cell>
          <table:table-cell table:style-name="ce91" table:formula="of:=[.C4]/[.C15]" office:value-type="float" office:value="2.26084525939177">
            <text:p>2.26</text:p>
          </table:table-cell>
          <table:table-cell table:style-name="ce53" table:formula="of:=[.D4]/[.D15]" office:value-type="float" office:value="2.71850489450964">
            <text:p>2.72</text:p>
          </table:table-cell>
          <table:table-cell table:style-name="ce94" table:formula="of:=[.E15] - [.E4]" office:value-type="float" office:value="-0.460000000000001">
            <text:p>-0.46</text:p>
          </table:table-cell>
          <table:table-cell table:style-name="ce63" table:formula="of:=[.E15]/[.E4]" office:value-type="float" office:value="0.983248361252731">
            <text:p>0.9832</text:p>
          </table:table-cell>
          <table:table-cell table:style-name="ce47" table:formula="of:=[.F15]*[.I15]" office:value-type="float" office:value="2.22297239634296">
            <text:p>2.2230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123.446">
            <text:p>123.446</text:p>
          </table:table-cell>
          <table:table-cell table:style-name="ce23" office:value-type="float" office:value="99.544">
            <text:p>99.544</text:p>
          </table:table-cell>
          <table:table-cell table:style-name="ce29" office:value-type="float" office:value="27.22">
            <text:p>27.22</text:p>
          </table:table-cell>
          <table:table-cell table:style-name="ce53" table:formula="of:=[.C4]/[.C16]" office:value-type="float" office:value="1.63804416506003">
            <text:p>1.64</text:p>
          </table:table-cell>
          <table:table-cell table:style-name="ce54" table:formula="of:=[.D4]/[.D16]" office:value-type="float" office:value="1.79664269066945">
            <text:p>1.80</text:p>
          </table:table-cell>
          <table:table-cell table:style-name="ce60" table:formula="of:=[.E16] - [.E4]" office:value-type="float" office:value="-0.240000000000002">
            <text:p>-0.24</text:p>
          </table:table-cell>
          <table:table-cell table:style-name="ce63" table:formula="of:=[.E16]/[.E4]" office:value-type="float" office:value="0.991260014566642">
            <text:p>0.9913</text:p>
          </table:table-cell>
          <table:table-cell table:style-name="ce47" table:formula="of:=[.F16]*[.I16]" office:value-type="float" office:value="1.62372768291821">
            <text:p>1.6237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122.5">
            <text:p>122.500</text:p>
          </table:table-cell>
          <table:table-cell table:style-name="ce23" office:value-type="float" office:value="98.664">
            <text:p>98.664</text:p>
          </table:table-cell>
          <table:table-cell table:style-name="ce29" office:value-type="float" office:value="20.28">
            <text:p>20.28</text:p>
          </table:table-cell>
          <table:table-cell table:style-name="ce53" table:formula="of:=[.C4]/[.C17]" office:value-type="float" office:value="1.65069387755102">
            <text:p>1.65</text:p>
          </table:table-cell>
          <table:table-cell table:style-name="ce54" table:formula="of:=[.D4]/[.D17]" office:value-type="float" office:value="1.81266723424957">
            <text:p>1.81</text:p>
          </table:table-cell>
          <table:table-cell table:style-name="ce60" table:formula="of:=[.E17] - [.E4]" office:value-type="float" office:value="-7.18">
            <text:p>-7.18</text:p>
          </table:table-cell>
          <table:table-cell table:style-name="ce60" table:formula="of:=[.E17]/[.E4]" office:value-type="float" office:value="0.738528769118718">
            <text:p>0.74</text:p>
          </table:table-cell>
          <table:table-cell table:style-name="ce47" table:formula="of:=[.F17]*[.I17]" office:value-type="float" office:value="1.21908491757956">
            <text:p>1.2191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206.26">
            <text:p>206.260</text:p>
          </table:table-cell>
          <table:table-cell table:style-name="ce23" office:value-type="float" office:value="182.593">
            <text:p>182.593</text:p>
          </table:table-cell>
          <table:table-cell table:style-name="ce29" office:value-type="float" office:value="19.99">
            <text:p>19.99</text:p>
          </table:table-cell>
          <table:table-cell table:style-name="ce53" table:formula="of:=[.C4]/[.C18]" office:value-type="float" office:value="0.980364588383594">
            <text:p>0.98</text:p>
          </table:table-cell>
          <table:table-cell table:style-name="ce54" table:formula="of:=[.D4]/[.D18]" office:value-type="float" office:value="0.979473473791438">
            <text:p>0.98</text:p>
          </table:table-cell>
          <table:table-cell table:style-name="ce60" table:formula="of:=[.E18] - [.E4]" office:value-type="float" office:value="-7.47">
            <text:p>-7.47</text:p>
          </table:table-cell>
          <table:table-cell table:style-name="ce60" table:formula="of:=[.E18]/[.E4]" office:value-type="float" office:value="0.727967953386744">
            <text:p>0.73</text:p>
          </table:table-cell>
          <table:table-cell table:style-name="ce47" table:formula="of:=[.F18]*[.I18]" office:value-type="float" office:value="0.713674002978443">
            <text:p>0.7137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201.178">
            <text:p>201.178</text:p>
          </table:table-cell>
          <table:table-cell table:style-name="ce23" office:value-type="float" office:value="177.627">
            <text:p>177.627</text:p>
          </table:table-cell>
          <table:table-cell table:style-name="ce29" office:value-type="float" office:value="19.91">
            <text:p>19.91</text:p>
          </table:table-cell>
          <table:table-cell table:style-name="ce53" table:formula="of:=[.C4]/[.C19]" office:value-type="float" office:value="1.00512978556303">
            <text:p>1.01</text:p>
          </table:table-cell>
          <table:table-cell table:style-name="ce54" table:formula="of:=[.D4]/[.D19]" office:value-type="float" office:value="1.0068570656488">
            <text:p>1.01</text:p>
          </table:table-cell>
          <table:table-cell table:style-name="ce60" table:formula="of:=[.E19] - [.E4]" office:value-type="float" office:value="-7.55">
            <text:p>-7.55</text:p>
          </table:table-cell>
          <table:table-cell table:style-name="ce60" table:formula="of:=[.E19]/[.E4]" office:value-type="float" office:value="0.725054624908958">
            <text:p>0.73</text:p>
          </table:table-cell>
          <table:table-cell table:style-name="ce47" table:formula="of:=[.F19]*[.I19]" office:value-type="float" office:value="0.728773999656227">
            <text:p>0.7288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117.867">
            <text:p>117.867</text:p>
          </table:table-cell>
          <table:table-cell table:style-name="ce23" office:value-type="float" office:value="94.516">
            <text:p>94.516</text:p>
          </table:table-cell>
          <table:table-cell table:style-name="ce29" office:value-type="float" office:value="20.2">
            <text:p>20.20</text:p>
          </table:table-cell>
          <table:table-cell table:style-name="ce53" table:formula="of:=[.C4]/[.C20]" office:value-type="float" office:value="1.71557772743855">
            <text:p>1.72</text:p>
          </table:table-cell>
          <table:table-cell table:style-name="ce54" table:formula="of:=[.D4]/[.D20]" office:value-type="float" office:value="1.89221930678404">
            <text:p>1.89</text:p>
          </table:table-cell>
          <table:table-cell table:style-name="ce60" table:formula="of:=[.E20] - [.E4]" office:value-type="float" office:value="-7.26">
            <text:p>-7.26</text:p>
          </table:table-cell>
          <table:table-cell table:style-name="ce60" table:formula="of:=[.E20]/[.E4]" office:value-type="float" office:value="0.735615440640932">
            <text:p>0.74</text:p>
          </table:table-cell>
          <table:table-cell table:style-name="ce47" table:formula="of:=[.F20]*[.I20]" office:value-type="float" office:value="1.26200546592348">
            <text:p>1.2620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192.607">
            <text:p>192.607</text:p>
          </table:table-cell>
          <table:table-cell table:style-name="ce23" office:value-type="float" office:value="169.182">
            <text:p>169.182</text:p>
          </table:table-cell>
          <table:table-cell table:style-name="ce29" office:value-type="float" office:value="19.72">
            <text:p>19.72</text:p>
          </table:table-cell>
          <table:table-cell table:style-name="ce53" table:formula="of:=[.C4]/[.C21]" office:value-type="float" office:value="1.04985800100723">
            <text:p>1.05</text:p>
          </table:table-cell>
          <table:table-cell table:style-name="ce54" table:formula="of:=[.D4]/[.D21]" office:value-type="float" office:value="1.05711600524879">
            <text:p>1.06</text:p>
          </table:table-cell>
          <table:table-cell table:style-name="ce60" table:formula="of:=[.E21] - [.E4]" office:value-type="float" office:value="-7.74">
            <text:p>-7.74</text:p>
          </table:table-cell>
          <table:table-cell table:style-name="ce60" table:formula="of:=[.E21]/[.E4]" office:value-type="float" office:value="0.718135469774217">
            <text:p>0.72</text:p>
          </table:table-cell>
          <table:table-cell table:style-name="ce47" table:formula="of:=[.F21]*[.I21]" office:value-type="float" office:value="0.753940268749549">
            <text:p>0.7539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114">
            <text:p>114.000</text:p>
          </table:table-cell>
          <table:table-cell table:style-name="ce23" office:value-type="float" office:value="90.496">
            <text:p>90.496</text:p>
          </table:table-cell>
          <table:table-cell table:style-name="ce29" office:value-type="float" office:value="20.19">
            <text:p>20.19</text:p>
          </table:table-cell>
          <table:table-cell table:style-name="ce53" table:formula="of:=[.C4]/[.C22]" office:value-type="float" office:value="1.77377192982456">
            <text:p>1.77</text:p>
          </table:table-cell>
          <table:table-cell table:style-name="ce54" table:formula="of:=[.D4]/[.D22]" office:value-type="float" office:value="1.97627519448373">
            <text:p>1.98</text:p>
          </table:table-cell>
          <table:table-cell table:style-name="ce60" table:formula="of:=[.E22] - [.E4]" office:value-type="float" office:value="-7.27">
            <text:p>-7.27</text:p>
          </table:table-cell>
          <table:table-cell table:style-name="ce16" table:formula="of:=[.E22]/[.E4]" office:value-type="float" office:value="0.735251274581209">
            <text:p>0.74</text:p>
          </table:table-cell>
          <table:table-cell table:style-name="ce47" table:formula="of:=[.F22]*[.I22]" office:value-type="float" office:value="1.30416807221988">
            <text:p>1.3042</text:p>
          </table:table-cell>
        </table:table-row>
        <table:table-row table:style-name="ro1" table:number-rows-repeated="65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-city_4cif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12" office:value-type="string">
            <text:p>city_4cif-daf7c26675538d53aba276d8d540424d.cf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2421.284">
            <text:p>2421.284</text:p>
          </table:table-cell>
          <table:table-cell table:style-name="ce20" office:value-type="float" office:value="2210.889">
            <text:p>2210.889</text:p>
          </table:table-cell>
          <table:table-cell table:style-name="ce26" office:value-type="float" office:value="39.81">
            <text:p>39.81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2222.205">
            <text:p>2222.205</text:p>
          </table:table-cell>
          <table:table-cell table:style-name="ce21" office:value-type="float" office:value="2012.262">
            <text:p>2012.262</text:p>
          </table:table-cell>
          <table:table-cell table:style-name="ce27" office:value-type="float" office:value="39.77">
            <text:p>39.77</text:p>
          </table:table-cell>
          <table:table-cell table:style-name="ce33" table:formula="of:=[.C4]/[.C5]" office:value-type="float" office:value="1.08958624429339">
            <text:p>1.09</text:p>
          </table:table-cell>
          <table:table-cell table:style-name="ce33" table:formula="of:=[.D4]/[.D5]" office:value-type="float" office:value="1.09870831929441">
            <text:p>1.10</text:p>
          </table:table-cell>
          <table:table-cell table:style-name="ce14" table:formula="of:=[.E5] - [.E4]" office:value-type="float" office:value="-0.0399999999999991">
            <text:p>-0.04</text:p>
          </table:table-cell>
          <table:table-cell table:style-name="ce39" table:formula="of:=[.E5]/[.E4]" office:value-type="float" office:value="0.998995227329817">
            <text:p>0.9990</text:p>
          </table:table-cell>
          <table:table-cell table:style-name="ce43" table:formula="of:=[.F5]*[.I5]" office:value-type="float" office:value="1.08849145781332">
            <text:p>1.0885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1880.175">
            <text:p>1880.175</text:p>
          </table:table-cell>
          <table:table-cell table:style-name="ce21" office:value-type="float" office:value="1672.596">
            <text:p>1672.596</text:p>
          </table:table-cell>
          <table:table-cell table:style-name="ce27" office:value-type="float" office:value="39.74">
            <text:p>39.74</text:p>
          </table:table-cell>
          <table:table-cell table:style-name="ce89" table:formula="of:=[.C4]/[.C6]" office:value-type="float" office:value="1.28779714654221">
            <text:p>1.29</text:p>
          </table:table-cell>
          <table:table-cell table:style-name="ce33" table:formula="of:=[.D4]/[.D6]" office:value-type="float" office:value="1.32183085455185">
            <text:p>1.32</text:p>
          </table:table-cell>
          <table:table-cell table:style-name="ce92" table:formula="of:=[.E6] - [.E4]" office:value-type="float" office:value="-0.0700000000000003">
            <text:p>-0.07</text:p>
          </table:table-cell>
          <table:table-cell table:style-name="ce39" table:formula="of:=[.E6]/[.E4]" office:value-type="float" office:value="0.998241647827179">
            <text:p>0.9982</text:p>
          </table:table-cell>
          <table:table-cell table:style-name="ce43" table:formula="of:=[.F6]*[.I6]" office:value-type="float" office:value="1.28553274563144">
            <text:p>1.2855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1333.972">
            <text:p>1333.972</text:p>
          </table:table-cell>
          <table:table-cell table:style-name="ce21" office:value-type="float" office:value="1129.407">
            <text:p>1129.407</text:p>
          </table:table-cell>
          <table:table-cell table:style-name="ce27" office:value-type="float" office:value="39.71">
            <text:p>39.71</text:p>
          </table:table-cell>
          <table:table-cell table:style-name="ce33" table:formula="of:=[.C4]/[.C7]" office:value-type="float" office:value="1.81509357017988">
            <text:p>1.82</text:p>
          </table:table-cell>
          <table:table-cell table:style-name="ce33" table:formula="of:=[.D4]/[.D7]" office:value-type="float" office:value="1.95756622723252">
            <text:p>1.96</text:p>
          </table:table-cell>
          <table:table-cell table:style-name="ce56" table:formula="of:=[.E7] - [.E4]" office:value-type="float" office:value="-0.100000000000001">
            <text:p>-0.10</text:p>
          </table:table-cell>
          <table:table-cell table:style-name="ce43" table:formula="of:=[.E7]/[.E4]" office:value-type="float" office:value="0.997488068324541">
            <text:p>0.9975</text:p>
          </table:table-cell>
          <table:table-cell table:style-name="ce43" table:formula="of:=[.F7]*[.I7]" office:value-type="float" office:value="1.81053417914703">
            <text:p>1.8105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882.59">
            <text:p>882.590</text:p>
          </table:table-cell>
          <table:table-cell table:style-name="ce21" office:value-type="float" office:value="677.262">
            <text:p>677.262</text:p>
          </table:table-cell>
          <table:table-cell table:style-name="ce27" office:value-type="float" office:value="39.65">
            <text:p>39.65</text:p>
          </table:table-cell>
          <table:table-cell table:style-name="ce33" table:formula="of:=[.C4]/[.C8]" office:value-type="float" office:value="2.74338481061422">
            <text:p>2.74</text:p>
          </table:table-cell>
          <table:table-cell table:style-name="ce33" table:formula="of:=[.D4]/[.D8]" office:value-type="float" office:value="3.26445157117925">
            <text:p>3.26</text:p>
          </table:table-cell>
          <table:table-cell table:style-name="ce56" table:formula="of:=[.E8] - [.E4]" office:value-type="float" office:value="-0.160000000000004">
            <text:p>-0.16</text:p>
          </table:table-cell>
          <table:table-cell table:style-name="ce61" table:formula="of:=[.E8]/[.E4]" office:value-type="float" office:value="0.995980909319266">
            <text:p>0.9960</text:p>
          </table:table-cell>
          <table:table-cell table:style-name="ce43" table:formula="of:=[.F8]*[.I8]" office:value-type="float" office:value="2.73235889828821">
            <text:p>2.7324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669.42">
            <text:p>669.420</text:p>
          </table:table-cell>
          <table:table-cell table:style-name="ce21" office:value-type="float" office:value="464.218">
            <text:p>464.218</text:p>
          </table:table-cell>
          <table:table-cell table:style-name="ce27" office:value-type="float" office:value="39.43">
            <text:p>39.43</text:p>
          </table:table-cell>
          <table:table-cell table:style-name="ce33" table:formula="of:=[.C4]/[.C9]" office:value-type="float" office:value="3.61698784021989">
            <text:p>3.62</text:p>
          </table:table-cell>
          <table:table-cell table:style-name="ce33" table:formula="of:=[.D4]/[.D9]" office:value-type="float" office:value="4.76260937749075">
            <text:p>4.76</text:p>
          </table:table-cell>
          <table:table-cell table:style-name="ce56" table:formula="of:=[.E9] - [.E4]" office:value-type="float" office:value="-0.380000000000003">
            <text:p>-0.38</text:p>
          </table:table-cell>
          <table:table-cell table:style-name="ce61" table:formula="of:=[.E9]/[.E4]" office:value-type="float" office:value="0.990454659633258">
            <text:p>0.9905</text:p>
          </table:table-cell>
          <table:table-cell table:style-name="ce43" table:formula="of:=[.F9]*[.I9]" office:value-type="float" office:value="3.58246246018263">
            <text:p>3.5825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634.896">
            <text:p>634.896</text:p>
          </table:table-cell>
          <table:table-cell table:style-name="ce21" office:value-type="float" office:value="424.266">
            <text:p>424.266</text:p>
          </table:table-cell>
          <table:table-cell table:style-name="ce27" office:value-type="float" office:value="37.72">
            <text:p>37.72</text:p>
          </table:table-cell>
          <table:table-cell table:style-name="ce49" table:formula="of:=[.C4]/[.C10]" office:value-type="float" office:value="3.81367027040649">
            <text:p>3.81</text:p>
          </table:table-cell>
          <table:table-cell table:style-name="ce49" table:formula="of:=[.D4]/[.D10]" office:value-type="float" office:value="5.21109162647961">
            <text:p>5.21</text:p>
          </table:table-cell>
          <table:table-cell table:style-name="ce56" table:formula="of:=[.E10] - [.E4]" office:value-type="float" office:value="-2.09">
            <text:p>-2.09</text:p>
          </table:table-cell>
          <table:table-cell table:style-name="ce61" table:formula="of:=[.E10]/[.E4]" office:value-type="float" office:value="0.947500627982919">
            <text:p>0.9475</text:p>
          </table:table-cell>
          <table:table-cell table:style-name="ce43" table:formula="of:=[.F10]*[.I10]" office:value-type="float" office:value="3.61345497612994">
            <text:p>3.6135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650.638">
            <text:p>650.638</text:p>
          </table:table-cell>
          <table:table-cell table:style-name="ce21" office:value-type="float" office:value="440.439">
            <text:p>440.439</text:p>
          </table:table-cell>
          <table:table-cell table:style-name="ce27" office:value-type="float" office:value="32.56">
            <text:p>32.56</text:p>
          </table:table-cell>
          <table:table-cell table:style-name="ce49" table:formula="of:=[.C4]/[.C11]" office:value-type="float" office:value="3.72139961084351">
            <text:p>3.72</text:p>
          </table:table-cell>
          <table:table-cell table:style-name="ce49" table:formula="of:=[.D4]/[.D11]" office:value-type="float" office:value="5.01973939637498">
            <text:p>5.02</text:p>
          </table:table-cell>
          <table:table-cell table:style-name="ce56" table:formula="of:=[.E11] - [.E4]" office:value-type="float" office:value="-7.25">
            <text:p>-7.25</text:p>
          </table:table-cell>
          <table:table-cell table:style-name="ce61" table:formula="of:=[.E11]/[.E4]" office:value-type="float" office:value="0.817884953529264">
            <text:p>0.8179</text:p>
          </table:table-cell>
          <table:table-cell table:style-name="ce43" table:formula="of:=[.F11]*[.I11]" office:value-type="float" office:value="3.04367674777857">
            <text:p>3.0437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1449.083">
            <text:p>1449.083</text:p>
          </table:table-cell>
          <table:table-cell table:style-name="ce22" office:value-type="float" office:value="1237.224">
            <text:p>1237.224</text:p>
          </table:table-cell>
          <table:table-cell table:style-name="ce28" office:value-type="float" office:value="39.68">
            <text:p>39.68</text:p>
          </table:table-cell>
          <table:table-cell table:style-name="ce50" table:formula="of:=[.C4]/[.C12]" office:value-type="float" office:value="1.67090773958428">
            <text:p>1.67</text:p>
          </table:table-cell>
          <table:table-cell table:style-name="ce50" table:formula="of:=[.D4]/[.D12]" office:value-type="float" office:value="1.78697551938857">
            <text:p>1.79</text:p>
          </table:table-cell>
          <table:table-cell table:style-name="ce15" table:formula="of:=[.E12] - [.E4]" office:value-type="float" office:value="-0.130000000000003">
            <text:p>-0.13</text:p>
          </table:table-cell>
          <table:table-cell table:style-name="ce62" table:formula="of:=[.E12]/[.E4]" office:value-type="float" office:value="0.996734488821904">
            <text:p>0.9967</text:p>
          </table:table-cell>
          <table:table-cell table:style-name="ce45" table:formula="of:=[.F12]*[.I12]" office:value-type="float" office:value="1.6654513716831">
            <text:p>1.6655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985.685">
            <text:p>985.685</text:p>
          </table:table-cell>
          <table:table-cell table:style-name="ce22" office:value-type="float" office:value="775.564">
            <text:p>775.564</text:p>
          </table:table-cell>
          <table:table-cell table:style-name="ce28" office:value-type="float" office:value="39.61">
            <text:p>39.61</text:p>
          </table:table-cell>
          <table:table-cell table:style-name="ce90" table:formula="of:=[.C4]/[.C13]" office:value-type="float" office:value="2.45644805389146">
            <text:p>2.46</text:p>
          </table:table-cell>
          <table:table-cell table:style-name="ce50" table:formula="of:=[.D4]/[.D13]" office:value-type="float" office:value="2.85068543666287">
            <text:p>2.85</text:p>
          </table:table-cell>
          <table:table-cell table:style-name="ce93" table:formula="of:=[.E13] - [.E4]" office:value-type="float" office:value="-0.200000000000003">
            <text:p>-0.20</text:p>
          </table:table-cell>
          <table:table-cell table:style-name="ce62" table:formula="of:=[.E13]/[.E4]" office:value-type="float" office:value="0.994976136649083">
            <text:p>0.9950</text:p>
          </table:table-cell>
          <table:table-cell table:style-name="ce45" table:formula="of:=[.F13]*[.I13]" office:value-type="float" office:value="2.44410719454008">
            <text:p>2.4441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774.843">
            <text:p>774.843</text:p>
          </table:table-cell>
          <table:table-cell table:style-name="ce22" office:value-type="float" office:value="563.206">
            <text:p>563.206</text:p>
          </table:table-cell>
          <table:table-cell table:style-name="ce28" office:value-type="float" office:value="39.48">
            <text:p>39.48</text:p>
          </table:table-cell>
          <table:table-cell table:style-name="ce50" table:formula="of:=[.C4]/[.C14]" office:value-type="float" office:value="3.12487045762819">
            <text:p>3.12</text:p>
          </table:table-cell>
          <table:table-cell table:style-name="ce95" table:formula="of:=[.D4]/[.D14]" office:value-type="float" office:value="3.92554234152335">
            <text:p>3.93</text:p>
          </table:table-cell>
          <table:table-cell table:style-name="ce58" table:formula="of:=[.E14] - [.E4]" office:value-type="float" office:value="-0.330000000000005">
            <text:p>-0.33</text:p>
          </table:table-cell>
          <table:table-cell table:style-name="ce62" table:formula="of:=[.E14]/[.E4]" office:value-type="float" office:value="0.991710625470987">
            <text:p>0.9917</text:p>
          </table:table-cell>
          <table:table-cell table:style-name="ce45" table:formula="of:=[.F14]*[.I14]" office:value-type="float" office:value="3.09896723605026">
            <text:p>3.0990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870.439">
            <text:p>870.439</text:p>
          </table:table-cell>
          <table:table-cell table:style-name="ce23" office:value-type="float" office:value="659.138">
            <text:p>659.138</text:p>
          </table:table-cell>
          <table:table-cell table:style-name="ce29" office:value-type="float" office:value="39.61">
            <text:p>39.61</text:p>
          </table:table-cell>
          <table:table-cell table:style-name="ce91" table:formula="of:=[.C4]/[.C15]" office:value-type="float" office:value="2.78168142741766">
            <text:p>2.78</text:p>
          </table:table-cell>
          <table:table-cell table:style-name="ce53" table:formula="of:=[.D4]/[.D15]" office:value-type="float" office:value="3.35421262315327">
            <text:p>3.35</text:p>
          </table:table-cell>
          <table:table-cell table:style-name="ce94" table:formula="of:=[.E15] - [.E4]" office:value-type="float" office:value="-0.200000000000003">
            <text:p>-0.20</text:p>
          </table:table-cell>
          <table:table-cell table:style-name="ce63" table:formula="of:=[.E15]/[.E4]" office:value-type="float" office:value="0.994976136649083">
            <text:p>0.9950</text:p>
          </table:table-cell>
          <table:table-cell table:style-name="ce47" table:formula="of:=[.F15]*[.I15]" office:value-type="float" office:value="2.76770664004053">
            <text:p>2.7677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1391.214">
            <text:p>1391.214</text:p>
          </table:table-cell>
          <table:table-cell table:style-name="ce23" office:value-type="float" office:value="1181.525">
            <text:p>1181.525</text:p>
          </table:table-cell>
          <table:table-cell table:style-name="ce29" office:value-type="float" office:value="39.68">
            <text:p>39.68</text:p>
          </table:table-cell>
          <table:table-cell table:style-name="ce35" table:formula="of:=[.C4]/[.C16]" office:value-type="float" office:value="1.74041089293236">
            <text:p>1.74</text:p>
          </table:table-cell>
          <table:table-cell table:style-name="ce54" table:formula="of:=[.D4]/[.D16]" office:value-type="float" office:value="1.87121643638518">
            <text:p>1.87</text:p>
          </table:table-cell>
          <table:table-cell table:style-name="ce60" table:formula="of:=[.E16] - [.E4]" office:value-type="float" office:value="-0.130000000000003">
            <text:p>-0.13</text:p>
          </table:table-cell>
          <table:table-cell table:style-name="ce63" table:formula="of:=[.E16]/[.E4]" office:value-type="float" office:value="0.996734488821904">
            <text:p>0.9967</text:p>
          </table:table-cell>
          <table:table-cell table:style-name="ce47" table:formula="of:=[.F16]*[.I16]" office:value-type="float" office:value="1.73472756170701">
            <text:p>1.7347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1572.004">
            <text:p>1572.004</text:p>
          </table:table-cell>
          <table:table-cell table:style-name="ce23" office:value-type="float" office:value="1365.565">
            <text:p>1365.565</text:p>
          </table:table-cell>
          <table:table-cell table:style-name="ce29" office:value-type="float" office:value="36.6">
            <text:p>36.60</text:p>
          </table:table-cell>
          <table:table-cell table:style-name="ce53" table:formula="of:=[.C4]/[.C17]" office:value-type="float" office:value="1.54025307823644">
            <text:p>1.54</text:p>
          </table:table-cell>
          <table:table-cell table:style-name="ce54" table:formula="of:=[.D4]/[.D17]" office:value-type="float" office:value="1.61902875366607">
            <text:p>1.62</text:p>
          </table:table-cell>
          <table:table-cell table:style-name="ce60" table:formula="of:=[.E17] - [.E4]" office:value-type="float" office:value="-3.21">
            <text:p>-3.21</text:p>
          </table:table-cell>
          <table:table-cell table:style-name="ce60" table:formula="of:=[.E17]/[.E4]" office:value-type="float" office:value="0.919366993217784">
            <text:p>0.92</text:p>
          </table:table-cell>
          <table:table-cell table:style-name="ce47" table:formula="of:=[.F17]*[.I17]" office:value-type="float" office:value="1.41605784133268">
            <text:p>1.4161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2605.811">
            <text:p>2605.811</text:p>
          </table:table-cell>
          <table:table-cell table:style-name="ce23" office:value-type="float" office:value="2399.069">
            <text:p>2399.069</text:p>
          </table:table-cell>
          <table:table-cell table:style-name="ce29" office:value-type="float" office:value="34.57">
            <text:p>34.57</text:p>
          </table:table-cell>
          <table:table-cell table:style-name="ce53" table:formula="of:=[.C4]/[.C18]" office:value-type="float" office:value="0.929186345441016">
            <text:p>0.93</text:p>
          </table:table-cell>
          <table:table-cell table:style-name="ce54" table:formula="of:=[.D4]/[.D18]" office:value-type="float" office:value="0.921561238963948">
            <text:p>0.92</text:p>
          </table:table-cell>
          <table:table-cell table:style-name="ce60" table:formula="of:=[.E18] - [.E4]" office:value-type="float" office:value="-5.24">
            <text:p>-5.24</text:p>
          </table:table-cell>
          <table:table-cell table:style-name="ce60" table:formula="of:=[.E18]/[.E4]" office:value-type="float" office:value="0.868374780205978">
            <text:p>0.87</text:p>
          </table:table-cell>
          <table:table-cell table:style-name="ce47" table:formula="of:=[.F18]*[.I18]" office:value-type="float" office:value="0.806881988492739">
            <text:p>0.8069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2375.16">
            <text:p>2375.160</text:p>
          </table:table-cell>
          <table:table-cell table:style-name="ce23" office:value-type="float" office:value="2173.706">
            <text:p>2173.706</text:p>
          </table:table-cell>
          <table:table-cell table:style-name="ce29" office:value-type="float" office:value="33.86">
            <text:p>33.86</text:p>
          </table:table-cell>
          <table:table-cell table:style-name="ce53" table:formula="of:=[.C4]/[.C19]" office:value-type="float" office:value="1.0194193233298">
            <text:p>1.02</text:p>
          </table:table-cell>
          <table:table-cell table:style-name="ce54" table:formula="of:=[.D4]/[.D19]" office:value-type="float" office:value="1.01710580915726">
            <text:p>1.02</text:p>
          </table:table-cell>
          <table:table-cell table:style-name="ce60" table:formula="of:=[.E19] - [.E4]" office:value-type="float" office:value="-5.95">
            <text:p>-5.95</text:p>
          </table:table-cell>
          <table:table-cell table:style-name="ce60" table:formula="of:=[.E19]/[.E4]" office:value-type="float" office:value="0.850540065310224">
            <text:p>0.85</text:p>
          </table:table-cell>
          <table:table-cell table:style-name="ce47" table:formula="of:=[.F19]*[.I19]" office:value-type="float" office:value="0.867056977843429">
            <text:p>0.8671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1400.613">
            <text:p>1400.613</text:p>
          </table:table-cell>
          <table:table-cell table:style-name="ce23" office:value-type="float" office:value="1200.543">
            <text:p>1200.543</text:p>
          </table:table-cell>
          <table:table-cell table:style-name="ce29" office:value-type="float" office:value="36.39">
            <text:p>36.39</text:p>
          </table:table-cell>
          <table:table-cell table:style-name="ce53" table:formula="of:=[.C4]/[.C20]" office:value-type="float" office:value="1.72873163393457">
            <text:p>1.73</text:p>
          </table:table-cell>
          <table:table-cell table:style-name="ce54" table:formula="of:=[.D4]/[.D20]" office:value-type="float" office:value="1.84157418768008">
            <text:p>1.84</text:p>
          </table:table-cell>
          <table:table-cell table:style-name="ce60" table:formula="of:=[.E20] - [.E4]" office:value-type="float" office:value="-3.42">
            <text:p>-3.42</text:p>
          </table:table-cell>
          <table:table-cell table:style-name="ce60" table:formula="of:=[.E20]/[.E4]" office:value-type="float" office:value="0.914091936699322">
            <text:p>0.91</text:p>
          </table:table-cell>
          <table:table-cell table:style-name="ce47" table:formula="of:=[.F20]*[.I20]" office:value-type="float" office:value="1.58021964729663">
            <text:p>1.5802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2080.725">
            <text:p>2080.725</text:p>
          </table:table-cell>
          <table:table-cell table:style-name="ce23" office:value-type="float" office:value="1879.482">
            <text:p>1879.482</text:p>
          </table:table-cell>
          <table:table-cell table:style-name="ce29" office:value-type="float" office:value="33.36">
            <text:p>33.36</text:p>
          </table:table-cell>
          <table:table-cell table:style-name="ce53" table:formula="of:=[.C4]/[.C21]" office:value-type="float" office:value="1.1636732388951">
            <text:p>1.16</text:p>
          </table:table-cell>
          <table:table-cell table:style-name="ce54" table:formula="of:=[.D4]/[.D21]" office:value-type="float" office:value="1.17632890338934">
            <text:p>1.18</text:p>
          </table:table-cell>
          <table:table-cell table:style-name="ce60" table:formula="of:=[.E21] - [.E4]" office:value-type="float" office:value="-6.45">
            <text:p>-6.45</text:p>
          </table:table-cell>
          <table:table-cell table:style-name="ce60" table:formula="of:=[.E21]/[.E4]" office:value-type="float" office:value="0.837980406932931">
            <text:p>0.84</text:p>
          </table:table-cell>
          <table:table-cell table:style-name="ce47" table:formula="of:=[.F21]*[.I21]" office:value-type="float" office:value="0.975135374266275">
            <text:p>0.9751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1240.061">
            <text:p>1240.061</text:p>
          </table:table-cell>
          <table:table-cell table:style-name="ce23" office:value-type="float" office:value="1040.057">
            <text:p>1040.057</text:p>
          </table:table-cell>
          <table:table-cell table:style-name="ce29" office:value-type="float" office:value="35.85">
            <text:p>35.85</text:p>
          </table:table-cell>
          <table:table-cell table:style-name="ce53" table:formula="of:=[.C4]/[.C22]" office:value-type="float" office:value="1.95255233411905">
            <text:p>1.95</text:p>
          </table:table-cell>
          <table:table-cell table:style-name="ce54" table:formula="of:=[.D4]/[.D22]" office:value-type="float" office:value="2.12573830088159">
            <text:p>2.13</text:p>
          </table:table-cell>
          <table:table-cell table:style-name="ce60" table:formula="of:=[.E22] - [.E4]" office:value-type="float" office:value="-3.96">
            <text:p>-3.96</text:p>
          </table:table-cell>
          <table:table-cell table:style-name="ce16" table:formula="of:=[.E22]/[.E4]" office:value-type="float" office:value="0.900527505651846">
            <text:p>0.90</text:p>
          </table:table-cell>
          <table:table-cell table:style-name="ce47" table:formula="of:=[.F22]*[.I22]" office:value-type="float" office:value="1.75832708309892">
            <text:p>1.7583</text:p>
          </table:table-cell>
        </table:table-row>
        <table:table-row table:style-name="ro1" table:number-rows-repeated="65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-stockholm_720p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stockholm_720p-4a489e4206bbdaab23f0586b3fe9fbe3.cfg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6181.813">
            <text:p>6181.813</text:p>
          </table:table-cell>
          <table:table-cell table:style-name="ce20" office:value-type="float" office:value="5665.32">
            <text:p>5665.320</text:p>
          </table:table-cell>
          <table:table-cell table:style-name="ce26" office:value-type="float" office:value="38.06">
            <text:p>38.06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  <table:table-cell/>
          <table:table-cell table:style-name="ce38" table:formula="of:=[.E4]/[.E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5631.978">
            <text:p>5631.978</text:p>
          </table:table-cell>
          <table:table-cell table:style-name="ce21" office:value-type="float" office:value="5120.019">
            <text:p>5120.019</text:p>
          </table:table-cell>
          <table:table-cell table:style-name="ce27" office:value-type="float" office:value="37.99">
            <text:p>37.99</text:p>
          </table:table-cell>
          <table:table-cell table:style-name="ce33" table:formula="of:=[.C4]/[.C5]" office:value-type="float" office:value="1.09762733448178">
            <text:p>1.10</text:p>
          </table:table-cell>
          <table:table-cell table:style-name="ce33" table:formula="of:=[.D4]/[.D5]" office:value-type="float" office:value="1.1065037063339">
            <text:p>1.11</text:p>
          </table:table-cell>
          <table:table-cell table:style-name="ce14" table:formula="of:=[.E5] - [.E4]" office:value-type="float" office:value="-0.0700000000000003">
            <text:p>-0.07</text:p>
          </table:table-cell>
          <table:table-cell table:style-name="ce39" table:formula="of:=[.E5]/[.E4]" office:value-type="float" office:value="0.998160798738833">
            <text:p>0.9982</text:p>
          </table:table-cell>
          <table:table-cell table:style-name="ce43" table:formula="of:=[.F5]*[.I5]" office:value-type="float" office:value="1.09560857690391">
            <text:p>1.0956</text:p>
          </table:table-cell>
          <table:table-cell/>
          <table:table-cell table:style-name="ce39" table:formula="of:=[.E4]/[.E5]" office:value-type="float" office:value="1.0018425901553">
            <text:p>1.0018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4638.337">
            <text:p>4638.337</text:p>
          </table:table-cell>
          <table:table-cell table:style-name="ce21" office:value-type="float" office:value="4122.136">
            <text:p>4122.136</text:p>
          </table:table-cell>
          <table:table-cell table:style-name="ce27" office:value-type="float" office:value="37.96">
            <text:p>37.96</text:p>
          </table:table-cell>
          <table:table-cell table:style-name="ce89" table:formula="of:=[.C4]/[.C6]" office:value-type="float" office:value="1.332764954336">
            <text:p>1.33</text:p>
          </table:table-cell>
          <table:table-cell table:style-name="ce33" table:formula="of:=[.D4]/[.D6]" office:value-type="float" office:value="1.37436513496886">
            <text:p>1.37</text:p>
          </table:table-cell>
          <table:table-cell table:style-name="ce92" table:formula="of:=[.E6] - [.E4]" office:value-type="float" office:value="-0.100000000000001">
            <text:p>-0.10</text:p>
          </table:table-cell>
          <table:table-cell table:style-name="ce39" table:formula="of:=[.E6]/[.E4]" office:value-type="float" office:value="0.997372569626905">
            <text:p>0.9974</text:p>
          </table:table-cell>
          <table:table-cell table:style-name="ce43" table:formula="of:=[.F6]*[.I6]" office:value-type="float" office:value="1.32926320721479">
            <text:p>1.3293</text:p>
          </table:table-cell>
          <table:table-cell/>
          <table:table-cell table:style-name="ce61" table:formula="of:=[.E4]/[.E6]" office:value-type="float" office:value="1.00263435194942">
            <text:p>1.0026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2957.621">
            <text:p>2957.621</text:p>
          </table:table-cell>
          <table:table-cell table:style-name="ce21" office:value-type="float" office:value="2449.75">
            <text:p>2449.750</text:p>
          </table:table-cell>
          <table:table-cell table:style-name="ce27" office:value-type="float" office:value="37.88">
            <text:p>37.88</text:p>
          </table:table-cell>
          <table:table-cell table:style-name="ce33" table:formula="of:=[.C4]/[.C7]" office:value-type="float" office:value="2.09013020938112">
            <text:p>2.09</text:p>
          </table:table-cell>
          <table:table-cell table:style-name="ce33" table:formula="of:=[.D4]/[.D7]" office:value-type="float" office:value="2.31261149096847">
            <text:p>2.31</text:p>
          </table:table-cell>
          <table:table-cell table:style-name="ce56" table:formula="of:=[.E7] - [.E4]" office:value-type="float" office:value="-0.18">
            <text:p>-0.18</text:p>
          </table:table-cell>
          <table:table-cell table:style-name="ce43" table:formula="of:=[.E7]/[.E4]" office:value-type="float" office:value="0.995270625328429">
            <text:p>0.9953</text:p>
          </table:table-cell>
          <table:table-cell table:style-name="ce43" table:formula="of:=[.F7]*[.I7]" office:value-type="float" office:value="2.08024520050859">
            <text:p>2.0802</text:p>
          </table:table-cell>
          <table:table-cell/>
          <table:table-cell table:style-name="ce61" table:formula="of:=[.E4]/[.E7]" office:value-type="float" office:value="1.00475184794087">
            <text:p>1.0048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1828.962">
            <text:p>1828.962</text:p>
          </table:table-cell>
          <table:table-cell table:style-name="ce21" office:value-type="float" office:value="1322.143">
            <text:p>1322.143</text:p>
          </table:table-cell>
          <table:table-cell table:style-name="ce27" office:value-type="float" office:value="37.82">
            <text:p>37.82</text:p>
          </table:table-cell>
          <table:table-cell table:style-name="ce33" table:formula="of:=[.C4]/[.C8]" office:value-type="float" office:value="3.37995704667456">
            <text:p>3.38</text:p>
          </table:table-cell>
          <table:table-cell table:style-name="ce33" table:formula="of:=[.D4]/[.D8]" office:value-type="float" office:value="4.28495253539141">
            <text:p>4.28</text:p>
          </table:table-cell>
          <table:table-cell table:style-name="ce56" table:formula="of:=[.E8] - [.E4]" office:value-type="float" office:value="-0.240000000000002">
            <text:p>-0.24</text:p>
          </table:table-cell>
          <table:table-cell table:style-name="ce61" table:formula="of:=[.E8]/[.E4]" office:value-type="float" office:value="0.993694167104572">
            <text:p>0.9937</text:p>
          </table:table-cell>
          <table:table-cell table:style-name="ce43" table:formula="of:=[.F8]*[.I8]" office:value-type="float" office:value="3.35864360234451">
            <text:p>3.3586</text:p>
          </table:table-cell>
          <table:table-cell/>
          <table:table-cell table:style-name="ce61" table:formula="of:=[.E4]/[.E8]" office:value-type="float" office:value="1.00634584875727">
            <text:p>1.0063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1543.229">
            <text:p>1543.229</text:p>
          </table:table-cell>
          <table:table-cell table:style-name="ce21" office:value-type="float" office:value="1033.217">
            <text:p>1033.217</text:p>
          </table:table-cell>
          <table:table-cell table:style-name="ce27" office:value-type="float" office:value="37.78">
            <text:p>37.78</text:p>
          </table:table-cell>
          <table:table-cell table:style-name="ce33" table:formula="of:=[.C4]/[.C9]" office:value-type="float" office:value="4.00576518455783">
            <text:p>4.01</text:p>
          </table:table-cell>
          <table:table-cell table:style-name="ce33" table:formula="of:=[.D4]/[.D9]" office:value-type="float" office:value="5.4831850424451">
            <text:p>5.48</text:p>
          </table:table-cell>
          <table:table-cell table:style-name="ce56" table:formula="of:=[.E9] - [.E4]" office:value-type="float" office:value="-0.280000000000001">
            <text:p>-0.28</text:p>
          </table:table-cell>
          <table:table-cell table:style-name="ce61" table:formula="of:=[.E9]/[.E4]" office:value-type="float" office:value="0.992643194955334">
            <text:p>0.9926</text:p>
          </table:table-cell>
          <table:table-cell table:style-name="ce43" table:formula="of:=[.F9]*[.I9]" office:value-type="float" office:value="3.97629555104033">
            <text:p>3.9763</text:p>
          </table:table-cell>
          <table:table-cell/>
          <table:table-cell table:style-name="ce61" table:formula="of:=[.E4]/[.E9]" office:value-type="float" office:value="1.00741132874537">
            <text:p>1.0074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1493.113">
            <text:p>1493.113</text:p>
          </table:table-cell>
          <table:table-cell table:style-name="ce21" office:value-type="float" office:value="975.06">
            <text:p>975.060</text:p>
          </table:table-cell>
          <table:table-cell table:style-name="ce27" office:value-type="float" office:value="37.6">
            <text:p>37.60</text:p>
          </table:table-cell>
          <table:table-cell table:style-name="ce49" table:formula="of:=[.C4]/[.C10]" office:value-type="float" office:value="4.14021778659753">
            <text:p>4.14</text:p>
          </table:table-cell>
          <table:table-cell table:style-name="ce49" table:formula="of:=[.D4]/[.D10]" office:value-type="float" office:value="5.81022706294997">
            <text:p>5.81</text:p>
          </table:table-cell>
          <table:table-cell table:style-name="ce56" table:formula="of:=[.E10] - [.E4]" office:value-type="float" office:value="-0.460000000000001">
            <text:p>-0.46</text:p>
          </table:table-cell>
          <table:table-cell table:style-name="ce61" table:formula="of:=[.E10]/[.E4]" office:value-type="float" office:value="0.987913820283763">
            <text:p>0.9879</text:p>
          </table:table-cell>
          <table:table-cell table:style-name="ce43" table:formula="of:=[.F10]*[.I10]" office:value-type="float" office:value="4.09017837036435">
            <text:p>4.0902</text:p>
          </table:table-cell>
          <table:table-cell/>
          <table:table-cell table:style-name="ce61" table:formula="of:=[.E4]/[.E10]" office:value-type="float" office:value="1.01223404255319">
            <text:p>1.0122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1507.627">
            <text:p>1507.627</text:p>
          </table:table-cell>
          <table:table-cell table:style-name="ce21" office:value-type="float" office:value="995.221">
            <text:p>995.221</text:p>
          </table:table-cell>
          <table:table-cell table:style-name="ce27" office:value-type="float" office:value="33.72">
            <text:p>33.72</text:p>
          </table:table-cell>
          <table:table-cell table:style-name="ce49" table:formula="of:=[.C4]/[.C11]" office:value-type="float" office:value="4.10035970435658">
            <text:p>4.10</text:p>
          </table:table-cell>
          <table:table-cell table:style-name="ce49" table:formula="of:=[.D4]/[.D11]" office:value-type="float" office:value="5.69252457494366">
            <text:p>5.69</text:p>
          </table:table-cell>
          <table:table-cell table:style-name="ce56" table:formula="of:=[.E11] - [.E4]" office:value-type="float" office:value="-4.34">
            <text:p>-4.34</text:p>
          </table:table-cell>
          <table:table-cell table:style-name="ce61" table:formula="of:=[.E11]/[.E4]" office:value-type="float" office:value="0.885969521807672">
            <text:p>0.8860</text:p>
          </table:table-cell>
          <table:table-cell table:style-name="ce43" table:formula="of:=[.F11]*[.I11]" office:value-type="float" office:value="3.63279372650825">
            <text:p>3.6328</text:p>
          </table:table-cell>
          <table:table-cell/>
          <table:table-cell table:style-name="ce61" table:formula="of:=[.E4]/[.E11]" office:value-type="float" office:value="1.12870699881376">
            <text:p>1.1287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3403.284">
            <text:p>3403.284</text:p>
          </table:table-cell>
          <table:table-cell table:style-name="ce22" office:value-type="float" office:value="2883.412">
            <text:p>2883.412</text:p>
          </table:table-cell>
          <table:table-cell table:style-name="ce28" office:value-type="float" office:value="37.83">
            <text:p>37.83</text:p>
          </table:table-cell>
          <table:table-cell table:style-name="ce50" table:formula="of:=[.C4]/[.C12]" office:value-type="float" office:value="1.81642584045293">
            <text:p>1.82</text:p>
          </table:table-cell>
          <table:table-cell table:style-name="ce50" table:formula="of:=[.D4]/[.D12]" office:value-type="float" office:value="1.96479726102271">
            <text:p>1.96</text:p>
          </table:table-cell>
          <table:table-cell table:style-name="ce15" table:formula="of:=[.E12] - [.E4]" office:value-type="float" office:value="-0.230000000000004">
            <text:p>-0.23</text:p>
          </table:table-cell>
          <table:table-cell table:style-name="ce62" table:formula="of:=[.E12]/[.E4]" office:value-type="float" office:value="0.993956910141881">
            <text:p>0.9940</text:p>
          </table:table-cell>
          <table:table-cell table:style-name="ce45" table:formula="of:=[.F12]*[.I12]" office:value-type="float" office:value="1.80544901587846">
            <text:p>1.8054</text:p>
          </table:table-cell>
          <table:table-cell/>
          <table:table-cell table:style-name="ce62" table:formula="of:=[.E4]/[.E12]" office:value-type="float" office:value="1.0060798308221">
            <text:p>1.0061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2243.98">
            <text:p>2243.980</text:p>
          </table:table-cell>
          <table:table-cell table:style-name="ce22" office:value-type="float" office:value="1722.039">
            <text:p>1722.039</text:p>
          </table:table-cell>
          <table:table-cell table:style-name="ce28" office:value-type="float" office:value="37.78">
            <text:p>37.78</text:p>
          </table:table-cell>
          <table:table-cell table:style-name="ce90" table:formula="of:=[.C4]/[.C13]" office:value-type="float" office:value="2.7548431804205">
            <text:p>2.75</text:p>
          </table:table-cell>
          <table:table-cell table:style-name="ce50" table:formula="of:=[.D4]/[.D13]" office:value-type="float" office:value="3.28989064707594">
            <text:p>3.29</text:p>
          </table:table-cell>
          <table:table-cell table:style-name="ce93" table:formula="of:=[.E13] - [.E4]" office:value-type="float" office:value="-0.280000000000001">
            <text:p>-0.28</text:p>
          </table:table-cell>
          <table:table-cell table:style-name="ce62" table:formula="of:=[.E13]/[.E4]" office:value-type="float" office:value="0.992643194955334">
            <text:p>0.9926</text:p>
          </table:table-cell>
          <table:table-cell table:style-name="ce45" table:formula="of:=[.F13]*[.I13]" office:value-type="float" office:value="2.73457633621352">
            <text:p>2.7346</text:p>
          </table:table-cell>
          <table:table-cell/>
          <table:table-cell table:style-name="ce62" table:formula="of:=[.E4]/[.E13]" office:value-type="float" office:value="1.00741132874537">
            <text:p>1.0074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1755.006">
            <text:p>1755.006</text:p>
          </table:table-cell>
          <table:table-cell table:style-name="ce22" office:value-type="float" office:value="1234.994">
            <text:p>1234.994</text:p>
          </table:table-cell>
          <table:table-cell table:style-name="ce28" office:value-type="float" office:value="37.68">
            <text:p>37.68</text:p>
          </table:table-cell>
          <table:table-cell table:style-name="ce50" table:formula="of:=[.C4]/[.C14]" office:value-type="float" office:value="3.52238852744663">
            <text:p>3.52</text:p>
          </table:table-cell>
          <table:table-cell table:style-name="ce50" table:formula="of:=[.D4]/[.D14]" office:value-type="float" office:value="4.58732593032841">
            <text:p>4.59</text:p>
          </table:table-cell>
          <table:table-cell table:style-name="ce58" table:formula="of:=[.E14] - [.E4]" office:value-type="float" office:value="-0.380000000000003">
            <text:p>-0.38</text:p>
          </table:table-cell>
          <table:table-cell table:style-name="ce62" table:formula="of:=[.E14]/[.E4]" office:value-type="float" office:value="0.990015764582238">
            <text:p>0.9900</text:p>
          </table:table-cell>
          <table:table-cell table:style-name="ce45" table:formula="of:=[.F14]*[.I14]" office:value-type="float" office:value="3.48722017115578">
            <text:p>3.4872</text:p>
          </table:table-cell>
          <table:table-cell/>
          <table:table-cell table:style-name="ce45" table:formula="of:=[.E4]/[.E14]" office:value-type="float" office:value="1.01008492569002">
            <text:p>1.0101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1946.678">
            <text:p>1946.678</text:p>
          </table:table-cell>
          <table:table-cell table:style-name="ce23" office:value-type="float" office:value="1425.971">
            <text:p>1425.971</text:p>
          </table:table-cell>
          <table:table-cell table:style-name="ce29" office:value-type="float" office:value="37.77">
            <text:p>37.77</text:p>
          </table:table-cell>
          <table:table-cell table:style-name="ce91" table:formula="of:=[.C4]/[.C15]" office:value-type="float" office:value="3.17557038195326">
            <text:p>3.18</text:p>
          </table:table-cell>
          <table:table-cell table:style-name="ce53" table:formula="of:=[.D4]/[.D15]" office:value-type="float" office:value="3.97295597175539">
            <text:p>3.97</text:p>
          </table:table-cell>
          <table:table-cell table:style-name="ce94" table:formula="of:=[.E15] - [.E4]" office:value-type="float" office:value="-0.289999999999999">
            <text:p>-0.29</text:p>
          </table:table-cell>
          <table:table-cell table:style-name="ce63" table:formula="of:=[.E15]/[.E4]" office:value-type="float" office:value="0.992380451918024">
            <text:p>0.9924</text:p>
          </table:table-cell>
          <table:table-cell table:style-name="ce47" table:formula="of:=[.F15]*[.I15]" office:value-type="float" office:value="3.15137397074026">
            <text:p>3.1514</text:p>
          </table:table-cell>
          <table:table-cell/>
          <table:table-cell table:style-name="ce47" table:formula="of:=[.E4]/[.E15]" office:value-type="float" office:value="1.00767805136352">
            <text:p>1.0077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3248.739">
            <text:p>3248.739</text:p>
          </table:table-cell>
          <table:table-cell table:style-name="ce23" office:value-type="float" office:value="2728.811">
            <text:p>2728.811</text:p>
          </table:table-cell>
          <table:table-cell table:style-name="ce29" office:value-type="float" office:value="37.83">
            <text:p>37.83</text:p>
          </table:table-cell>
          <table:table-cell table:style-name="ce35" table:formula="of:=[.C4]/[.C16]" office:value-type="float" office:value="1.90283460752003">
            <text:p>1.90</text:p>
          </table:table-cell>
          <table:table-cell table:style-name="ce54" table:formula="of:=[.D4]/[.D16]" office:value-type="float" office:value="2.07611300306251">
            <text:p>2.08</text:p>
          </table:table-cell>
          <table:table-cell table:style-name="ce60" table:formula="of:=[.E16] - [.E4]" office:value-type="float" office:value="-0.230000000000004">
            <text:p>-0.23</text:p>
          </table:table-cell>
          <table:table-cell table:style-name="ce63" table:formula="of:=[.E16]/[.E4]" office:value-type="float" office:value="0.993956910141881">
            <text:p>0.9940</text:p>
          </table:table-cell>
          <table:table-cell table:style-name="ce47" table:formula="of:=[.F16]*[.I16]" office:value-type="float" office:value="1.89133560700164">
            <text:p>1.8913</text:p>
          </table:table-cell>
          <table:table-cell/>
          <table:table-cell table:style-name="ce63" table:formula="of:=[.E4]/[.E16]" office:value-type="float" office:value="1.0060798308221">
            <text:p>1.0061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3316.382">
            <text:p>3316.382</text:p>
          </table:table-cell>
          <table:table-cell table:style-name="ce23" office:value-type="float" office:value="2808.556">
            <text:p>2808.556</text:p>
          </table:table-cell>
          <table:table-cell table:style-name="ce29" office:value-type="float" office:value="36.17">
            <text:p>36.17</text:p>
          </table:table-cell>
          <table:table-cell table:style-name="ce53" table:formula="of:=[.C4]/[.C17]" office:value-type="float" office:value="1.86402320359959">
            <text:p>1.86</text:p>
          </table:table-cell>
          <table:table-cell table:style-name="ce54" table:formula="of:=[.D4]/[.D17]" office:value-type="float" office:value="2.01716469246118">
            <text:p>2.02</text:p>
          </table:table-cell>
          <table:table-cell table:style-name="ce60" table:formula="of:=[.E17] - [.E4]" office:value-type="float" office:value="-1.89">
            <text:p>-1.89</text:p>
          </table:table-cell>
          <table:table-cell table:style-name="ce63" table:formula="of:=[.E17]/[.E4]" office:value-type="float" office:value="0.950341565948502">
            <text:p>0.9503</text:p>
          </table:table-cell>
          <table:table-cell table:style-name="ce47" table:formula="of:=[.F17]*[.I17]" office:value-type="float" office:value="1.77145873027317">
            <text:p>1.7715</text:p>
          </table:table-cell>
          <table:table-cell/>
          <table:table-cell table:style-name="ce63" table:formula="of:=[.E4]/[.E17]" office:value-type="float" office:value="1.05225324854852">
            <text:p>1.0523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5315.748">
            <text:p>5315.748</text:p>
          </table:table-cell>
          <table:table-cell table:style-name="ce23" office:value-type="float" office:value="4818.357">
            <text:p>4818.357</text:p>
          </table:table-cell>
          <table:table-cell table:style-name="ce29" office:value-type="float" office:value="34.96">
            <text:p>34.96</text:p>
          </table:table-cell>
          <table:table-cell table:style-name="ce53" table:formula="of:=[.C4]/[.C18]" office:value-type="float" office:value="1.16292438994475">
            <text:p>1.16</text:p>
          </table:table-cell>
          <table:table-cell table:style-name="ce54" table:formula="of:=[.D4]/[.D18]" office:value-type="float" office:value="1.17577838254824">
            <text:p>1.18</text:p>
          </table:table-cell>
          <table:table-cell table:style-name="ce60" table:formula="of:=[.E18] - [.E4]" office:value-type="float" office:value="-3.1">
            <text:p>-3.1</text:p>
          </table:table-cell>
          <table:table-cell table:style-name="ce63" table:formula="of:=[.E18]/[.E4]" office:value-type="float" office:value="0.918549658434051">
            <text:p>0.9185</text:p>
          </table:table-cell>
          <table:table-cell table:style-name="ce47" table:formula="of:=[.F18]*[.I18]" office:value-type="float" office:value="1.06820380116837">
            <text:p>1.0682</text:p>
          </table:table-cell>
          <table:table-cell/>
          <table:table-cell table:style-name="ce63" table:formula="of:=[.E4]/[.E18]" office:value-type="float" office:value="1.08867276887872">
            <text:p>1.0887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4824.086">
            <text:p>4824.086</text:p>
          </table:table-cell>
          <table:table-cell table:style-name="ce23" office:value-type="float" office:value="4329.366">
            <text:p>4329.366</text:p>
          </table:table-cell>
          <table:table-cell table:style-name="ce29" office:value-type="float" office:value="34.49">
            <text:p>34.49</text:p>
          </table:table-cell>
          <table:table-cell table:style-name="ce53" table:formula="of:=[.C4]/[.C19]" office:value-type="float" office:value="1.28144751150788">
            <text:p>1.28</text:p>
          </table:table-cell>
          <table:table-cell table:style-name="ce54" table:formula="of:=[.D4]/[.D19]" office:value-type="float" office:value="1.30857959340929">
            <text:p>1.31</text:p>
          </table:table-cell>
          <table:table-cell table:style-name="ce60" table:formula="of:=[.E19] - [.E4]" office:value-type="float" office:value="-3.57">
            <text:p>-3.57</text:p>
          </table:table-cell>
          <table:table-cell table:style-name="ce63" table:formula="of:=[.E19]/[.E4]" office:value-type="float" office:value="0.906200735680504">
            <text:p>0.9062</text:p>
          </table:table-cell>
          <table:table-cell table:style-name="ce47" table:formula="of:=[.F19]*[.I19]" office:value-type="float" office:value="1.16124867766439">
            <text:p>1.1612</text:p>
          </table:table-cell>
          <table:table-cell/>
          <table:table-cell table:style-name="ce63" table:formula="of:=[.E4]/[.E19]" office:value-type="float" office:value="1.10350826326471">
            <text:p>1.1035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2935.188">
            <text:p>2935.188</text:p>
          </table:table-cell>
          <table:table-cell table:style-name="ce23" office:value-type="float" office:value="2438.859">
            <text:p>2438.859</text:p>
          </table:table-cell>
          <table:table-cell table:style-name="ce29" office:value-type="float" office:value="36.12">
            <text:p>36.12</text:p>
          </table:table-cell>
          <table:table-cell table:style-name="ce53" table:formula="of:=[.C4]/[.C20]" office:value-type="float" office:value="2.10610461748958">
            <text:p>2.11</text:p>
          </table:table-cell>
          <table:table-cell table:style-name="ce54" table:formula="of:=[.D4]/[.D20]" office:value-type="float" office:value="2.3229387184745">
            <text:p>2.32</text:p>
          </table:table-cell>
          <table:table-cell table:style-name="ce60" table:formula="of:=[.E20] - [.E4]" office:value-type="float" office:value="-1.94">
            <text:p>-1.94</text:p>
          </table:table-cell>
          <table:table-cell table:style-name="ce63" table:formula="of:=[.E20]/[.E4]" office:value-type="float" office:value="0.949027850761955">
            <text:p>0.9490</text:p>
          </table:table-cell>
          <table:table-cell table:style-name="ce47" table:formula="of:=[.F20]*[.I20]" office:value-type="float" office:value="1.99875193861596">
            <text:p>1.9988</text:p>
          </table:table-cell>
          <table:table-cell/>
          <table:table-cell table:style-name="ce63" table:formula="of:=[.E4]/[.E20]" office:value-type="float" office:value="1.05370985603544">
            <text:p>1.0537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4279.417">
            <text:p>4279.417</text:p>
          </table:table-cell>
          <table:table-cell table:style-name="ce23" office:value-type="float" office:value="3783.644">
            <text:p>3783.644</text:p>
          </table:table-cell>
          <table:table-cell table:style-name="ce29" office:value-type="float" office:value="34.05">
            <text:p>34.05</text:p>
          </table:table-cell>
          <table:table-cell table:style-name="ce53" table:formula="of:=[.C4]/[.C21]" office:value-type="float" office:value="1.44454560048717">
            <text:p>1.44</text:p>
          </table:table-cell>
          <table:table-cell table:style-name="ce54" table:formula="of:=[.D4]/[.D21]" office:value-type="float" office:value="1.49731845807904">
            <text:p>1.50</text:p>
          </table:table-cell>
          <table:table-cell table:style-name="ce60" table:formula="of:=[.E21] - [.E4]" office:value-type="float" office:value="-4.01000000000001">
            <text:p>-4.01</text:p>
          </table:table-cell>
          <table:table-cell table:style-name="ce63" table:formula="of:=[.E21]/[.E4]" office:value-type="float" office:value="0.894640042038886">
            <text:p>0.8946</text:p>
          </table:table-cell>
          <table:table-cell table:style-name="ce47" table:formula="of:=[.F21]*[.I21]" office:value-type="float" office:value="1.29234833674693">
            <text:p>1.2923</text:p>
          </table:table-cell>
          <table:table-cell/>
          <table:table-cell table:style-name="ce63" table:formula="of:=[.E4]/[.E21]" office:value-type="float" office:value="1.11776798825257">
            <text:p>1.1178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2677.253">
            <text:p>2677.253</text:p>
          </table:table-cell>
          <table:table-cell table:style-name="ce23" office:value-type="float" office:value="2182.516">
            <text:p>2182.516</text:p>
          </table:table-cell>
          <table:table-cell table:style-name="ce29" office:value-type="float" office:value="35.91">
            <text:p>35.91</text:p>
          </table:table-cell>
          <table:table-cell table:style-name="ce53" table:formula="of:=[.C4]/[.C22]" office:value-type="float" office:value="2.30901338050606">
            <text:p>2.31</text:p>
          </table:table-cell>
          <table:table-cell table:style-name="ce54" table:formula="of:=[.D4]/[.D22]" office:value-type="float" office:value="2.59577478469803">
            <text:p>2.60</text:p>
          </table:table-cell>
          <table:table-cell table:style-name="ce60" table:formula="of:=[.E22] - [.E4]" office:value-type="float" office:value="-2.15000000000001">
            <text:p>-2.15</text:p>
          </table:table-cell>
          <table:table-cell table:style-name="ce47" table:formula="of:=[.E22]/[.E4]" office:value-type="float" office:value="0.943510246978455">
            <text:p>0.9435</text:p>
          </table:table-cell>
          <table:table-cell table:style-name="ce47" table:formula="of:=[.F22]*[.I22]" office:value-type="float" office:value="2.17857778491783">
            <text:p>2.1786</text:p>
          </table:table-cell>
          <table:table-cell/>
          <table:table-cell table:style-name="ce63" table:formula="of:=[.E4]/[.E22]" office:value-type="float" office:value="1.05987190197717">
            <text:p>1.0599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-sunflower_1080p-i420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41c6b2818ef8f64ef79afc67f87ea604 <text:s/>sunflower_1080p.cfg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8953.333">
            <text:p>8953.333</text:p>
          </table:table-cell>
          <table:table-cell table:style-name="ce20" office:value-type="float" office:value="6826.895">
            <text:p>6826.895</text:p>
          </table:table-cell>
          <table:table-cell table:style-name="ce26" office:value-type="float" office:value="46.3">
            <text:p>46.30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  <table:table-cell/>
          <table:table-cell table:style-name="ce38" table:formula="of:=[.E4]/[.E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7116.036">
            <text:p>7116.036</text:p>
          </table:table-cell>
          <table:table-cell table:style-name="ce21" office:value-type="float" office:value="5092.389">
            <text:p>5092.389</text:p>
          </table:table-cell>
          <table:table-cell table:style-name="ce27" office:value-type="float" office:value="46.16">
            <text:p>46.16</text:p>
          </table:table-cell>
          <table:table-cell table:style-name="ce33" table:formula="of:=[.C4]/[.C5]" office:value-type="float" office:value="1.25819107716712">
            <text:p>1.26</text:p>
          </table:table-cell>
          <table:table-cell table:style-name="ce33" table:formula="of:=[.D4]/[.D5]" office:value-type="float" office:value="1.340607522324">
            <text:p>1.34</text:p>
          </table:table-cell>
          <table:table-cell table:style-name="ce14" table:formula="of:=[.E5] - [.E4]" office:value-type="float" office:value="-0.140000000000001">
            <text:p>-0.14</text:p>
          </table:table-cell>
          <table:table-cell table:style-name="ce39" table:formula="of:=[.E5]/[.E4]" office:value-type="float" office:value="0.996976241900648">
            <text:p>0.9970</text:p>
          </table:table-cell>
          <table:table-cell table:style-name="ce43" table:formula="of:=[.F5]*[.I5]" office:value-type="float" office:value="1.254386611707">
            <text:p>1.2544</text:p>
          </table:table-cell>
          <table:table-cell/>
          <table:table-cell table:style-name="ce39" table:formula="of:=[.E4]/[.E5]" office:value-type="float" office:value="1.00303292894281">
            <text:p>1.0030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4504.824">
            <text:p>4504.824</text:p>
          </table:table-cell>
          <table:table-cell table:style-name="ce21" office:value-type="float" office:value="2784.746">
            <text:p>2784.746</text:p>
          </table:table-cell>
          <table:table-cell table:style-name="ce27" office:value-type="float" office:value="46.13">
            <text:p>46.13</text:p>
          </table:table-cell>
          <table:table-cell table:style-name="ce89" table:formula="of:=[.C4]/[.C6]" office:value-type="float" office:value="1.987498956674">
            <text:p>1.99</text:p>
          </table:table-cell>
          <table:table-cell table:style-name="ce33" table:formula="of:=[.D4]/[.D6]" office:value-type="float" office:value="2.45153238392299">
            <text:p>2.45</text:p>
          </table:table-cell>
          <table:table-cell table:style-name="ce55" table:formula="of:=[.E6] - [.E4]" office:value-type="float" office:value="-0.169999999999995">
            <text:p>-0.17</text:p>
          </table:table-cell>
          <table:table-cell table:style-name="ce39" table:formula="of:=[.E6]/[.E4]" office:value-type="float" office:value="0.996328293736501">
            <text:p>0.9963</text:p>
          </table:table-cell>
          <table:table-cell table:style-name="ce43" table:formula="of:=[.F6]*[.I6]" office:value-type="float" office:value="1.98020144430608">
            <text:p>1.9802</text:p>
          </table:table-cell>
          <table:table-cell/>
          <table:table-cell table:style-name="ce61" table:formula="of:=[.E4]/[.E6]" office:value-type="float" office:value="1.00368523737264">
            <text:p>1.0037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3172.76">
            <text:p>3172.760</text:p>
          </table:table-cell>
          <table:table-cell table:style-name="ce21" office:value-type="float" office:value="1679.036">
            <text:p>1679.036</text:p>
          </table:table-cell>
          <table:table-cell table:style-name="ce27" office:value-type="float" office:value="46.14">
            <text:p>46.14</text:p>
          </table:table-cell>
          <table:table-cell table:style-name="ce33" table:formula="of:=[.C4]/[.C7]" office:value-type="float" office:value="2.82193831238417">
            <text:p>2.82</text:p>
          </table:table-cell>
          <table:table-cell table:style-name="ce33" table:formula="of:=[.D4]/[.D7]" office:value-type="float" office:value="4.06596106337208">
            <text:p>4.07</text:p>
          </table:table-cell>
          <table:table-cell table:style-name="ce56" table:formula="of:=[.E7] - [.E4]" office:value-type="float" office:value="-0.159999999999997">
            <text:p>-0.16</text:p>
          </table:table-cell>
          <table:table-cell table:style-name="ce43" table:formula="of:=[.E7]/[.E4]" office:value-type="float" office:value="0.996544276457883">
            <text:p>0.9965</text:p>
          </table:table-cell>
          <table:table-cell table:style-name="ce43" table:formula="of:=[.F7]*[.I7]" office:value-type="float" office:value="2.81218647372366">
            <text:p>2.8122</text:p>
          </table:table-cell>
          <table:table-cell/>
          <table:table-cell table:style-name="ce61" table:formula="of:=[.E4]/[.E7]" office:value-type="float" office:value="1.00346770697876">
            <text:p>1.0035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2675.077">
            <text:p>2675.077</text:p>
          </table:table-cell>
          <table:table-cell table:style-name="ce21" office:value-type="float" office:value="1413.09">
            <text:p>1413.090</text:p>
          </table:table-cell>
          <table:table-cell table:style-name="ce27" office:value-type="float" office:value="45.92">
            <text:p>45.92</text:p>
          </table:table-cell>
          <table:table-cell table:style-name="ce33" table:formula="of:=[.C4]/[.C8]" office:value-type="float" office:value="3.34694403189142">
            <text:p>3.35</text:p>
          </table:table-cell>
          <table:table-cell table:style-name="ce33" table:formula="of:=[.D4]/[.D8]" office:value-type="float" office:value="4.83118201954582">
            <text:p>4.83</text:p>
          </table:table-cell>
          <table:table-cell table:style-name="ce56" table:formula="of:=[.E8] - [.E4]" office:value-type="float" office:value="-0.379999999999995">
            <text:p>-0.38</text:p>
          </table:table-cell>
          <table:table-cell table:style-name="ce61" table:formula="of:=[.E8]/[.E4]" office:value-type="float" office:value="0.991792656587473">
            <text:p>0.9918</text:p>
          </table:table-cell>
          <table:table-cell table:style-name="ce43" table:formula="of:=[.F8]*[.I8]" office:value-type="float" office:value="3.31947451283918">
            <text:p>3.3195</text:p>
          </table:table-cell>
          <table:table-cell/>
          <table:table-cell table:style-name="ce61" table:formula="of:=[.E4]/[.E8]" office:value-type="float" office:value="1.00827526132404">
            <text:p>1.0083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2487.56">
            <text:p>2487.560</text:p>
          </table:table-cell>
          <table:table-cell table:style-name="ce21" office:value-type="float" office:value="1323.275">
            <text:p>1323.275</text:p>
          </table:table-cell>
          <table:table-cell table:style-name="ce27" office:value-type="float" office:value="45.31">
            <text:p>45.31</text:p>
          </table:table-cell>
          <table:table-cell table:style-name="ce33" table:formula="of:=[.C4]/[.C9]" office:value-type="float" office:value="3.59924303333387">
            <text:p>3.60</text:p>
          </table:table-cell>
          <table:table-cell table:style-name="ce33" table:formula="of:=[.D4]/[.D9]" office:value-type="float" office:value="5.15909013621507">
            <text:p>5.16</text:p>
          </table:table-cell>
          <table:table-cell table:style-name="ce56" table:formula="of:=[.E9] - [.E4]" office:value-type="float" office:value="-0.989999999999995">
            <text:p>-0.99</text:p>
          </table:table-cell>
          <table:table-cell table:style-name="ce61" table:formula="of:=[.E9]/[.E4]" office:value-type="float" office:value="0.978617710583153">
            <text:p>0.9786</text:p>
          </table:table-cell>
          <table:table-cell table:style-name="ce43" table:formula="of:=[.F9]*[.I9]" office:value-type="float" office:value="3.52228297711356">
            <text:p>3.5223</text:p>
          </table:table-cell>
          <table:table-cell/>
          <table:table-cell table:style-name="ce61" table:formula="of:=[.E4]/[.E9]" office:value-type="float" office:value="1.0218494813507">
            <text:p>1.0218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2360.502">
            <text:p>2360.502</text:p>
          </table:table-cell>
          <table:table-cell table:style-name="ce21" office:value-type="float" office:value="1314.494">
            <text:p>1314.494</text:p>
          </table:table-cell>
          <table:table-cell table:style-name="ce27" office:value-type="float" office:value="44">
            <text:p>44.00</text:p>
          </table:table-cell>
          <table:table-cell table:style-name="ce49" table:formula="of:=[.C4]/[.C10]" office:value-type="float" office:value="3.79297835799334">
            <text:p>3.79</text:p>
          </table:table-cell>
          <table:table-cell table:style-name="ce49" table:formula="of:=[.D4]/[.D10]" office:value-type="float" office:value="5.19355356509805">
            <text:p>5.19</text:p>
          </table:table-cell>
          <table:table-cell table:style-name="ce56" table:formula="of:=[.E10] - [.E4]" office:value-type="float" office:value="-2.3">
            <text:p>-2.3</text:p>
          </table:table-cell>
          <table:table-cell table:style-name="ce61" table:formula="of:=[.E10]/[.E4]" office:value-type="float" office:value="0.950323974082073">
            <text:p>0.9503</text:p>
          </table:table-cell>
          <table:table-cell table:style-name="ce43" table:formula="of:=[.F10]*[.I10]" office:value-type="float" office:value="3.60455826677553">
            <text:p>3.6046</text:p>
          </table:table-cell>
          <table:table-cell/>
          <table:table-cell table:style-name="ce61" table:formula="of:=[.E4]/[.E10]" office:value-type="float" office:value="1.05227272727273">
            <text:p>1.0523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2232.461">
            <text:p>2232.461</text:p>
          </table:table-cell>
          <table:table-cell table:style-name="ce21" office:value-type="float" office:value="1328.904">
            <text:p>1328.904</text:p>
          </table:table-cell>
          <table:table-cell table:style-name="ce27" office:value-type="float" office:value="40.94">
            <text:p>40.94</text:p>
          </table:table-cell>
          <table:table-cell table:style-name="ce49" table:formula="of:=[.C4]/[.C11]" office:value-type="float" office:value="4.01052157238133">
            <text:p>4.01</text:p>
          </table:table-cell>
          <table:table-cell table:style-name="ce49" table:formula="of:=[.D4]/[.D11]" office:value-type="float" office:value="5.13723715181834">
            <text:p>5.14</text:p>
          </table:table-cell>
          <table:table-cell table:style-name="ce56" table:formula="of:=[.E11] - [.E4]" office:value-type="float" office:value="-5.36">
            <text:p>-5.36</text:p>
          </table:table-cell>
          <table:table-cell table:style-name="ce61" table:formula="of:=[.E11]/[.E4]" office:value-type="float" office:value="0.884233261339093">
            <text:p>0.8842</text:p>
          </table:table-cell>
          <table:table-cell table:style-name="ce43" table:formula="of:=[.F11]*[.I11]" office:value-type="float" office:value="3.54623656961753">
            <text:p>3.5462</text:p>
          </table:table-cell>
          <table:table-cell/>
          <table:table-cell table:style-name="ce61" table:formula="of:=[.E4]/[.E11]" office:value-type="float" office:value="1.13092330239375">
            <text:p>1.1309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5713.138">
            <text:p>5713.138</text:p>
          </table:table-cell>
          <table:table-cell table:style-name="ce22" office:value-type="float" office:value="3906.626">
            <text:p>3906.626</text:p>
          </table:table-cell>
          <table:table-cell table:style-name="ce28" office:value-type="float" office:value="46.16">
            <text:p>46.16</text:p>
          </table:table-cell>
          <table:table-cell table:style-name="ce50" table:formula="of:=[.C4]/[.C12]" office:value-type="float" office:value="1.56714803668317">
            <text:p>1.57</text:p>
          </table:table-cell>
          <table:table-cell table:style-name="ce50" table:formula="of:=[.D4]/[.D12]" office:value-type="float" office:value="1.74751691101221">
            <text:p>1.75</text:p>
          </table:table-cell>
          <table:table-cell table:style-name="ce15" table:formula="of:=[.E12] - [.E4]" office:value-type="float" office:value="-0.140000000000001">
            <text:p>-0.14</text:p>
          </table:table-cell>
          <table:table-cell table:style-name="ce62" table:formula="of:=[.E12]/[.E4]" office:value-type="float" office:value="0.996976241900648">
            <text:p>0.9970</text:p>
          </table:table-cell>
          <table:table-cell table:style-name="ce45" table:formula="of:=[.F12]*[.I12]" office:value-type="float" office:value="1.56240936011436">
            <text:p>1.5624</text:p>
          </table:table-cell>
          <table:table-cell/>
          <table:table-cell table:style-name="ce62" table:formula="of:=[.E4]/[.E12]" office:value-type="float" office:value="1.00303292894281">
            <text:p>1.0030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4134.716">
            <text:p>4134.716</text:p>
          </table:table-cell>
          <table:table-cell table:style-name="ce22" office:value-type="float" office:value="2469.765">
            <text:p>2469.765</text:p>
          </table:table-cell>
          <table:table-cell table:style-name="ce28" office:value-type="float" office:value="46.17">
            <text:p>46.17</text:p>
          </table:table-cell>
          <table:table-cell table:style-name="ce90" table:formula="of:=[.C4]/[.C13]" office:value-type="float" office:value="2.16540458885205">
            <text:p>2.17</text:p>
          </table:table-cell>
          <table:table-cell table:style-name="ce50" table:formula="of:=[.D4]/[.D13]" office:value-type="float" office:value="2.76418809076977">
            <text:p>2.76</text:p>
          </table:table-cell>
          <table:table-cell table:style-name="ce57" table:formula="of:=[.E13] - [.E4]" office:value-type="float" office:value="-0.129999999999995">
            <text:p>-0.13</text:p>
          </table:table-cell>
          <table:table-cell table:style-name="ce62" table:formula="of:=[.E13]/[.E4]" office:value-type="float" office:value="0.99719222462203">
            <text:p>0.9972</text:p>
          </table:table-cell>
          <table:table-cell table:style-name="ce45" table:formula="of:=[.F13]*[.I13]" office:value-type="float" office:value="2.15932461916413">
            <text:p>2.1593</text:p>
          </table:table-cell>
          <table:table-cell/>
          <table:table-cell table:style-name="ce62" table:formula="of:=[.E4]/[.E13]" office:value-type="float" office:value="1.00281568117825">
            <text:p>1.0028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3362.692">
            <text:p>3362.692</text:p>
          </table:table-cell>
          <table:table-cell table:style-name="ce22" office:value-type="float" office:value="1780.542">
            <text:p>1780.542</text:p>
          </table:table-cell>
          <table:table-cell table:style-name="ce28" office:value-type="float" office:value="46.11">
            <text:p>46.11</text:p>
          </table:table-cell>
          <table:table-cell table:style-name="ce50" table:formula="of:=[.C4]/[.C14]" office:value-type="float" office:value="2.66254923138961">
            <text:p>2.66</text:p>
          </table:table-cell>
          <table:table-cell table:style-name="ce50" table:formula="of:=[.D4]/[.D14]" office:value-type="float" office:value="3.83416678741642">
            <text:p>3.83</text:p>
          </table:table-cell>
          <table:table-cell table:style-name="ce58" table:formula="of:=[.E14] - [.E4]" office:value-type="float" office:value="-0.189999999999998">
            <text:p>-0.19</text:p>
          </table:table-cell>
          <table:table-cell table:style-name="ce62" table:formula="of:=[.E14]/[.E4]" office:value-type="float" office:value="0.995896328293737">
            <text:p>0.9959</text:p>
          </table:table-cell>
          <table:table-cell table:style-name="ce45" table:formula="of:=[.F14]*[.I14]" office:value-type="float" office:value="2.65162300344223">
            <text:p>2.6516</text:p>
          </table:table-cell>
          <table:table-cell/>
          <table:table-cell table:style-name="ce45" table:formula="of:=[.E4]/[.E14]" office:value-type="float" office:value="1.00412058121882">
            <text:p>1.0041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3176.609">
            <text:p>3176.609</text:p>
          </table:table-cell>
          <table:table-cell table:style-name="ce23" office:value-type="float" office:value="1595.277">
            <text:p>1595.277</text:p>
          </table:table-cell>
          <table:table-cell table:style-name="ce29" office:value-type="float" office:value="46.17">
            <text:p>46.17</text:p>
          </table:table-cell>
          <table:table-cell table:style-name="ce91" table:formula="of:=[.C4]/[.C15]" office:value-type="float" office:value="2.81851905601224">
            <text:p>2.82</text:p>
          </table:table-cell>
          <table:table-cell table:style-name="ce53" table:formula="of:=[.D4]/[.D15]" office:value-type="float" office:value="4.27944175212205">
            <text:p>4.28</text:p>
          </table:table-cell>
          <table:table-cell table:style-name="ce59" table:formula="of:=[.E15] - [.E4]" office:value-type="float" office:value="-0.129999999999995">
            <text:p>-0.13</text:p>
          </table:table-cell>
          <table:table-cell table:style-name="ce63" table:formula="of:=[.E15]/[.E4]" office:value-type="float" office:value="0.99719222462203">
            <text:p>0.9972</text:p>
          </table:table-cell>
          <table:table-cell table:style-name="ce47" table:formula="of:=[.F15]*[.I15]" office:value-type="float" office:value="2.81060528760444">
            <text:p>2.8106</text:p>
          </table:table-cell>
          <table:table-cell/>
          <table:table-cell table:style-name="ce47" table:formula="of:=[.E4]/[.E15]" office:value-type="float" office:value="1.00281568117825">
            <text:p>1.0028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4752.516">
            <text:p>4752.516</text:p>
          </table:table-cell>
          <table:table-cell table:style-name="ce23" office:value-type="float" office:value="2984.697">
            <text:p>2984.697</text:p>
          </table:table-cell>
          <table:table-cell table:style-name="ce29" office:value-type="float" office:value="46.15">
            <text:p>46.15</text:p>
          </table:table-cell>
          <table:table-cell table:style-name="ce35" table:formula="of:=[.C4]/[.C16]" office:value-type="float" office:value="1.88391433085128">
            <text:p>1.88</text:p>
          </table:table-cell>
          <table:table-cell table:style-name="ce54" table:formula="of:=[.D4]/[.D16]" office:value-type="float" office:value="2.28729917978274">
            <text:p>2.29</text:p>
          </table:table-cell>
          <table:table-cell table:style-name="ce60" table:formula="of:=[.E16] - [.E4]" office:value-type="float" office:value="-0.149999999999999">
            <text:p>-0.15</text:p>
          </table:table-cell>
          <table:table-cell table:style-name="ce63" table:formula="of:=[.E16]/[.E4]" office:value-type="float" office:value="0.996760259179266">
            <text:p>0.9968</text:p>
          </table:table-cell>
          <table:table-cell table:style-name="ce47" table:formula="of:=[.F16]*[.I16]" office:value-type="float" office:value="1.87781093669085">
            <text:p>1.8778</text:p>
          </table:table-cell>
          <table:table-cell/>
          <table:table-cell table:style-name="ce63" table:formula="of:=[.E4]/[.E16]" office:value-type="float" office:value="1.0032502708559">
            <text:p>1.0033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5578.793">
            <text:p>5578.793</text:p>
          </table:table-cell>
          <table:table-cell table:style-name="ce23" office:value-type="float" office:value="4441.193">
            <text:p>4441.193</text:p>
          </table:table-cell>
          <table:table-cell table:style-name="ce29" office:value-type="float" office:value="44.72">
            <text:p>44.72</text:p>
          </table:table-cell>
          <table:table-cell table:style-name="ce53" table:formula="of:=[.C4]/[.C17]" office:value-type="float" office:value="1.60488711447082">
            <text:p>1.60</text:p>
          </table:table-cell>
          <table:table-cell table:style-name="ce54" table:formula="of:=[.D4]/[.D17]" office:value-type="float" office:value="1.53717593448427">
            <text:p>1.54</text:p>
          </table:table-cell>
          <table:table-cell table:style-name="ce60" table:formula="of:=[.E17] - [.E4]" office:value-type="float" office:value="-1.58">
            <text:p>-1.58</text:p>
          </table:table-cell>
          <table:table-cell table:style-name="ce63" table:formula="of:=[.E17]/[.E4]" office:value-type="float" office:value="0.965874730021598">
            <text:p>0.9659</text:p>
          </table:table-cell>
          <table:table-cell table:style-name="ce47" table:formula="of:=[.F17]*[.I17]" office:value-type="float" office:value="1.55011990840464">
            <text:p>1.5501</text:p>
          </table:table-cell>
          <table:table-cell/>
          <table:table-cell table:style-name="ce63" table:formula="of:=[.E4]/[.E17]" office:value-type="float" office:value="1.03533094812165">
            <text:p>1.0353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8319.381">
            <text:p>8319.381</text:p>
          </table:table-cell>
          <table:table-cell table:style-name="ce23" office:value-type="float" office:value="7366.471">
            <text:p>7366.471</text:p>
          </table:table-cell>
          <table:table-cell table:style-name="ce29" office:value-type="float" office:value="43.5">
            <text:p>43.50</text:p>
          </table:table-cell>
          <table:table-cell table:style-name="ce53" table:formula="of:=[.C4]/[.C18]" office:value-type="float" office:value="1.07620182318853">
            <text:p>1.08</text:p>
          </table:table-cell>
          <table:table-cell table:style-name="ce54" table:formula="of:=[.D4]/[.D18]" office:value-type="float" office:value="0.926752443605629">
            <text:p>0.93</text:p>
          </table:table-cell>
          <table:table-cell table:style-name="ce60" table:formula="of:=[.E18] - [.E4]" office:value-type="float" office:value="-2.8">
            <text:p>-2.8</text:p>
          </table:table-cell>
          <table:table-cell table:style-name="ce63" table:formula="of:=[.E18]/[.E4]" office:value-type="float" office:value="0.939524838012959">
            <text:p>0.9395</text:p>
          </table:table-cell>
          <table:table-cell table:style-name="ce47" table:formula="of:=[.F18]*[.I18]" office:value-type="float" office:value="1.01111834360045">
            <text:p>1.0111</text:p>
          </table:table-cell>
          <table:table-cell/>
          <table:table-cell table:style-name="ce63" table:formula="of:=[.E4]/[.E18]" office:value-type="float" office:value="1.06436781609195">
            <text:p>1.0644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7196.296">
            <text:p>7196.296</text:p>
          </table:table-cell>
          <table:table-cell table:style-name="ce23" office:value-type="float" office:value="6269.104">
            <text:p>6269.104</text:p>
          </table:table-cell>
          <table:table-cell table:style-name="ce29" office:value-type="float" office:value="42.66">
            <text:p>42.66</text:p>
          </table:table-cell>
          <table:table-cell table:style-name="ce53" table:formula="of:=[.C4]/[.C19]" office:value-type="float" office:value="1.24415852266221">
            <text:p>1.24</text:p>
          </table:table-cell>
          <table:table-cell table:style-name="ce54" table:formula="of:=[.D4]/[.D19]" office:value-type="float" office:value="1.08897459668878">
            <text:p>1.09</text:p>
          </table:table-cell>
          <table:table-cell table:style-name="ce60" table:formula="of:=[.E19] - [.E4]" office:value-type="float" office:value="-3.64">
            <text:p>-3.64</text:p>
          </table:table-cell>
          <table:table-cell table:style-name="ce63" table:formula="of:=[.E19]/[.E4]" office:value-type="float" office:value="0.921382289416847">
            <text:p>0.9214</text:p>
          </table:table-cell>
          <table:table-cell table:style-name="ce47" table:formula="of:=[.F19]*[.I19]" office:value-type="float" office:value="1.14634562800799">
            <text:p>1.1463</text:p>
          </table:table-cell>
          <table:table-cell/>
          <table:table-cell table:style-name="ce63" table:formula="of:=[.E4]/[.E19]" office:value-type="float" office:value="1.08532583216128">
            <text:p>1.0853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4505.69">
            <text:p>4505.690</text:p>
          </table:table-cell>
          <table:table-cell table:style-name="ce23" office:value-type="float" office:value="3513.026">
            <text:p>3513.026</text:p>
          </table:table-cell>
          <table:table-cell table:style-name="ce29" office:value-type="float" office:value="44.27">
            <text:p>44.27</text:p>
          </table:table-cell>
          <table:table-cell table:style-name="ce53" table:formula="of:=[.C4]/[.C20]" office:value-type="float" office:value="1.98711695655937">
            <text:p>1.99</text:p>
          </table:table-cell>
          <table:table-cell table:style-name="ce54" table:formula="of:=[.D4]/[.D20]" office:value-type="float" office:value="1.94330898775016">
            <text:p>1.94</text:p>
          </table:table-cell>
          <table:table-cell table:style-name="ce60" table:formula="of:=[.E20] - [.E4]" office:value-type="float" office:value="-2.02999999999999">
            <text:p>-2.03</text:p>
          </table:table-cell>
          <table:table-cell table:style-name="ce63" table:formula="of:=[.E20]/[.E4]" office:value-type="float" office:value="0.956155507559395">
            <text:p>0.9562</text:p>
          </table:table-cell>
          <table:table-cell table:style-name="ce47" table:formula="of:=[.F20]*[.I20]" office:value-type="float" office:value="1.89999282217891">
            <text:p>1.9000</text:p>
          </table:table-cell>
          <table:table-cell/>
          <table:table-cell table:style-name="ce63" table:formula="of:=[.E4]/[.E20]" office:value-type="float" office:value="1.04585498079964">
            <text:p>1.0459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6058.214">
            <text:p>6058.214</text:p>
          </table:table-cell>
          <table:table-cell table:style-name="ce23" office:value-type="float" office:value="5139.805">
            <text:p>5139.805</text:p>
          </table:table-cell>
          <table:table-cell table:style-name="ce29" office:value-type="float" office:value="42.19">
            <text:p>42.19</text:p>
          </table:table-cell>
          <table:table-cell table:style-name="ce53" table:formula="of:=[.C4]/[.C21]" office:value-type="float" office:value="1.47788325074023">
            <text:p>1.48</text:p>
          </table:table-cell>
          <table:table-cell table:style-name="ce54" table:formula="of:=[.D4]/[.D21]" office:value-type="float" office:value="1.32824007914697">
            <text:p>1.33</text:p>
          </table:table-cell>
          <table:table-cell table:style-name="ce60" table:formula="of:=[.E21] - [.E4]" office:value-type="float" office:value="-4.11">
            <text:p>-4.11</text:p>
          </table:table-cell>
          <table:table-cell table:style-name="ce63" table:formula="of:=[.E21]/[.E4]" office:value-type="float" office:value="0.911231101511879">
            <text:p>0.9112</text:p>
          </table:table-cell>
          <table:table-cell table:style-name="ce47" table:formula="of:=[.F21]*[.I21]" office:value-type="float" office:value="1.34669318247798">
            <text:p>1.3467</text:p>
          </table:table-cell>
          <table:table-cell/>
          <table:table-cell table:style-name="ce63" table:formula="of:=[.E4]/[.E21]" office:value-type="float" office:value="1.09741644939559">
            <text:p>1.0974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3861.86">
            <text:p>3861.860</text:p>
          </table:table-cell>
          <table:table-cell table:style-name="ce23" office:value-type="float" office:value="2896.544">
            <text:p>2896.544</text:p>
          </table:table-cell>
          <table:table-cell table:style-name="ce29" office:value-type="float" office:value="43.74">
            <text:p>43.74</text:p>
          </table:table-cell>
          <table:table-cell table:style-name="ce53" table:formula="of:=[.C4]/[.C22]" office:value-type="float" office:value="2.31839916516912">
            <text:p>2.32</text:p>
          </table:table-cell>
          <table:table-cell table:style-name="ce54" table:formula="of:=[.D4]/[.D22]" office:value-type="float" office:value="2.35691051128517">
            <text:p>2.36</text:p>
          </table:table-cell>
          <table:table-cell table:style-name="ce60" table:formula="of:=[.E22] - [.E4]" office:value-type="float" office:value="-2.56">
            <text:p>-2.56</text:p>
          </table:table-cell>
          <table:table-cell table:style-name="ce47" table:formula="of:=[.E22]/[.E4]" office:value-type="float" office:value="0.944708423326134">
            <text:p>0.9447</text:p>
          </table:table-cell>
          <table:table-cell table:style-name="ce47" table:formula="of:=[.F22]*[.I22]" office:value-type="float" office:value="2.19021121996754">
            <text:p>2.1902</text:p>
          </table:table-cell>
          <table:table-cell/>
          <table:table-cell table:style-name="ce63" table:formula="of:=[.E4]/[.E22]" office:value-type="float" office:value="1.05852766346593">
            <text:p>1.0585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-crowd_run_1080p-i420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3"/>
        <table:table-column table:style-name="co21" table:default-cell-style-name="ce9"/>
        <table:table-column table:style-name="co20" table:default-cell-style-name="ce9"/>
        <table:table-column table:style-name="co21" table:default-cell-style-name="ce24"/>
        <table:table-column table:style-name="co29" table:default-cell-style-name="ce30"/>
        <table:table-column table:style-name="co30" table:default-cell-style-name="Default"/>
        <table:table-column table:style-name="co23" table:default-cell-style-name="ce3"/>
        <table:table-column table:style-name="co10" table:default-cell-style-name="ce3"/>
        <table:table-column table:style-name="co31" table:default-cell-style-name="ce3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2" office:value-type="string">
            <text:p>8ef26a406ffb3c2600c7b5e321d288c0 <text:s/>crowd_run_1080p.cfg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“pioramento”</text:p>
          </table:table-cell>
        </table:table-row>
        <table:table-row table:style-name="ro1">
          <table:table-cell/>
          <table:table-cell table:style-name="ce2" office:value-type="string">
            <text:p>lencod</text:p>
          </table:table-cell>
          <table:table-cell table:style-name="ce19" office:value-type="string">
            <text:p>Total Encoding time (s)</text:p>
          </table:table-cell>
          <table:table-cell table:style-name="ce19" office:value-type="string">
            <text:p>ME Encoding Time (s)</text:p>
          </table:table-cell>
          <table:table-cell table:style-name="ce25" office:value-type="string">
            <text:p>PSNR – Y (dB)</text:p>
          </table:table-cell>
          <table:table-cell table:style-name="ce31" office:value-type="string">
            <text:p>Total speed up (x) –&gt; orig/opt</text:p>
          </table:table-cell>
          <table:table-cell table:style-name="ce36" office:value-type="string">
            <text:p>ME speed up (x) –&gt; orig/opt</text:p>
          </table:table-cell>
          <table:table-cell table:style-name="ce4" office:value-type="string">
            <text:p><text:span text:style-name="T1">Diff (opt – orig):</text:span><text:span text:style-name="T2"> PSNR – Y (dB)</text:span></text:p>
          </table:table-cell>
          <table:table-cell table:style-name="ce18" office:value-type="string">
            <text:p>PSNR → opt/orig</text:p>
          </table:table-cell>
          <table:table-cell table:style-name="ce18" office:value-type="string">
            <text:p>Total speed up * PSNR → opt/orig</text:p>
          </table:table-cell>
          <table:table-cell/>
          <table:table-cell table:style-name="ce18" office:value-type="string">
            <text:p>PSNR → orig/opt</text:p>
          </table:table-cell>
        </table:table-row>
        <table:table-row table:style-name="ro1">
          <table:table-cell/>
          <table:table-cell table:style-name="ce13" office:value-type="string">
            <text:p>orig</text:p>
          </table:table-cell>
          <table:table-cell table:style-name="ce20" office:value-type="float" office:value="9141.251">
            <text:p>9141.251</text:p>
          </table:table-cell>
          <table:table-cell table:style-name="ce20" office:value-type="float" office:value="8290.471">
            <text:p>8290.471</text:p>
          </table:table-cell>
          <table:table-cell table:style-name="ce26" office:value-type="float" office:value="37.84">
            <text:p>37.84</text:p>
          </table:table-cell>
          <table:table-cell table:style-name="ce32" table:formula="of:=[.C4]/[.C4]" office:value-type="float" office:value="1">
            <text:p>1</text:p>
          </table:table-cell>
          <table:table-cell table:style-name="ce32" table:formula="of:=[.D4]/[.D4]" office:value-type="float" office:value="1">
            <text:p>1</text:p>
          </table:table-cell>
          <table:table-cell table:style-name="ce13" table:formula="of:=[.E4] - [.E4]" office:value-type="float" office:value="0">
            <text:p>0</text:p>
          </table:table-cell>
          <table:table-cell table:style-name="ce38" table:formula="of:=[.E4]/[.E4]" office:value-type="float" office:value="1">
            <text:p>1.0000</text:p>
          </table:table-cell>
          <table:table-cell table:style-name="ce42" table:formula="of:=[.F4]*[.I4]" office:value-type="float" office:value="1">
            <text:p>1.0000</text:p>
          </table:table-cell>
          <table:table-cell/>
          <table:table-cell table:style-name="ce38" table:formula="of:=[.E4]/[.E4]" office:value-type="float" office:value="1">
            <text:p>1.0000</text:p>
          </table:table-cell>
        </table:table-row>
        <table:table-row table:style-name="ro1">
          <table:table-cell/>
          <table:table-cell table:style-name="ce14" office:value-type="string">
            <text:p>trunc1</text:p>
          </table:table-cell>
          <table:table-cell table:style-name="ce21" office:value-type="float" office:value="8467.223">
            <text:p>8467.223</text:p>
          </table:table-cell>
          <table:table-cell table:style-name="ce21" office:value-type="float" office:value="7611.181">
            <text:p>7611.181</text:p>
          </table:table-cell>
          <table:table-cell table:style-name="ce27" office:value-type="float" office:value="37.78">
            <text:p>37.78</text:p>
          </table:table-cell>
          <table:table-cell table:style-name="ce33" table:formula="of:=[.C4]/[.C5]" office:value-type="float" office:value="1.07960437560225">
            <text:p>1.08</text:p>
          </table:table-cell>
          <table:table-cell table:style-name="ce33" table:formula="of:=[.D4]/[.D5]" office:value-type="float" office:value="1.08924896149494">
            <text:p>1.09</text:p>
          </table:table-cell>
          <table:table-cell table:style-name="ce14" table:formula="of:=[.E5] - [.E4]" office:value-type="float" office:value="-0.0600000000000023">
            <text:p>-0.06</text:p>
          </table:table-cell>
          <table:table-cell table:style-name="ce39" table:formula="of:=[.E5]/[.E4]" office:value-type="float" office:value="0.998414376321353">
            <text:p>0.9984</text:p>
          </table:table-cell>
          <table:table-cell table:style-name="ce43" table:formula="of:=[.F5]*[.I5]" office:value-type="float" office:value="1.07789252934072">
            <text:p>1.0779</text:p>
          </table:table-cell>
          <table:table-cell/>
          <table:table-cell table:style-name="ce39" table:formula="of:=[.E4]/[.E5]" office:value-type="float" office:value="1.00158814187401">
            <text:p>1.0016</text:p>
          </table:table-cell>
        </table:table-row>
        <table:table-row table:style-name="ro1">
          <table:table-cell/>
          <table:table-cell table:style-name="ce14" office:value-type="string">
            <text:p>trunc2</text:p>
          </table:table-cell>
          <table:table-cell table:style-name="ce21" office:value-type="float" office:value="7083.279">
            <text:p>7083.279</text:p>
          </table:table-cell>
          <table:table-cell table:style-name="ce21" office:value-type="float" office:value="6224.74">
            <text:p>6224.740</text:p>
          </table:table-cell>
          <table:table-cell table:style-name="ce27" office:value-type="float" office:value="37.74">
            <text:p>37.74</text:p>
          </table:table-cell>
          <table:table-cell table:style-name="ce48" table:formula="of:=[.C4]/[.C6]" office:value-type="float" office:value="1.29053945213792">
            <text:p>1.29</text:p>
          </table:table-cell>
          <table:table-cell table:style-name="ce33" table:formula="of:=[.D4]/[.D6]" office:value-type="float" office:value="1.33185819809341">
            <text:p>1.33</text:p>
          </table:table-cell>
          <table:table-cell table:style-name="ce55" table:formula="of:=[.E6] - [.E4]" office:value-type="float" office:value="-0.100000000000001">
            <text:p>-0.10</text:p>
          </table:table-cell>
          <table:table-cell table:style-name="ce39" table:formula="of:=[.E6]/[.E4]" office:value-type="float" office:value="0.997357293868922">
            <text:p>0.9974</text:p>
          </table:table-cell>
          <table:table-cell table:style-name="ce43" table:formula="of:=[.F6]*[.I6]" office:value-type="float" office:value="1.28712893561535">
            <text:p>1.2871</text:p>
          </table:table-cell>
          <table:table-cell/>
          <table:table-cell table:style-name="ce61" table:formula="of:=[.E4]/[.E6]" office:value-type="float" office:value="1.00264970853206">
            <text:p>1.0026</text:p>
          </table:table-cell>
        </table:table-row>
        <table:table-row table:style-name="ro1">
          <table:table-cell/>
          <table:table-cell table:style-name="ce14" office:value-type="string">
            <text:p>trunc3</text:p>
          </table:table-cell>
          <table:table-cell table:style-name="ce21" office:value-type="float" office:value="5128.742">
            <text:p>5128.742</text:p>
          </table:table-cell>
          <table:table-cell table:style-name="ce21" office:value-type="float" office:value="4272.36">
            <text:p>4272.360</text:p>
          </table:table-cell>
          <table:table-cell table:style-name="ce27" office:value-type="float" office:value="37.69">
            <text:p>37.69</text:p>
          </table:table-cell>
          <table:table-cell table:style-name="ce33" table:formula="of:=[.C4]/[.C7]" office:value-type="float" office:value="1.78235735000903">
            <text:p>1.78</text:p>
          </table:table-cell>
          <table:table-cell table:style-name="ce33" table:formula="of:=[.D4]/[.D7]" office:value-type="float" office:value="1.94048979954873">
            <text:p>1.94</text:p>
          </table:table-cell>
          <table:table-cell table:style-name="ce56" table:formula="of:=[.E7] - [.E4]" office:value-type="float" office:value="-0.150000000000006">
            <text:p>-0.15</text:p>
          </table:table-cell>
          <table:table-cell table:style-name="ce43" table:formula="of:=[.E7]/[.E4]" office:value-type="float" office:value="0.996035940803382">
            <text:p>0.9960</text:p>
          </table:table-cell>
          <table:table-cell table:style-name="ce43" table:formula="of:=[.F7]*[.I7]" office:value-type="float" office:value="1.77529197996407">
            <text:p>1.7753</text:p>
          </table:table-cell>
          <table:table-cell/>
          <table:table-cell table:style-name="ce61" table:formula="of:=[.E4]/[.E7]" office:value-type="float" office:value="1.00397983550013">
            <text:p>1.0040</text:p>
          </table:table-cell>
        </table:table-row>
        <table:table-row table:style-name="ro1">
          <table:table-cell/>
          <table:table-cell table:style-name="ce14" office:value-type="string">
            <text:p>trunc4</text:p>
          </table:table-cell>
          <table:table-cell table:style-name="ce21" office:value-type="float" office:value="3722.318">
            <text:p>3722.318</text:p>
          </table:table-cell>
          <table:table-cell table:style-name="ce21" office:value-type="float" office:value="2863.35">
            <text:p>2863.350</text:p>
          </table:table-cell>
          <table:table-cell table:style-name="ce27" office:value-type="float" office:value="37.57">
            <text:p>37.57</text:p>
          </table:table-cell>
          <table:table-cell table:style-name="ce33" table:formula="of:=[.C4]/[.C8]" office:value-type="float" office:value="2.45579528670038">
            <text:p>2.46</text:p>
          </table:table-cell>
          <table:table-cell table:style-name="ce33" table:formula="of:=[.D4]/[.D8]" office:value-type="float" office:value="2.89537464857597">
            <text:p>2.90</text:p>
          </table:table-cell>
          <table:table-cell table:style-name="ce56" table:formula="of:=[.E8] - [.E4]" office:value-type="float" office:value="-0.270000000000003">
            <text:p>-0.27</text:p>
          </table:table-cell>
          <table:table-cell table:style-name="ce61" table:formula="of:=[.E8]/[.E4]" office:value-type="float" office:value="0.992864693446089">
            <text:p>0.9929</text:p>
          </table:table-cell>
          <table:table-cell table:style-name="ce43" table:formula="of:=[.F8]*[.I8]" office:value-type="float" office:value="2.43827243449613">
            <text:p>2.4383</text:p>
          </table:table-cell>
          <table:table-cell/>
          <table:table-cell table:style-name="ce61" table:formula="of:=[.E4]/[.E8]" office:value-type="float" office:value="1.00718658504126">
            <text:p>1.0072</text:p>
          </table:table-cell>
        </table:table-row>
        <table:table-row table:style-name="ro1">
          <table:table-cell/>
          <table:table-cell table:style-name="ce14" office:value-type="string">
            <text:p>trunc5</text:p>
          </table:table-cell>
          <table:table-cell table:style-name="ce21" office:value-type="float" office:value="2772.65">
            <text:p>2772.650</text:p>
          </table:table-cell>
          <table:table-cell table:style-name="ce21" office:value-type="float" office:value="1913.036">
            <text:p>1913.036</text:p>
          </table:table-cell>
          <table:table-cell table:style-name="ce27" office:value-type="float" office:value="37.18">
            <text:p>37.18</text:p>
          </table:table-cell>
          <table:table-cell table:style-name="ce33" table:formula="of:=[.C4]/[.C9]" office:value-type="float" office:value="3.29693650478784">
            <text:p>3.30</text:p>
          </table:table-cell>
          <table:table-cell table:style-name="ce33" table:formula="of:=[.D4]/[.D9]" office:value-type="float" office:value="4.33367223617329">
            <text:p>4.33</text:p>
          </table:table-cell>
          <table:table-cell table:style-name="ce56" table:formula="of:=[.E9] - [.E4]" office:value-type="float" office:value="-0.660000000000004">
            <text:p>-0.66</text:p>
          </table:table-cell>
          <table:table-cell table:style-name="ce61" table:formula="of:=[.E9]/[.E4]" office:value-type="float" office:value="0.982558139534884">
            <text:p>0.9826</text:p>
          </table:table-cell>
          <table:table-cell table:style-name="ce43" table:formula="of:=[.F9]*[.I9]" office:value-type="float" office:value="3.23943179830898">
            <text:p>3.2394</text:p>
          </table:table-cell>
          <table:table-cell/>
          <table:table-cell table:style-name="ce61" table:formula="of:=[.E4]/[.E9]" office:value-type="float" office:value="1.01775147928994">
            <text:p>1.0178</text:p>
          </table:table-cell>
        </table:table-row>
        <table:table-row table:style-name="ro1">
          <table:table-cell/>
          <table:table-cell table:style-name="ce14" office:value-type="string">
            <text:p>trunc6</text:p>
          </table:table-cell>
          <table:table-cell table:style-name="ce21" office:value-type="float" office:value="2251.497">
            <text:p>2251.497</text:p>
          </table:table-cell>
          <table:table-cell table:style-name="ce21" office:value-type="float" office:value="1387.639">
            <text:p>1387.639</text:p>
          </table:table-cell>
          <table:table-cell table:style-name="ce27" office:value-type="float" office:value="36.35">
            <text:p>36.35</text:p>
          </table:table-cell>
          <table:table-cell table:style-name="ce49" table:formula="of:=[.C4]/[.C10]" office:value-type="float" office:value="4.06007691771297">
            <text:p>4.06</text:p>
          </table:table-cell>
          <table:table-cell table:style-name="ce49" table:formula="of:=[.D4]/[.D10]" office:value-type="float" office:value="5.9745157061743">
            <text:p>5.97</text:p>
          </table:table-cell>
          <table:table-cell table:style-name="ce56" table:formula="of:=[.E10] - [.E4]" office:value-type="float" office:value="-1.49">
            <text:p>-1.49</text:p>
          </table:table-cell>
          <table:table-cell table:style-name="ce61" table:formula="of:=[.E10]/[.E4]" office:value-type="float" office:value="0.960623678646934">
            <text:p>0.9606</text:p>
          </table:table-cell>
          <table:table-cell table:style-name="ce43" table:formula="of:=[.F10]*[.I10]" office:value-type="float" office:value="3.90020602428294">
            <text:p>3.9002</text:p>
          </table:table-cell>
          <table:table-cell/>
          <table:table-cell table:style-name="ce61" table:formula="of:=[.E4]/[.E10]" office:value-type="float" office:value="1.04099037138927">
            <text:p>1.0410</text:p>
          </table:table-cell>
        </table:table-row>
        <table:table-row table:style-name="ro1">
          <table:table-cell/>
          <table:table-cell table:style-name="ce14" office:value-type="string">
            <text:p>trunc7</text:p>
          </table:table-cell>
          <table:table-cell table:style-name="ce21" office:value-type="float" office:value="2159.073">
            <text:p>2159.073</text:p>
          </table:table-cell>
          <table:table-cell table:style-name="ce21" office:value-type="float" office:value="1303.444">
            <text:p>1303.444</text:p>
          </table:table-cell>
          <table:table-cell table:style-name="ce27" office:value-type="float" office:value="34.44">
            <text:p>34.44</text:p>
          </table:table-cell>
          <table:table-cell table:style-name="ce49" table:formula="of:=[.C4]/[.C11]" office:value-type="float" office:value="4.23387768732229">
            <text:p>4.23</text:p>
          </table:table-cell>
          <table:table-cell table:style-name="ce49" table:formula="of:=[.D4]/[.D11]" office:value-type="float" office:value="6.36043512417871">
            <text:p>6.36</text:p>
          </table:table-cell>
          <table:table-cell table:style-name="ce56" table:formula="of:=[.E11] - [.E4]" office:value-type="float" office:value="-3.40000000000001">
            <text:p>-3.4</text:p>
          </table:table-cell>
          <table:table-cell table:style-name="ce61" table:formula="of:=[.E11]/[.E4]" office:value-type="float" office:value="0.91014799154334">
            <text:p>0.9101</text:p>
          </table:table-cell>
          <table:table-cell table:style-name="ce43" table:formula="of:=[.F11]*[.I11]" office:value-type="float" office:value="3.85345527355655">
            <text:p>3.8535</text:p>
          </table:table-cell>
          <table:table-cell/>
          <table:table-cell table:style-name="ce61" table:formula="of:=[.E4]/[.E11]" office:value-type="float" office:value="1.09872241579559">
            <text:p>1.0987</text:p>
          </table:table-cell>
        </table:table-row>
        <table:table-row table:style-name="ro1">
          <table:table-cell/>
          <table:table-cell table:style-name="ce15" office:value-type="string">
            <text:p>sub21</text:p>
          </table:table-cell>
          <table:table-cell table:style-name="ce22" office:value-type="float" office:value="5411.723">
            <text:p>5411.723</text:p>
          </table:table-cell>
          <table:table-cell table:style-name="ce22" office:value-type="float" office:value="4552.216">
            <text:p>4552.216</text:p>
          </table:table-cell>
          <table:table-cell table:style-name="ce28" office:value-type="float" office:value="37.6">
            <text:p>37.60</text:p>
          </table:table-cell>
          <table:table-cell table:style-name="ce50" table:formula="of:=[.C4]/[.C12]" office:value-type="float" office:value="1.68915722404861">
            <text:p>1.69</text:p>
          </table:table-cell>
          <table:table-cell table:style-name="ce50" table:formula="of:=[.D4]/[.D12]" office:value-type="float" office:value="1.82119455667306">
            <text:p>1.82</text:p>
          </table:table-cell>
          <table:table-cell table:style-name="ce15" table:formula="of:=[.E12] - [.E4]" office:value-type="float" office:value="-0.240000000000002">
            <text:p>-0.24</text:p>
          </table:table-cell>
          <table:table-cell table:style-name="ce62" table:formula="of:=[.E12]/[.E4]" office:value-type="float" office:value="0.993657505285412">
            <text:p>0.9937</text:p>
          </table:table-cell>
          <table:table-cell table:style-name="ce45" table:formula="of:=[.F12]*[.I12]" office:value-type="float" office:value="1.67844375328297">
            <text:p>1.6784</text:p>
          </table:table-cell>
          <table:table-cell/>
          <table:table-cell table:style-name="ce62" table:formula="of:=[.E4]/[.E12]" office:value-type="float" office:value="1.0063829787234">
            <text:p>1.0064</text:p>
          </table:table-cell>
        </table:table-row>
        <table:table-row table:style-name="ro1">
          <table:table-cell/>
          <table:table-cell table:style-name="ce15" office:value-type="string">
            <text:p>sub41</text:p>
          </table:table-cell>
          <table:table-cell table:style-name="ce22" office:value-type="float" office:value="3620.927">
            <text:p>3620.927</text:p>
          </table:table-cell>
          <table:table-cell table:style-name="ce22" office:value-type="float" office:value="2756.737">
            <text:p>2756.737</text:p>
          </table:table-cell>
          <table:table-cell table:style-name="ce28" office:value-type="float" office:value="37.51">
            <text:p>37.51</text:p>
          </table:table-cell>
          <table:table-cell table:style-name="ce51" table:formula="of:=[.C4]/[.C13]" office:value-type="float" office:value="2.52456097568385">
            <text:p>2.52</text:p>
          </table:table-cell>
          <table:table-cell table:style-name="ce50" table:formula="of:=[.D4]/[.D13]" office:value-type="float" office:value="3.00734926835603">
            <text:p>3.01</text:p>
          </table:table-cell>
          <table:table-cell table:style-name="ce57" table:formula="of:=[.E13] - [.E4]" office:value-type="float" office:value="-0.330000000000005">
            <text:p>-0.33</text:p>
          </table:table-cell>
          <table:table-cell table:style-name="ce62" table:formula="of:=[.E13]/[.E4]" office:value-type="float" office:value="0.991279069767442">
            <text:p>0.9913</text:p>
          </table:table-cell>
          <table:table-cell table:style-name="ce45" table:formula="of:=[.F13]*[.I13]" office:value-type="float" office:value="2.50254445554707">
            <text:p>2.5025</text:p>
          </table:table-cell>
          <table:table-cell/>
          <table:table-cell table:style-name="ce62" table:formula="of:=[.E4]/[.E13]" office:value-type="float" office:value="1.00879765395894">
            <text:p>1.0088</text:p>
          </table:table-cell>
        </table:table-row>
        <table:table-row table:style-name="ro1">
          <table:table-cell/>
          <table:table-cell table:style-name="ce15" office:value-type="string">
            <text:p>sub81</text:p>
          </table:table-cell>
          <table:table-cell table:style-name="ce22" office:value-type="float" office:value="2740.971">
            <text:p>2740.971</text:p>
          </table:table-cell>
          <table:table-cell table:style-name="ce22" office:value-type="float" office:value="1873.328">
            <text:p>1873.328</text:p>
          </table:table-cell>
          <table:table-cell table:style-name="ce28" office:value-type="float" office:value="37.23">
            <text:p>37.23</text:p>
          </table:table-cell>
          <table:table-cell table:style-name="ce50" table:formula="of:=[.C4]/[.C14]" office:value-type="float" office:value="3.33504112228842">
            <text:p>3.34</text:p>
          </table:table-cell>
          <table:table-cell table:style-name="ce50" table:formula="of:=[.D4]/[.D14]" office:value-type="float" office:value="4.42553092677844">
            <text:p>4.43</text:p>
          </table:table-cell>
          <table:table-cell table:style-name="ce58" table:formula="of:=[.E14] - [.E4]" office:value-type="float" office:value="-0.610000000000007">
            <text:p>-0.61</text:p>
          </table:table-cell>
          <table:table-cell table:style-name="ce62" table:formula="of:=[.E14]/[.E4]" office:value-type="float" office:value="0.983879492600423">
            <text:p>0.9839</text:p>
          </table:table-cell>
          <table:table-cell table:style-name="ce45" table:formula="of:=[.F14]*[.I14]" office:value-type="float" office:value="3.28127856719867">
            <text:p>3.2813</text:p>
          </table:table-cell>
          <table:table-cell/>
          <table:table-cell table:style-name="ce45" table:formula="of:=[.E4]/[.E14]" office:value-type="float" office:value="1.0163846360462">
            <text:p>1.0164</text:p>
          </table:table-cell>
        </table:table-row>
        <table:table-row table:style-name="ro1">
          <table:table-cell/>
          <table:table-cell table:style-name="ce16" office:value-type="string">
            <text:p>sub41trunc2</text:p>
          </table:table-cell>
          <table:table-cell table:style-name="ce23" office:value-type="float" office:value="3231.436">
            <text:p>3231.436</text:p>
          </table:table-cell>
          <table:table-cell table:style-name="ce23" office:value-type="float" office:value="2355.385">
            <text:p>2355.385</text:p>
          </table:table-cell>
          <table:table-cell table:style-name="ce29" office:value-type="float" office:value="37.5">
            <text:p>37.50</text:p>
          </table:table-cell>
          <table:table-cell table:style-name="ce52" table:formula="of:=[.C4]/[.C15]" office:value-type="float" office:value="2.82885101236726">
            <text:p>2.83</text:p>
          </table:table-cell>
          <table:table-cell table:style-name="ce53" table:formula="of:=[.D4]/[.D15]" office:value-type="float" office:value="3.51979442851169">
            <text:p>3.52</text:p>
          </table:table-cell>
          <table:table-cell table:style-name="ce59" table:formula="of:=[.E15] - [.E4]" office:value-type="float" office:value="-0.340000000000003">
            <text:p>-0.34</text:p>
          </table:table-cell>
          <table:table-cell table:style-name="ce63" table:formula="of:=[.E15]/[.E4]" office:value-type="float" office:value="0.991014799154334">
            <text:p>0.9910</text:p>
          </table:table-cell>
          <table:table-cell table:style-name="ce47" table:formula="of:=[.F15]*[.I15]" office:value-type="float" office:value="2.80343321785867">
            <text:p>2.8034</text:p>
          </table:table-cell>
          <table:table-cell/>
          <table:table-cell table:style-name="ce47" table:formula="of:=[.E4]/[.E15]" office:value-type="float" office:value="1.00906666666667">
            <text:p>1.0091</text:p>
          </table:table-cell>
        </table:table-row>
        <table:table-row table:style-name="ro1">
          <table:table-cell/>
          <table:table-cell table:style-name="ce17" office:value-type="string">
            <text:p>sub21trunc1</text:p>
          </table:table-cell>
          <table:table-cell table:style-name="ce23" office:value-type="float" office:value="5067.302">
            <text:p>5067.302</text:p>
          </table:table-cell>
          <table:table-cell table:style-name="ce23" office:value-type="float" office:value="4208.223">
            <text:p>4208.223</text:p>
          </table:table-cell>
          <table:table-cell table:style-name="ce29" office:value-type="float" office:value="37.6">
            <text:p>37.60</text:p>
          </table:table-cell>
          <table:table-cell table:style-name="ce35" table:formula="of:=[.C4]/[.C16]" office:value-type="float" office:value="1.8039680682146">
            <text:p>1.80</text:p>
          </table:table-cell>
          <table:table-cell table:style-name="ce54" table:formula="of:=[.D4]/[.D16]" office:value-type="float" office:value="1.97006456169267">
            <text:p>1.97</text:p>
          </table:table-cell>
          <table:table-cell table:style-name="ce60" table:formula="of:=[.E16] - [.E4]" office:value-type="float" office:value="-0.240000000000002">
            <text:p>-0.24</text:p>
          </table:table-cell>
          <table:table-cell table:style-name="ce63" table:formula="of:=[.E16]/[.E4]" office:value-type="float" office:value="0.993657505285412">
            <text:p>0.9937</text:p>
          </table:table-cell>
          <table:table-cell table:style-name="ce47" table:formula="of:=[.F16]*[.I16]" office:value-type="float" office:value="1.79252641027667">
            <text:p>1.7925</text:p>
          </table:table-cell>
          <table:table-cell/>
          <table:table-cell table:style-name="ce63" table:formula="of:=[.E4]/[.E16]" office:value-type="float" office:value="1.0063829787234">
            <text:p>1.0064</text:p>
          </table:table-cell>
        </table:table-row>
        <table:table-row table:style-name="ro1">
          <table:table-cell/>
          <table:table-cell table:style-name="ce17" office:value-type="string">
            <text:p>sub41trunc1</text:p>
          </table:table-cell>
          <table:table-cell table:style-name="ce23" office:value-type="float" office:value="4971.153">
            <text:p>4971.153</text:p>
          </table:table-cell>
          <table:table-cell table:style-name="ce23" office:value-type="float" office:value="4114.853">
            <text:p>4114.853</text:p>
          </table:table-cell>
          <table:table-cell table:style-name="ce29" office:value-type="float" office:value="34.62">
            <text:p>34.62</text:p>
          </table:table-cell>
          <table:table-cell table:style-name="ce53" table:formula="of:=[.C4]/[.C17]" office:value-type="float" office:value="1.83885931493157">
            <text:p>1.84</text:p>
          </table:table-cell>
          <table:table-cell table:style-name="ce54" table:formula="of:=[.D4]/[.D17]" office:value-type="float" office:value="2.0147672346983">
            <text:p>2.01</text:p>
          </table:table-cell>
          <table:table-cell table:style-name="ce60" table:formula="of:=[.E17] - [.E4]" office:value-type="float" office:value="-3.22000000000001">
            <text:p>-3.22</text:p>
          </table:table-cell>
          <table:table-cell table:style-name="ce63" table:formula="of:=[.E17]/[.E4]" office:value-type="float" office:value="0.914904862579281">
            <text:p>0.9149</text:p>
          </table:table-cell>
          <table:table-cell table:style-name="ce47" table:formula="of:=[.F17]*[.I17]" office:value-type="float" office:value="1.6823813288301">
            <text:p>1.6824</text:p>
          </table:table-cell>
          <table:table-cell/>
          <table:table-cell table:style-name="ce63" table:formula="of:=[.E4]/[.E17]" office:value-type="float" office:value="1.09300982091277">
            <text:p>1.0930</text:p>
          </table:table-cell>
        </table:table-row>
        <table:table-row table:style-name="ro1">
          <table:table-cell/>
          <table:table-cell table:style-name="ce17" office:value-type="string">
            <text:p>sub21trunc2</text:p>
          </table:table-cell>
          <table:table-cell table:style-name="ce23" office:value-type="float" office:value="7878.229">
            <text:p>7878.229</text:p>
          </table:table-cell>
          <table:table-cell table:style-name="ce23" office:value-type="float" office:value="7034.553">
            <text:p>7034.553</text:p>
          </table:table-cell>
          <table:table-cell table:style-name="ce29" office:value-type="float" office:value="32.61">
            <text:p>32.61</text:p>
          </table:table-cell>
          <table:table-cell table:style-name="ce53" table:formula="of:=[.C4]/[.C18]" office:value-type="float" office:value="1.16031801055796">
            <text:p>1.16</text:p>
          </table:table-cell>
          <table:table-cell table:style-name="ce54" table:formula="of:=[.D4]/[.D18]" office:value-type="float" office:value="1.17853558001482">
            <text:p>1.18</text:p>
          </table:table-cell>
          <table:table-cell table:style-name="ce60" table:formula="of:=[.E18] - [.E4]" office:value-type="float" office:value="-5.23">
            <text:p>-5.23</text:p>
          </table:table-cell>
          <table:table-cell table:style-name="ce63" table:formula="of:=[.E18]/[.E4]" office:value-type="float" office:value="0.861786469344609">
            <text:p>0.8618</text:p>
          </table:table-cell>
          <table:table-cell table:style-name="ce47" table:formula="of:=[.F18]*[.I18]" office:value-type="float" office:value="0.999946361635702">
            <text:p>0.9999</text:p>
          </table:table-cell>
          <table:table-cell/>
          <table:table-cell table:style-name="ce63" table:formula="of:=[.E4]/[.E18]" office:value-type="float" office:value="1.16038025145661">
            <text:p>1.1604</text:p>
          </table:table-cell>
        </table:table-row>
        <table:table-row table:style-name="ro1">
          <table:table-cell/>
          <table:table-cell table:style-name="ce17" office:value-type="string">
            <text:p>sub21trunc3</text:p>
          </table:table-cell>
          <table:table-cell table:style-name="ce23" office:value-type="float" office:value="7294.142">
            <text:p>7294.142</text:p>
          </table:table-cell>
          <table:table-cell table:style-name="ce23" office:value-type="float" office:value="6449.775">
            <text:p>6449.775</text:p>
          </table:table-cell>
          <table:table-cell table:style-name="ce29" office:value-type="float" office:value="32.3">
            <text:p>32.30</text:p>
          </table:table-cell>
          <table:table-cell table:style-name="ce53" table:formula="of:=[.C4]/[.C19]" office:value-type="float" office:value="1.25323184001628">
            <text:p>1.25</text:p>
          </table:table-cell>
          <table:table-cell table:style-name="ce54" table:formula="of:=[.D4]/[.D19]" office:value-type="float" office:value="1.28538918024272">
            <text:p>1.29</text:p>
          </table:table-cell>
          <table:table-cell table:style-name="ce60" table:formula="of:=[.E19] - [.E4]" office:value-type="float" office:value="-5.54000000000001">
            <text:p>-5.54</text:p>
          </table:table-cell>
          <table:table-cell table:style-name="ce63" table:formula="of:=[.E19]/[.E4]" office:value-type="float" office:value="0.853594080338266">
            <text:p>0.8536</text:p>
          </table:table-cell>
          <table:table-cell table:style-name="ce47" table:formula="of:=[.F19]*[.I19]" office:value-type="float" office:value="1.06975127992933">
            <text:p>1.0698</text:p>
          </table:table-cell>
          <table:table-cell/>
          <table:table-cell table:style-name="ce63" table:formula="of:=[.E4]/[.E19]" office:value-type="float" office:value="1.17151702786378">
            <text:p>1.1715</text:p>
          </table:table-cell>
        </table:table-row>
        <table:table-row table:style-name="ro1">
          <table:table-cell/>
          <table:table-cell table:style-name="ce17" office:value-type="string">
            <text:p>sub41trunc3</text:p>
          </table:table-cell>
          <table:table-cell table:style-name="ce23" office:value-type="float" office:value="4480.563">
            <text:p>4480.563</text:p>
          </table:table-cell>
          <table:table-cell table:style-name="ce23" office:value-type="float" office:value="3622.235">
            <text:p>3622.235</text:p>
          </table:table-cell>
          <table:table-cell table:style-name="ce29" office:value-type="float" office:value="34.55">
            <text:p>34.55</text:p>
          </table:table-cell>
          <table:table-cell table:style-name="ce53" table:formula="of:=[.C4]/[.C20]" office:value-type="float" office:value="2.04020142111605">
            <text:p>2.04</text:p>
          </table:table-cell>
          <table:table-cell table:style-name="ce54" table:formula="of:=[.D4]/[.D20]" office:value-type="float" office:value="2.28877226353343">
            <text:p>2.29</text:p>
          </table:table-cell>
          <table:table-cell table:style-name="ce60" table:formula="of:=[.E20] - [.E4]" office:value-type="float" office:value="-3.29000000000001">
            <text:p>-3.29</text:p>
          </table:table-cell>
          <table:table-cell table:style-name="ce63" table:formula="of:=[.E20]/[.E4]" office:value-type="float" office:value="0.913054968287526">
            <text:p>0.9131</text:p>
          </table:table-cell>
          <table:table-cell table:style-name="ce47" table:formula="of:=[.F20]*[.I20]" office:value-type="float" office:value="1.86281604385728">
            <text:p>1.8628</text:p>
          </table:table-cell>
          <table:table-cell/>
          <table:table-cell table:style-name="ce63" table:formula="of:=[.E4]/[.E20]" office:value-type="float" office:value="1.09522431259045">
            <text:p>1.0952</text:p>
          </table:table-cell>
        </table:table-row>
        <table:table-row table:style-name="ro1">
          <table:table-cell/>
          <table:table-cell table:style-name="ce17" office:value-type="string">
            <text:p>sub21trunc4</text:p>
          </table:table-cell>
          <table:table-cell table:style-name="ce23" office:value-type="float" office:value="6613.847">
            <text:p>6613.847</text:p>
          </table:table-cell>
          <table:table-cell table:style-name="ce23" office:value-type="float" office:value="5759.492">
            <text:p>5759.492</text:p>
          </table:table-cell>
          <table:table-cell table:style-name="ce29" office:value-type="float" office:value="32">
            <text:p>32.00</text:p>
          </table:table-cell>
          <table:table-cell table:style-name="ce53" table:formula="of:=[.C4]/[.C21]" office:value-type="float" office:value="1.38213826234565">
            <text:p>1.38</text:p>
          </table:table-cell>
          <table:table-cell table:style-name="ce54" table:formula="of:=[.D4]/[.D21]" office:value-type="float" office:value="1.4394448329818">
            <text:p>1.44</text:p>
          </table:table-cell>
          <table:table-cell table:style-name="ce60" table:formula="of:=[.E21] - [.E4]" office:value-type="float" office:value="-5.84">
            <text:p>-5.84</text:p>
          </table:table-cell>
          <table:table-cell table:style-name="ce63" table:formula="of:=[.E21]/[.E4]" office:value-type="float" office:value="0.845665961945032">
            <text:p>0.8457</text:p>
          </table:table-cell>
          <table:table-cell table:style-name="ce47" table:formula="of:=[.F21]*[.I21]" office:value-type="float" office:value="1.16882728316757">
            <text:p>1.1688</text:p>
          </table:table-cell>
          <table:table-cell/>
          <table:table-cell table:style-name="ce63" table:formula="of:=[.E4]/[.E21]" office:value-type="float" office:value="1.1825">
            <text:p>1.1825</text:p>
          </table:table-cell>
        </table:table-row>
        <table:table-row table:style-name="ro1">
          <table:table-cell/>
          <table:table-cell table:style-name="ce17" office:value-type="string">
            <text:p>sub41trunc4</text:p>
          </table:table-cell>
          <table:table-cell table:style-name="ce23" office:value-type="float" office:value="4059.839">
            <text:p>4059.839</text:p>
          </table:table-cell>
          <table:table-cell table:style-name="ce23" office:value-type="float" office:value="3201.536">
            <text:p>3201.536</text:p>
          </table:table-cell>
          <table:table-cell table:style-name="ce29" office:value-type="float" office:value="34.28">
            <text:p>34.28</text:p>
          </table:table-cell>
          <table:table-cell table:style-name="ce53" table:formula="of:=[.C4]/[.C22]" office:value-type="float" office:value="2.2516289439064">
            <text:p>2.25</text:p>
          </table:table-cell>
          <table:table-cell table:style-name="ce54" table:formula="of:=[.D4]/[.D22]" office:value-type="float" office:value="2.58952921347753">
            <text:p>2.59</text:p>
          </table:table-cell>
          <table:table-cell table:style-name="ce60" table:formula="of:=[.E22] - [.E4]" office:value-type="float" office:value="-3.56">
            <text:p>-3.56</text:p>
          </table:table-cell>
          <table:table-cell table:style-name="ce47" table:formula="of:=[.E22]/[.E4]" office:value-type="float" office:value="0.905919661733615">
            <text:p>0.9059</text:p>
          </table:table-cell>
          <table:table-cell table:style-name="ce47" table:formula="of:=[.F22]*[.I22]" office:value-type="float" office:value="2.0397949312133">
            <text:p>2.0398</text:p>
          </table:table-cell>
          <table:table-cell/>
          <table:table-cell table:style-name="ce63" table:formula="of:=[.E4]/[.E22]" office:value-type="float" office:value="1.10385064177363">
            <text:p>1.1039</text:p>
          </table:table-cell>
        </table:table-row>
        <table:table-row table:style-name="ro1" table:number-rows-repeated="65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mbinacoes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number-columns-repeated="3" table:default-cell-style-name="ce6"/>
        <table:table-column table:style-name="co14" table:default-cell-style-name="ce72"/>
        <table:table-column table:style-name="co14" table:number-columns-repeated="4" table:default-cell-style-name="Default"/>
        <table:table-row table:style-name="ro1">
          <table:table-cell/>
          <table:table-cell table:style-name="Default" office:value-type="string">
            <text:p>sub1:1</text:p>
          </table:table-cell>
          <table:table-cell table:style-name="Default" office:value-type="string">
            <text:p>sub2:1</text:p>
          </table:table-cell>
          <table:table-cell table:style-name="Default" office:value-type="string">
            <text:p>sub4:1</text:p>
          </table:table-cell>
          <table:table-cell table:style-name="Default" office:value-type="string">
            <text:p>sub8:1</text:p>
          </table:table-cell>
          <table:table-cell table:number-columns-repeated="4"/>
        </table:table-row>
        <table:table-row table:style-name="ro1">
          <table:table-cell office:value-type="string">
            <text:p>trunc0</text:p>
          </table:table-cell>
          <table:table-cell table:style-name="ce3" office:value-type="string">
            <text:p>ok-01</text:p>
          </table:table-cell>
          <table:table-cell table:style-name="ce3" office:value-type="string">
            <text:p>ok-02</text:p>
          </table:table-cell>
          <table:table-cell table:style-name="ce3" office:value-type="string">
            <text:p>ok-03</text:p>
          </table:table-cell>
          <table:table-cell table:style-name="ce73" office:value-type="string">
            <text:p>ok-04</text:p>
          </table:table-cell>
          <table:table-cell table:number-columns-repeated="2"/>
          <table:table-cell table:style-name="ce74"/>
          <table:table-cell office:value-type="string">
            <text:p>Max diff PSNR &gt; 0.5dB, but mean diff PSNR &lt; 0.5dB</text:p>
          </table:table-cell>
        </table:table-row>
        <table:table-row table:style-name="ro1">
          <table:table-cell office:value-type="string">
            <text:p>trunc1</text:p>
          </table:table-cell>
          <table:table-cell office:value-type="string">
            <text:p>ok-05</text:p>
          </table:table-cell>
          <table:table-cell office:value-type="string">
            <text:p>ok-06</text:p>
          </table:table-cell>
          <table:table-cell office:value-type="string">
            <text:p>ok-07</text:p>
          </table:table-cell>
          <table:table-cell office:value-type="string">
            <text:p>08</text:p>
          </table:table-cell>
          <table:table-cell table:number-columns-repeated="2"/>
          <table:table-cell table:style-name="ce75"/>
          <table:table-cell office:value-type="string">
            <text:p>Mean diff PSNR &gt; 0.5dB</text:p>
          </table:table-cell>
        </table:table-row>
        <table:table-row table:style-name="ro1">
          <table:table-cell office:value-type="string">
            <text:p>trunc2</text:p>
          </table:table-cell>
          <table:table-cell office:value-type="string">
            <text:p>ok-09</text:p>
          </table:table-cell>
          <table:table-cell office:value-type="string">
            <text:p>ok-10</text:p>
          </table:table-cell>
          <table:table-cell office:value-type="string">
            <text:p>ok-11</text:p>
          </table:table-cell>
          <table:table-cell office:value-type="string">
            <text:p>12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>
            <text:p>trunc3</text:p>
          </table:table-cell>
          <table:table-cell office:value-type="string">
            <text:p>ok-13</text:p>
          </table:table-cell>
          <table:table-cell office:value-type="string">
            <text:p>ok-14</text:p>
          </table:table-cell>
          <table:table-cell office:value-type="string">
            <text:p>ok-15</text:p>
          </table:table-cell>
          <table:table-cell office:value-type="string">
            <text:p>16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>
            <text:p>trunc4</text:p>
          </table:table-cell>
          <table:table-cell table:style-name="ce71" office:value-type="string">
            <text:p>ok-17</text:p>
          </table:table-cell>
          <table:table-cell table:style-name="ce71" office:value-type="string">
            <text:p>ok-18</text:p>
          </table:table-cell>
          <table:table-cell table:style-name="ce71" office:value-type="string">
            <text:p>ok-19</text:p>
          </table:table-cell>
          <table:table-cell office:value-type="string">
            <text:p>20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>
            <text:p>trunc5</text:p>
          </table:table-cell>
          <table:table-cell table:style-name="ce72" office:value-type="string">
            <text:p>ok-21</text:p>
          </table:table-cell>
          <table:table-cell table:style-name="ce72" office:value-type="string">
            <text:p>22</text:p>
          </table:table-cell>
          <table:table-cell table:style-name="ce72" office:value-type="string">
            <text:p>23</text:p>
          </table:table-cell>
          <table:table-cell office:value-type="string">
            <text:p>24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>
            <text:p>trunc6</text:p>
          </table:table-cell>
          <table:table-cell table:style-name="ce72" office:value-type="string">
            <text:p>ok-25</text:p>
          </table:table-cell>
          <table:table-cell table:style-name="ce72" office:value-type="string">
            <text:p>26</text:p>
          </table:table-cell>
          <table:table-cell table:style-name="ce72" office:value-type="string">
            <text:p>27</text:p>
          </table:table-cell>
          <table:table-cell office:value-type="string">
            <text:p>28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>
            <text:p>trunc7</text:p>
          </table:table-cell>
          <table:table-cell table:style-name="ce72" office:value-type="string">
            <text:p>ok-29</text:p>
          </table:table-cell>
          <table:table-cell table:style-name="ce72" office:value-type="string">
            <text:p>30</text:p>
          </table:table-cell>
          <table:table-cell table:style-name="ce72" office:value-type="string">
            <text:p>31</text:p>
          </table:table-cell>
          <table:table-cell office:value-type="string">
            <text:p>32</text:p>
          </table:table-cell>
          <table:table-cell/>
          <table:table-cell/>
          <table:table-cell/>
          <table:table-cell/>
        </table:table-row>
      </table:table>
      <table:table table:name="gprof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37" table:default-cell-style-name="Default"/>
        <table:table-row table:style-name="ro1">
          <table:table-cell office:value-type="string">
            <text:p>para informações textuais ver info.txt: *** Porque truncagem ocasiona Speedup em Software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# de chamad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ullPelBlockMotionSearch</text:p>
          </table:table-cell>
          <table:table-cell office:value-type="string">
            <text:p>computeSAD</text:p>
          </table:table-cell>
          <table:table-cell office:value-type="string">
            <text:p>computeSAD retorno if true</text:p>
          </table:table-cell>
          <table:table-cell office:value-type="string">
            <text:p>computeSAD retorno if false</text:p>
          </table:table-cell>
          <table:table-cell table:style-name="ce3" office:value-type="string">
            <text:p>somaOK</text:p>
          </table:table-cell>
          <table:table-cell office:value-type="string">
            <text:p>True / todos</text:p>
          </table:table-cell>
          <table:table-cell office:value-type="string">
            <text:p>False / todos</text:p>
          </table:table-cell>
          <table:table-cell office:value-type="string">
            <text:p>(True + False) / todos ok?</text:p>
          </table:table-cell>
        </table:table-row>
        <table:table-row table:style-name="ro1">
          <table:table-cell/>
          <table:table-cell office:value-type="string">
            <text:p>orig</text:p>
          </table:table-cell>
          <table:table-cell table:style-name="ce76" office:value-type="float" office:value="1116225">
            <text:p>1116225.0000</text:p>
          </table:table-cell>
          <table:table-cell table:style-name="ce76" office:value-type="float" office:value="683683368">
            <text:p>683683368.0000</text:p>
          </table:table-cell>
          <table:table-cell table:style-name="ce76" office:value-type="float" office:value="681553361">
            <text:p>681553361.0000</text:p>
          </table:table-cell>
          <table:table-cell table:style-name="ce76" office:value-type="float" office:value="2130007">
            <text:p>2130007.0000</text:p>
          </table:table-cell>
          <table:table-cell table:style-name="ce76" table:formula="of:=([.E4]+[.F4]) - [.D4]" office:value-type="float" office:value="0">
            <text:p>0.0000</text:p>
          </table:table-cell>
          <table:table-cell table:style-name="ce76" table:formula="of:=[.E4]/[.D4]" office:value-type="float" office:value="0.99688451248093">
            <text:p>0.9969</text:p>
          </table:table-cell>
          <table:table-cell table:style-name="ce76" table:formula="of:=[.F4]/[.D4]" office:value-type="float" office:value="0.00311548751907038">
            <text:p>0.0031</text:p>
          </table:table-cell>
          <table:table-cell table:style-name="ce76" table:formula="of:=[.H4]+[.I4]" office:value-type="float" office:value="1">
            <text:p>1.0000</text:p>
          </table:table-cell>
        </table:table-row>
        <table:table-row table:style-name="ro1">
          <table:table-cell/>
          <table:table-cell office:value-type="string">
            <text:p>trunc2</text:p>
          </table:table-cell>
          <table:table-cell table:style-name="ce76" office:value-type="float" office:value="1116225">
            <text:p>1116225.0000</text:p>
          </table:table-cell>
          <table:table-cell table:style-name="ce76" office:value-type="float" office:value="450577326">
            <text:p>450577326.0000</text:p>
          </table:table-cell>
          <table:table-cell table:style-name="ce76" office:value-type="float" office:value="448515725">
            <text:p>448515725.0000</text:p>
          </table:table-cell>
          <table:table-cell table:style-name="ce76" office:value-type="float" office:value="2061601">
            <text:p>2061601.0000</text:p>
          </table:table-cell>
          <table:table-cell table:style-name="ce76" table:formula="of:=([.E5]+[.F5]) - [.D5]" office:value-type="float" office:value="0">
            <text:p>0.0000</text:p>
          </table:table-cell>
          <table:table-cell table:style-name="ce76" table:formula="of:=[.E5]/[.D5]" office:value-type="float" office:value="0.995424534522627">
            <text:p>0.9954</text:p>
          </table:table-cell>
          <table:table-cell table:style-name="ce76" table:formula="of:=[.F5]/[.D5]" office:value-type="float" office:value="0.00457546547737291">
            <text:p>0.0046</text:p>
          </table:table-cell>
          <table:table-cell table:style-name="ce76" table:formula="of:=[.H5]+[.I5]" office:value-type="float" office:value="1">
            <text:p>1.0000</text:p>
          </table:table-cell>
        </table:table-row>
        <table:table-row table:style-name="ro1">
          <table:table-cell/>
          <table:table-cell office:value-type="string">
            <text:p>diff</text:p>
          </table:table-cell>
          <table:table-cell table:style-name="ce76" table:formula="of:=ABS([.C4]-[.C5])" office:value-type="float" office:value="0">
            <text:p>0.0000</text:p>
          </table:table-cell>
          <table:table-cell table:style-name="ce76" table:formula="of:=ABS([.D4]-[.D5])" office:value-type="float" office:value="233106042">
            <text:p>233106042.0000</text:p>
          </table:table-cell>
          <table:table-cell table:style-name="ce76" table:formula="of:=ABS([.E4]-[.E5])" office:value-type="float" office:value="233037636">
            <text:p>233037636.0000</text:p>
          </table:table-cell>
          <table:table-cell table:style-name="ce76" table:formula="of:=ABS([.F4]-[.F5])" office:value-type="float" office:value="68406">
            <text:p>68406.0000</text:p>
          </table:table-cell>
          <table:table-cell table:style-name="ce76" table:formula="of:=ABS([.G4]-[.G5])" office:value-type="float" office:value="0">
            <text:p>0.0000</text:p>
          </table:table-cell>
          <table:table-cell table:style-name="ce76" table:formula="of:=[.E6]/[.D6]" office:value-type="float" office:value="0.999706545572937">
            <text:p>0.9997</text:p>
          </table:table-cell>
          <table:table-cell table:style-name="ce76" table:formula="of:=[.F6]/[.D6]" office:value-type="float" office:value="0.000293454427062856">
            <text:p>0.0003</text:p>
          </table:table-cell>
          <table:table-cell table:style-name="ce76" table:formula="of:=[.H6]+[.I6]" office:value-type="float" office:value="1">
            <text:p>1.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orig/trunc2</text:p>
          </table:table-cell>
          <table:table-cell/>
          <table:table-cell table:style-name="ce76" table:formula="of:=[.D4]/[.D5]" office:value-type="float" office:value="1.51734969460048">
            <text:p>1.5173</text:p>
          </table:table-cell>
          <table:table-cell table:style-name="ce76" table:formula="of:=[.E4]/[.E5]" office:value-type="float" office:value="1.51957517431524">
            <text:p>1.5196</text:p>
          </table:table-cell>
          <table:table-cell table:style-name="ce76" table:formula="of:=[.F4]/[.F5]" office:value-type="float" office:value="1.03318100835225">
            <text:p>1.0332</text:p>
          </table:table-cell>
          <table:table-cell/>
          <table:table-cell table:style-name="ce76" table:formula="of:=[.H4]/[.H5]" office:value-type="float" office:value="1.00146668874201">
            <text:p>1.0015</text:p>
          </table:table-cell>
          <table:table-cell table:style-name="ce76" table:formula="of:=[.I4]/[.I5]" office:value-type="float" office:value="0.680911600027893">
            <text:p>0.6809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77" table:formula="of:=[.H4]/[.I4]" office:value-type="float" office:value="319.977052188091">
            <text:p>319.9771</text:p>
          </table:table-cell>
          <table:table-cell table:style-name="ce76" table:formula="of:=[.I4]*[.H11]" office:value-type="float" office:value="0.99688451248093">
            <text:p>0.9969</text:p>
          </table:table-cell>
          <table:table-cell/>
        </table:table-row>
        <table:table-row table:style-name="ro1">
          <table:table-cell table:number-columns-repeated="7"/>
          <table:table-cell table:style-name="ce77" table:formula="of:=[.H5]/[.I5]" office:value-type="float" office:value="217.55699817763">
            <text:p>217.5570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diff relacao</text:p>
          </table:table-cell>
          <table:table-cell table:style-name="ce76" table:formula="of:=ABS([.H4]-[.H5])" office:value-type="float" office:value="0.00145997795830244">
            <text:p>0.0015</text:p>
          </table:table-cell>
          <table:table-cell table:style-name="ce76" table:formula="of:=ABS([.I4]-[.I5])" office:value-type="float" office:value="0.00145997795830253">
            <text:p>0.00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relação se mantém</text:p>
          </table:table-cell>
          <table:table-cell table:style-name="ce76" table:formula="of:=[.H4]/[.I4]" office:value-type="float" office:value="319.977052188091">
            <text:p>319.9771</text:p>
          </table:table-cell>
          <table:table-cell table:style-name="ce76"/>
          <table:table-cell/>
        </table:table-row>
        <table:table-row table:style-name="ro1">
          <table:table-cell table:number-columns-repeated="7"/>
          <table:table-cell table:style-name="ce3" table:formula="of:=[.H5]/[.I5]" office:value-type="float" office:value="217.55699817763">
            <text:p>217.56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>
            <text:p>Funçã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mputeSA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Variáveis</text:p>
          </table:table-cell>
          <table:table-cell table:style-name="ce1" office:value-type="string">
            <text:p>escop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arquivo</text:p>
          </table:table-cell>
          <table:table-cell table:style-name="ce1" office:value-type="string">
            <text:p>escreve na variáve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_pic</text:p>
          </table:table-cell>
          <table:table-cell office:value-type="string">
            <text:p>parâmetro</text:p>
          </table:table-cell>
          <table:table-cell office:value-type="string">
            <text:p>Imgpel *</text:p>
          </table:table-cell>
          <table:table-cell office:value-type="string">
            <text:p>me_distortion.c</text:p>
          </table:table-cell>
          <table:table-cell office:value-type="string">
            <text:p>ver src_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ock_size_y</text:p>
          </table:table-cell>
          <table:table-cell office:value-type="string">
            <text:p>parâmetro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ock_size_x</text:p>
          </table:table-cell>
          <table:table-cell office:value-type="string">
            <text:p>parâmetro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_mcost</text:p>
          </table:table-cell>
          <table:table-cell office:value-type="string">
            <text:p>parâmetro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d_x</text:p>
          </table:table-cell>
          <table:table-cell office:value-type="string">
            <text:p>parâmetro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d_y</text:p>
          </table:table-cell>
          <table:table-cell office:value-type="string">
            <text:p>parâmetro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cost</text:p>
          </table:table-cell>
          <table:table-cell office:value-type="string">
            <text:p>local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sim, é o retor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string">
            <text:p>local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sim, mas é apenas loc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local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sim, mas é apenas loc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d_size_x</text:p>
          </table:table-cell>
          <table:table-cell office:value-type="string">
            <text:p>local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mg_padded_size_x</text:p>
          </table:table-cell>
          <table:table-cell office:value-type="string">
            <text:p>global</text:p>
          </table:table-cell>
          <table:table-cell office:value-type="string">
            <text:p>int</text:p>
          </table:table-cell>
          <table:table-cell office:value-type="string">
            <text:p>global.h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_line</text:p>
          </table:table-cell>
          <table:table-cell office:value-type="string">
            <text:p>global no arquivo .c</text:p>
          </table:table-cell>
          <table:table-cell office:value-type="string">
            <text:p>Imgpel *</text:p>
          </table:table-cell>
          <table:table-cell office:value-type="string">
            <text:p>me_distortion.c</text:p>
          </table:table-cell>
          <table:table-cell office:value-type="string">
            <text:p>apenas modifica o ponteir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f_line</text:p>
          </table:table-cell>
          <table:table-cell office:value-type="string">
            <text:p>global no arquivo .c</text:p>
          </table:table-cell>
          <table:table-cell office:value-type="string">
            <text:p>Imgpel *</text:p>
          </table:table-cell>
          <table:table-cell office:value-type="string">
            <text:p>me_distortion.c</text:p>
          </table:table-cell>
          <table:table-cell office:value-type="string">
            <text:p>apenas modifica o ponteir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t_line</text:p>
          </table:table-cell>
          <table:table-cell office:value-type="string">
            <text:p>global</text:p>
          </table:table-cell>
          <table:table-cell office:value-type="string">
            <text:p>array de ponteiro para função. Tamanho 2</text:p>
          </table:table-cell>
          <table:table-cell office:value-type="string">
            <text:p>me_distortion.c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f_access_method</text:p>
          </table:table-cell>
          <table:table-cell office:value-type="string">
            <text:p>global</text:p>
          </table:table-cell>
          <table:table-cell office:value-type="string">
            <text:p>int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f_pic_sub</text:p>
          </table:table-cell>
          <table:table-cell office:value-type="string">
            <text:p>global</text:p>
          </table:table-cell>
          <table:table-cell office:value-type="string">
            <text:p>SubImageContainer</text:p>
          </table:table-cell>
          <table:table-cell office:value-type="string">
            <text:p>me_distortion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f_pic_sub.luma</text:p>
          </table:table-cell>
          <table:table-cell office:value-type="string">
            <text:p>campo de global</text:p>
          </table:table-cell>
          <table:table-cell/>
          <table:table-cell office:value-type="string">
            <text:p>-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yte_abs</text:p>
          </table:table-cell>
          <table:table-cell office:value-type="string">
            <text:p>global</text:p>
          </table:table-cell>
          <table:table-cell office:value-type="string">
            <text:p>Int *</text:p>
          </table:table-cell>
          <table:table-cell office:value-type="string">
            <text:p>mv-search.c</text:p>
          </table:table-cell>
          <table:table-cell office:value-type="string">
            <text:p>nã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romaMEEnable</text:p>
          </table:table-cell>
          <table:table-cell table:number-columns-repeated="3"/>
          <table:table-cell office:value-type="string">
            <text:p>não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escreve em variável global?</text:p>
          </table:table-cell>
          <table:table-cell office:value-type="string">
            <text:p>modifica os parâmtros?</text:p>
          </table:table-cell>
          <table:table-cell table:number-columns-repeated="2"/>
        </table:table-row>
        <table:table-row table:style-name="ro1">
          <table:table-cell office:value-type="string">
            <text:p>get_line</text:p>
          </table:table-cell>
          <table:table-cell office:value-type="string">
            <text:p>FastLine4X</text:p>
          </table:table-cell>
          <table:table-cell table:number-columns-repeated="3"/>
          <table:table-cell office:value-type="string">
            <text:p>refbuf.c</text:p>
          </table:table-cell>
          <table:table-cell office:value-type="string">
            <text:p>não</text:p>
          </table:table-cell>
          <table:table-cell office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>
            <text:p>get_line</text:p>
          </table:table-cell>
          <table:table-cell office:value-type="string">
            <text:p>UMVLine4X</text:p>
          </table:table-cell>
          <table:table-cell table:number-columns-repeated="3"/>
          <table:table-cell office:value-type="string">
            <text:p>refbuf.c</text:p>
          </table:table-cell>
          <table:table-cell office:value-type="string">
            <text:p>não</text:p>
          </table:table-cell>
          <table:table-cell office:value-type="string">
            <text:p>não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Funçã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ullPelBlockMotionSearch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Variáveis</text:p>
          </table:table-cell>
          <table:table-cell table:style-name="ce1" office:value-type="string">
            <text:p>escop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arquivo</text:p>
          </table:table-cell>
          <table:table-cell table:style-name="ce1" office:value-type="string">
            <text:p>escreve na variáve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_mcost</text:p>
          </table:table-cell>
          <table:table-cell office:value-type="string">
            <text:p>parâmetro e retorno</text:p>
          </table:table-cell>
          <table:table-cell office:value-type="string">
            <text:p>int</text:p>
          </table:table-cell>
          <table:table-cell office:value-type="string">
            <text:p>me_fullsearch.c</text:p>
          </table:table-cell>
          <table:table-cell office:value-type="string">
            <text:p>sim, é o retorno</text:p>
          </table:table-cell>
          <table:table-cell office:value-type="string">
            <text:p>min_mcost = mcost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cost</text:p>
          </table:table-cell>
          <table:table-cell office:value-type="string">
            <text:p>local</text:p>
          </table:table-cell>
          <table:table-cell office:value-type="string">
            <text:p>int</text:p>
          </table:table-cell>
          <table:table-cell office:value-type="string">
            <text:p>me_fullsearch.c</text:p>
          </table:table-cell>
          <table:table-cell office:value-type="string">
            <text:p>sim, mas é apenas local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P0" style:volatile="true">
      <number:number number:decimal-places="3" number:min-integer-digits="1"/>
    </number:number-style>
    <number:number-style style:name="N119">
      <style:text-properties fo:color="#ff0000"/>
      <number:text>-</number:text>
      <number:number number:decimal-places="3" number:min-integer-digits="1"/>
      <style:map style:condition="value()&gt;=0" style:apply-style-name="N119P0"/>
    </number:number-style>
    <number:number-style style:name="N120">
      <number:number number:decimal-places="0" number:min-integer-digits="3"/>
    </number:number-style>
    <number:number-style style:name="N121">
      <number:number number:decimal-places="3" number:min-integer-digits="0"/>
    </number:number-style>
    <number:number-style style:name="N122">
      <number:number number:decimal-places="20" number:min-integer-digits="1"/>
    </number:number-style>
    <number:number-style style:name="N123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0/19/2010</text:date>, <text:time>19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5T12:10:09</meta:creation-date>
    <meta:generator>OpenOffice.org/3.2$Linux OpenOffice.org_project/320m12$Build-9483</meta:generator>
    <dc:date>2010-10-19T19:46:09</dc:date>
    <meta:editing-duration>PT62H35M22S</meta:editing-duration>
    <meta:editing-cycles>823</meta:editing-cycles>
    <dc:creator>mateus </dc:creator>
    <meta:document-statistic meta:table-count="14" meta:cell-count="2545" meta:object-count="0"/>
    <meta:user-defined meta:name="Info 1"/>
    <meta:user-defined meta:name="Info 2"/>
    <meta:user-defined meta:name="Info 3"/>
    <meta:user-defined meta:name="Info 4"/>
  </office:meta>
</office:document-meta>
</file>