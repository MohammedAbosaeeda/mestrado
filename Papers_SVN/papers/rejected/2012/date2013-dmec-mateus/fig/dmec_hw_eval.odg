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none" draw:fill-color="#ffffff" draw:textarea-horizontal-align="justify" draw:textarea-vertical-align="top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-width="0.275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top" draw:auto-grow-height="false" fo:padding-top="0.05cm" fo:padding-bottom="0.05cm" fo:padding-left="0.05cm" fo:padding-right="0.05cm"/>
    </style:style>
    <style:style style:name="gr5" style:family="graphic" style:parent-style-name="standard">
      <style:graphic-properties draw:stroke="none"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1cm" draw:marker-start="Arrow" draw:marker-start-width="0.25cm" draw:marker-end="Arrow" draw:marker-end-width="0.2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marker-start="" draw:marker-start-width="0.25cm" draw:marker-end="Arrow" draw:marker-end-width="0.2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marker-start="Arrow" draw:marker-start-width="0.25cm" draw:marker-end="" draw:marker-end-width="0.2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draw:fill="none" fo:min-height="0.443cm"/>
    </style:style>
    <style:style style:name="gr10" style:family="graphic" style:parent-style-name="standard">
      <style:graphic-properties svg:stroke-width="0.051cm" draw:marker-start-width="0.276cm" draw:marker-end-width="0.276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draw:marker-start-width="0.276cm" draw:marker-end-width="0.276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draw:stroke="none" draw:fill="none" fo:min-height="0.927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vertical-align="middle" draw:auto-grow-width="true" fo:min-height="0.884cm" fo:padding-top="0cm" fo:padding-bottom="0cm" fo:padding-left="0cm" fo:padding-right="0cm"/>
    </style:style>
    <style:style style:name="gr14" style:family="graphic" style:parent-style-name="standard">
      <style:graphic-properties svg:stroke-width="0.05cm" draw:marker-start-width="0.275cm" draw:marker-end-width="0.275cm" draw:fill="none" draw:fill-color="#ffffff" draw:textarea-horizontal-align="justify" draw:textarea-vertical-align="top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cm" fo:min-width="0cm" fo:padding-top="0cm" fo:padding-bottom="0cm" fo:padding-left="0cm" fo:padding-right="0cm"/>
    </style:style>
    <style:style style:name="P1" style:family="paragraph">
      <style:paragraph-properties fo:text-align="center"/>
      <style:text-properties fo:font-family="Helvetica" style:font-family-generic="swiss" fo:font-size="10pt" fo:font-weight="normal" style:font-size-asian="10pt" style:font-weight-asian="normal" style:font-size-complex="10pt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family="Helvetica" style:font-family-generic="swiss"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center"/>
      <style:text-properties fo:font-family="Helvetica" style:font-family-generic="swiss" fo:font-size="10pt" style:font-size-asian="10pt" style:font-size-complex="10pt"/>
    </style:style>
    <style:style style:name="P6" style:family="paragraph">
      <style:paragraph-properties fo:margin-left="0cm" fo:margin-right="0cm" fo:margin-top="0.1cm" fo:margin-bottom="0.1cm" fo:line-height="100%" fo:text-align="end" fo:text-indent="0cm"/>
    </style:style>
    <style:style style:name="P7" style:family="paragraph">
      <style:paragraph-properties fo:text-align="end"/>
      <style:text-properties fo:font-family="Helvetica" style:font-family-generic="swiss" fo:font-size="8pt" style:font-size-asian="8pt" style:font-size-complex="8pt"/>
    </style:style>
    <style:style style:name="T1" style:family="text">
      <style:text-properties fo:font-family="Helvetica" style:font-family-generic="swiss"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family="Helvetica" style:font-family-generic="swiss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family="Helvetica" style:font-family-generic="swis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4" style:family="text">
      <style:text-properties style:use-window-font-color="true" style:text-outline="false" style:text-line-through-style="none" fo:font-family="Helvetica" style:font-family-generic="swiss" fo:font-size="8pt" fo:font-style="normal" fo:text-shadow="none" style:text-underline-style="none" fo:font-weight="normal" style:letter-kerning="true" style:font-family-asian="'DejaVu Sans'" style:font-family-generic-asian="system" style:font-pitch-asian="variable" style:font-size-asian="8pt" style:font-style-asian="normal" style:font-weight-asian="normal" style:font-family-complex="'DejaVu Sans'" style:font-family-generic-complex="system" style:font-pitch-complex="variable" style:font-size-complex="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9.419cm" svg:height="7.919cm" svg:x="14.032cm" svg:y="4.14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1" draw:layer="layout" svg:width="8.451cm" svg:height="4.901cm" svg:x="14.714cm" svg:y="4.586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3" draw:text-style-name="P1" draw:layer="layout" svg:width="8cm" svg:height="0.82cm" svg:x="14.985cm" svg:y="5.496cm">
                  <text:p text:style-name="P2"><text:span text:style-name="T1">Internal memory</text:span></text:p>
                  <draw:enhanced-geometry svg:viewBox="0 0 21600 21600" draw:type="rectangle" draw:enhanced-path="M 0 0 L 21600 0 21600 21600 0 21600 0 0 Z N"/>
                </draw:custom-shape>
                <draw:g>
                  <draw:custom-shape draw:style-name="gr3" draw:text-style-name="P1" draw:id="id1" draw:layer="layout" svg:width="1.56cm" svg:height="1.79cm" svg:x="14.985cm" svg:y="7.191cm">
                    <text:p text:style-name="P2"><text:span text:style-name="T1">Controller</text:span></text:p>
                    <text:p text:style-name="P2"><text:span text:style-name="T1">FSM</text:span></text:p>
                    <draw:enhanced-geometry svg:viewBox="0 0 21600 21600" draw:type="rectangle" draw:enhanced-path="M 0 0 L 21600 0 21600 21600 0 21600 0 0 Z N"/>
                  </draw:custom-shape>
                  <draw:g draw:id="id2">
                    <draw:custom-shape draw:style-name="gr4" draw:text-style-name="P1" draw:layer="layout" svg:width="5.582cm" svg:height="1.791cm" svg:x="17.4cm" svg:y="7.191cm">
                      <text:p text:style-name="P2"><text:span text:style-name="T1">Core</text:span></text:p>
                      <draw:enhanced-geometry svg:viewBox="0 0 21600 21600" draw:type="rectangle" draw:enhanced-path="M 0 0 L 21600 0 21600 21600 0 21600 0 0 Z N"/>
                    </draw:custom-shape>
                    <draw:g>
                      <draw:custom-shape draw:style-name="gr3" draw:text-style-name="P1" draw:layer="layout" svg:width="1.613cm" svg:height="0.992cm" svg:x="17.647cm" svg:y="7.811cm">
                        <text:p text:style-name="P2"><text:span text:style-name="T1">Worker 0</text:span></text:p>
                        <draw:enhanced-geometry svg:viewBox="0 0 21600 21600" draw:type="rectangle" draw:enhanced-path="M 0 0 L 21600 0 21600 21600 0 21600 0 0 Z N"/>
                      </draw:custom-shape>
                      <draw:custom-shape draw:style-name="gr3" draw:text-style-name="P1" draw:layer="layout" svg:width="1.613cm" svg:height="0.992cm" svg:x="19.44cm" svg:y="7.811cm">
                        <text:p text:style-name="P2"><text:span text:style-name="T1">Worker 1</text:span></text:p>
                        <draw:enhanced-geometry svg:viewBox="0 0 21600 21600" draw:type="rectangle" draw:enhanced-path="M 0 0 L 21600 0 21600 21600 0 21600 0 0 Z N"/>
                      </draw:custom-shape>
                      <draw:custom-shape draw:style-name="gr5" draw:text-style-name="P1" draw:layer="layout" svg:width="1.613cm" svg:height="0.992cm" svg:x="21.201cm" svg:y="7.811cm">
                        <text:p text:style-name="P2"><text:span text:style-name="T1">. . .</text:span></text:p>
                        <draw:enhanced-geometry svg:viewBox="0 0 21600 21600" draw:type="rectangle" draw:enhanced-path="M 0 0 L 21600 0 21600 21600 0 21600 0 0 Z N"/>
                      </draw:custom-shape>
                    </draw:g>
                  </draw:g>
                  <draw:connector draw:style-name="gr6" draw:text-style-name="P2" draw:layer="layout" draw:type="line" svg:x1="16.545cm" svg:y1="8.086cm" svg:x2="17.4cm" svg:y2="8.086cm" draw:start-shape="id1" draw:start-glue-point="1" draw:end-shape="id2" draw:end-glue-point="3" svg:d="m16545 8086h855">
                    <text:p/>
                  </draw:connector>
                </draw:g>
                <draw:connector draw:style-name="gr6" draw:text-style-name="P2" draw:layer="layout" draw:type="line" svg:x1="15.785cm" svg:y1="6.317cm" svg:x2="15.783cm" svg:y2="7.192cm" svg:d="m15785 6317-2 875">
                  <text:p/>
                </draw:connector>
                <draw:connector draw:style-name="gr6" draw:text-style-name="P2" draw:layer="layout" draw:type="line" svg:x1="20.085cm" svg:y1="6.318cm" svg:x2="20.083cm" svg:y2="7.193cm" svg:d="m20085 6318-2 875">
                  <text:p/>
                </draw:connector>
              </draw:g>
              <draw:g>
                <draw:line draw:style-name="gr7" draw:text-style-name="P2" draw:layer="layout" svg:x1="15.13cm" svg:y1="10.005cm" svg:x2="15.142cm" svg:y2="8.976cm">
                  <text:p/>
                </draw:line>
                <draw:line draw:style-name="gr8" draw:text-style-name="P2" draw:layer="layout" svg:x1="16.005cm" svg:y1="10.005cm" svg:x2="16.017cm" svg:y2="8.976cm">
                  <text:p/>
                </draw:line>
                <draw:line draw:style-name="gr7" draw:text-style-name="P2" draw:layer="layout" svg:x1="15.567cm" svg:y1="10.005cm" svg:x2="15.579cm" svg:y2="8.976cm">
                  <text:p/>
                </draw:line>
                <draw:line draw:style-name="gr8" draw:text-style-name="P2" draw:layer="layout" svg:x1="16.442cm" svg:y1="10.005cm" svg:x2="16.454cm" svg:y2="8.976cm">
                  <text:p/>
                </draw:line>
              </draw:g>
              <draw:frame draw:style-name="gr9" draw:text-style-name="P3" draw:layer="layout" svg:width="1.535cm" svg:height="0.708cm" svg:x="18.204cm" svg:y="4.682cm">
                <draw:text-box>
                  <text:p text:style-name="P2"><text:span text:style-name="T2">DMEC</text:span></text:p>
                </draw:text-box>
              </draw:frame>
            </draw:g>
            <draw:custom-shape draw:style-name="gr10" draw:text-style-name="P4" draw:layer="layout" svg:width="2.416cm" svg:height="0.728cm" svg:x="14.649cm" svg:y="10.008cm">
              <text:p text:style-name="P2"><text:span text:style-name="T2">AXI4 adapter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1" draw:text-style-name="P5" draw:layer="layout" svg:width="2.485cm" svg:height="2.825cm" draw:transform="rotate (-1.57079632679579) translate (17.195cm 10.792cm)">
                <text:p/>
                <draw:enhanced-geometry svg:viewBox="0 0 21600 21600" draw:mirror-horizontal="false" draw:mirror-vertical="false" draw:text-areas="?f5 ?f1 ?f6 ?f3" draw:type="left-right-arrow" draw:modifiers="5715.3568853641 4447.66444232602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frame draw:style-name="gr12" draw:text-style-name="P3" draw:layer="layout" svg:width="1.85cm" svg:height="0.927cm" svg:x="14.877cm" svg:y="11.605cm">
                <draw:text-box>
                  <text:p text:style-name="P2"><text:span text:style-name="T2">AXI4 bus</text:span></text:p>
                  <text:p text:style-name="P2"><text:span text:style-name="T2">model</text:span></text:p>
                </draw:text-box>
              </draw:frame>
            </draw:g>
            <draw:frame draw:style-name="gr13" draw:text-style-name="P2" draw:layer="layout" svg:width="4.151cm" svg:height="0.884cm" svg:x="18.454cm" svg:y="10.418cm">
              <draw:text-box>
                <text:p text:style-name="P2"><text:span text:style-name="T1">SystemC simulation kernel</text:span></text:p>
              </draw:text-box>
            </draw:frame>
            <draw:g>
              <draw:custom-shape draw:style-name="gr14" draw:text-style-name="P1" draw:layer="layout" svg:width="5.655cm" svg:height="2.761cm" svg:x="12.995cm" svg:y="13.348cm">
                <text:p text:style-name="P1"/>
                <text:p text:style-name="P1"/>
                <text:p text:style-name="P1"/>
                <text:p text:style-name="P1"/>
                <text:p text:style-name="P1">Evaluation infrastructure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4.28cm" svg:height="1.043cm" svg:x="13.682cm" svg:y="13.536cm">
                <text:p text:style-name="P2"><text:span text:style-name="T3">&lt;&lt;interface&gt;&gt;</text:span></text:p>
                <text:p text:style-name="P2"><text:span text:style-name="T2">PictureMotionEstimator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frame draw:style-name="gr15" draw:text-style-name="P7" draw:layer="layout" svg:width="1.496cm" svg:height="1.725cm" svg:x="28.5cm" svg:y="4.854cm">
          <draw:text-box>
            <text:p text:style-name="P6"><text:span text:style-name="T4">input_data</text:span></text:p>
            <text:p text:style-name="P6"><text:span text:style-name="T4">input_rdy</text:span></text:p>
            <text:p text:style-name="P6"><text:span text:style-name="T4">output_data</text:span></text:p>
            <text:p text:style-name="P6"><text:span text:style-name="T4">output_rd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iago Mück</meta:initial-creator>
    <meta:creation-date>2011-01-28T14:48:19</meta:creation-date>
    <dc:date>2012-06-25T16:53:24</dc:date>
    <meta:editing-duration>PT14H55M12S</meta:editing-duration>
    <meta:editing-cycles>123</meta:editing-cycles>
    <meta:generator>OpenOffice.org/3.0$Linux OpenOffice.org_project/300m15$Build-9379</meta:generator>
    <meta:print-date>2011-08-20T15:00:02</meta:print-date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