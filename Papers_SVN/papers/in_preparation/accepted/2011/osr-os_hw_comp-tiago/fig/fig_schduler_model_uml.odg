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cm" draw:marker-start="StrokedTriangle" draw:marker-start-width="0.305cm" draw:marker-end-width="0.305cm" draw:textarea-horizontal-align="center" draw:textarea-vertical-align="bottom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5cm" svg:height="1cm" svg:x="7.35cm" svg:y="8.35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g>
          <draw:glue-point draw:id="4" svg:x="-0.294cm" svg:y="4.5cm"/>
          <draw:glue-point draw:id="5" svg:x="-0.294cm" svg:y="2.916cm"/>
          <draw:custom-shape draw:style-name="gr1" draw:text-style-name="P2" draw:layer="layout" svg:width="5.55cm" svg:height="1cm" svg:x="14.55cm" svg:y="6.4cm">
            <text:p text:style-name="P1"><text:span text:style-name="T1">Schedul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5.55cm" svg:height="3.9cm" svg:x="14.55cm" svg:y="7.4cm">
            <text:p text:style-name="P3"><text:span text:style-name="T2">+ insert(thr: Thread)</text:span></text:p>
            <text:p text:style-name="P3"><text:span text:style-name="T2">+ remove(thr: Thread): Thread</text:span></text:p>
            <text:p text:style-name="P3"><text:span text:style-name="T2">+ suspend(thr: Thread)</text:span></text:p>
            <text:p text:style-name="P3"><text:span text:style-name="T2">+ remove(thr: Thread)</text:span></text:p>
            <text:p text:style-name="P3"><text:span text:style-name="T2">+ chosen(): Thread</text:span></text:p>
            <text:p text:style-name="P3"><text:span text:style-name="T2">+ choose(): Thread</text:span></text:p>
            <text:p text:style-name="P3"><text:span text:style-name="T2">+ choose(Thread): Thread</text:span></text:p>
            <text:p text:style-name="P3"><text:span text:style-name="T2">+ choose_another(): Thread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5" draw:layer="layout" svg:x1="12.25cm" svg:y1="12.2cm" svg:x2="7.536cm" svg:y2="13.294cm" draw:start-shape="id1" draw:start-glue-point="2" draw:end-shape="id2" draw:end-glue-point="0" svg:d="m12250 12200v547h-4714v547">
          <text:p/>
        </draw:connector>
        <draw:g draw:id="id1">
          <draw:glue-point draw:id="4" svg:x="-0.294cm" svg:y="4.5cm"/>
          <draw:glue-point draw:id="5" svg:x="-0.294cm" svg:y="2.916cm"/>
          <draw:custom-shape draw:style-name="gr1" draw:text-style-name="P2" draw:layer="layout" svg:width="3.5cm" svg:height="1cm" svg:x="10.5cm" svg:y="10.3cm">
            <text:p text:style-name="P1"><text:span text:style-name="T1">SchedulingCriteri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.5cm" svg:height="0.9cm" svg:x="10.5cm" svg:y="11.3cm">
            <text:p text:style-name="P3"><text:span text:style-name="T2">+ operator int()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5" draw:layer="layout" svg:x1="12.25cm" svg:y1="12.2cm" svg:x2="14.627cm" svg:y2="13.295cm" draw:start-shape="id1" draw:start-glue-point="2" draw:end-shape="id3" draw:end-glue-point="0" svg:d="m12250 12200v548h2377v547">
          <text:p/>
        </draw:connector>
        <draw:connector draw:style-name="gr2" draw:text-style-name="P5" draw:layer="layout" svg:x1="12.25cm" svg:y1="12.2cm" svg:x2="12.264cm" svg:y2="13.296cm" draw:start-shape="id1" draw:start-glue-point="2" draw:end-shape="id4" draw:end-glue-point="0" svg:d="m12250 12200v548h14v548">
          <text:p/>
        </draw:connector>
        <draw:connector draw:style-name="gr2" draw:text-style-name="P5" draw:layer="layout" svg:x1="12.25cm" svg:y1="12.2cm" svg:x2="9.9cm" svg:y2="13.296cm" draw:start-shape="id1" draw:start-glue-point="2" draw:end-shape="id5" draw:end-glue-point="0" svg:d="m12250 12200v548h-2350v548">
          <text:p/>
        </draw:connector>
        <draw:connector draw:style-name="gr3" draw:text-style-name="P1" draw:id="id6" draw:layer="layout" svg:x1="9.925cm" svg:y1="8.85cm" svg:x2="14.575cm" svg:y2="8.85cm" svg:d="m9925 8850h4650">
          <text:p/>
        </draw:connector>
        <draw:connector draw:style-name="gr4" draw:text-style-name="P1" draw:layer="layout" svg:x1="12.25cm" svg:y1="10.3cm" svg:x2="12.25cm" svg:y2="8.85cm" draw:start-shape="id1" draw:start-glue-point="0" draw:end-shape="id6" draw:end-glue-point="0" svg:d="m12250 10300v-1450">
          <text:p/>
        </draw:connector>
        <draw:frame draw:style-name="gr5" draw:text-style-name="P6" draw:layer="layout" svg:width="1.006cm" svg:height="0.692cm" svg:x="9.8cm" svg:y="8.3cm">
          <draw:text-box>
            <text:p><text:span text:style-name="T2">1..*</text:span></text:p>
          </draw:text-box>
        </draw:frame>
        <draw:frame draw:style-name="gr5" draw:text-style-name="P6" draw:layer="layout" svg:width="0.697cm" svg:height="0.692cm" svg:x="13.8cm" svg:y="8.3cm">
          <draw:text-box>
            <text:p><text:span text:style-name="T2">1</text:span></text:p>
          </draw:text-box>
        </draw:frame>
        <draw:custom-shape draw:style-name="gr1" draw:text-style-name="P2" draw:id="id2" draw:layer="layout" svg:width="2.2cm" svg:height="1.2cm" svg:x="6.436cm" svg:y="13.294cm">
          <text:p text:style-name="P1"><text:span text:style-name="T1">First-come, </text:span></text:p>
          <text:p text:style-name="P1"><text:span text:style-name="T1">first-serv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.21cm" svg:height="1.194cm" svg:x="8.795cm" svg:y="13.296cm">
          <text:p text:style-name="P1"><text:span text:style-name="T1">Round</text:span></text:p>
          <text:p text:style-name="P1"><text:span text:style-name="T1">Ro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2.21cm" svg:height="1.194cm" svg:x="11.159cm" svg:y="13.296cm">
          <text:p text:style-name="P1"><text:span text:style-name="T1">Prior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.21cm" svg:height="1.194cm" svg:x="13.522cm" svg:y="13.295cm">
          <text:p text:style-name="P1"><text:span text:style-name="T1">Earliest</text:span></text:p>
          <text:p text:style-name="P1"><text:span text:style-name="T1">deadline firs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7" draw:layer="layout" svg:width="2.21cm" svg:height="1.194cm" svg:x="15.886cm" svg:y="13.294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2.25cm" svg:y1="12.2cm" svg:x2="16.991cm" svg:y2="13.294cm" draw:start-shape="id1" draw:start-glue-point="2" draw:end-shape="id7" draw:end-glue-point="0" svg:d="m12250 12200v560h4741v5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trokedTriangle" svg:viewBox="0 0 100 100" svg:d="m0 100 50-100 50 96h-4l-46-92-46 92h96v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9-28T13:16:50</dc:date>
    <meta:editing-duration>PT02H39M33S</meta:editing-duration>
    <meta:editing-cycles>27</meta:editing-cycles>
    <meta:generator>OpenOffice.org/3.0$Linux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