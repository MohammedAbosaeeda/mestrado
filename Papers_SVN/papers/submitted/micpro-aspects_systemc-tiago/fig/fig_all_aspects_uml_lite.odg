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76cm" svg:stroke-color="#808080" draw:marker-start-width="0.313cm" draw:marker-end-width="0.313cm" draw:fill="none" draw:textarea-horizontal-align="justify" draw:textarea-vertical-align="middle" draw:auto-grow-height="false" fo:padding-top="0.162cm" fo:padding-bottom="0.162cm" fo:padding-left="0.287cm" fo:padding-right="0.287cm"/>
    </style:style>
    <style:style style:name="gr2" style:family="graphic" style:parent-style-name="standard" style:list-style-name="L1">
      <style:graphic-properties draw:stroke="dash" draw:stroke-dash="Dashed_20__28_var_29_" svg:stroke-width="0.076cm" svg:stroke-color="#808080" draw:marker-start="" draw:marker-start-width="0.314cm" draw:marker-start-center="false" draw:marker-end="" draw:marker-end-width="0.314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svg:stroke-width="0.102cm" svg:stroke-color="#ffffff" draw:marker-start="" draw:marker-start-width="0.353cm" draw:marker-start-center="false" draw:marker-end="" draw:marker-end-width="0.353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6cm" fo:padding-bottom="0.176cm" fo:padding-left="0.301cm" fo:padding-right="0.3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Ultrafine_20_Dashed"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 style:protect="size"/>
    </style:style>
    <style:style style:name="gr7" style:family="graphic" style:parent-style-name="standard">
      <style:graphic-properties svg:stroke-width="0.051cm" draw:marker-start="Arrowheads_20_1" draw:marker-start-width="0.38cm" draw:marker-end-width="0.276cm" draw:textarea-horizontal-align="center" draw:textarea-vertical-align="botto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88cm" fo:min-width="2.5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59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margin-top="0.1cm" fo:margin-bottom="0.1cm" fo:line-height="100%" fo:text-align="start" fo:text-indent="0cm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fo:font-family="Helvetica" style:font-family-generic="swiss"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Helvetica" style:font-family-generic="swiss" fo:font-size="10pt" style:font-size-asian="10pt" style:font-size-complex="10pt"/>
    </style:style>
    <style:style style:name="P8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fo:color="#808080" fo:font-family="Helvetica" style:font-family-generic="swiss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4" style:family="text">
      <style:text-properties fo:font-family="Helvetica" style:font-family-generic="swiss" fo:font-size="10pt" style:font-size-asian="10pt" style:font-size-complex="10pt"/>
    </style:style>
    <style:style style:name="T5" style:family="text">
      <style:text-properties fo:color="#808080" fo:font-family="Helvetica" style:font-family-generic="swiss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86cm" svg:height="4.475cm" svg:x="6.053cm" svg:y="2.966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2" draw:layer="layout" svg:width="22.289cm" svg:height="4.649cm" svg:x="6.482cm" svg:y="7.97cm" svg:viewBox="0 0 22290 4650" svg:d="m0 4650c0-1026 0-2051 0-3077 7430 0 14860 0 22290 0 0 1026 0 2051 0 3077-7430 0-14860 0-22290 0zm15618-3087c0-521 0-1042 0-1563 2224 0 4448 0 6672 0 0 521 0 1042 0 1563-2224 0-4448 0-6672 0z">
            <text:p/>
          </draw:path>
          <draw:custom-shape draw:style-name="gr3" draw:text-style-name="P2" draw:layer="layout" svg:width="6.523cm" svg:height="0.858cm" svg:x="22.184cm" svg:y="9.0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7.139cm" svg:height="0.635cm" svg:x="14.437cm" svg:y="3.61cm">
            <text:p text:style-name="P1"><text:span text:style-name="T1">Trace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.145cm" svg:height="2.991cm" svg:x="14.437cm" svg:y="4.245cm">
            <text:p text:style-name="P4"><text:span text:style-name="T2">+invoc_return_in : sc_in&lt;bool&gt; </text:span></text:p>
            <text:p text:style-name="P4"><text:span text:style-name="T3">+operation_in : </text:span></text:p>
            <text:p text:style-name="P4"><text:span text:style-name="T3"><text:s text:c="4"/></text:span><text:span text:style-name="T2">sc_in&lt;sc_uint&lt;OPERATION_SIZE&gt;&gt;</text:span></text:p>
            <text:p text:style-name="P4"><text:span text:style-name="T3">+param_return_in : </text:span></text:p>
            <text:p text:style-name="P4"><text:span text:style-name="T3"><text:s text:c="4"/></text:span><text:span text:style-name="T2">sc_in&lt;sc_uint&lt;PARAM_RETURN_SIZ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7" draw:layer="layout" svg:width="4.903cm" svg:height="1cm" svg:x="18.678cm" svg:y="3.073cm">
          <text:p text:style-name="P6"><text:span text:style-name="T4">OPERATION_SIZE : int</text:span></text:p>
          <text:p text:style-name="P1"><text:span text:style-name="T4">PARAM_RETURN_SIZE : int</text:span></text:p>
          <draw:enhanced-geometry svg:viewBox="0 0 21600 21600" draw:type="rectangle" draw:enhanced-path="M 0 0 L 21600 0 21600 21600 0 21600 0 0 Z N"/>
        </draw:custom-shape>
        <draw:g draw:id="id5">
          <draw:glue-point draw:id="4" svg:x="-0.87cm" svg:y="-3.697cm"/>
          <draw:glue-point draw:id="5" svg:x="-0.872cm" svg:y="-3.202cm"/>
          <draw:glue-point draw:id="6" svg:x="-0.936cm" svg:y="4.926cm"/>
          <draw:glue-point draw:id="7" svg:x="-1.105cm" svg:y="5.073cm"/>
          <draw:g>
            <draw:custom-shape draw:style-name="gr4" draw:text-style-name="P3" draw:layer="layout" svg:width="6.228cm" svg:height="0.635cm" svg:x="6.389cm" svg:y="4.856cm">
              <text:p text:style-name="P1"><text:span text:style-name="T1">Profiled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6.219cm" svg:height="1.715cm" svg:x="6.389cm" svg:y="5.491cm">
              <text:p text:style-name="P4"><text:span text:style-name="T2">+start_stop_in : sc_in&lt;bool&gt; </text:span></text:p>
              <text:p text:style-name="P4"><text:span text:style-name="T3">+operation_in : </text:span></text:p>
              <text:p text:style-name="P4"><text:span text:style-name="T3"><text:s text:c="4"/></text:span><text:span text:style-name="T2">sc_in&lt;sc_uint&lt;OPERATION_SIZE&gt;&gt;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8" draw:layer="layout" svg:width="3.981cm" svg:height="1cm" svg:x="10.267cm" svg:y="4.253cm">
            <text:p text:style-name="P6"><text:span text:style-name="T4">OPERATION_SIZE : int</text:span></text:p>
            <text:p text:style-name="P6"><text:span text:style-name="T4">PRECISION : int</text:span></text:p>
            <draw:enhanced-geometry svg:viewBox="0 0 21600 21600" draw:type="rectangle" draw:enhanced-path="M 0 0 L 21600 0 21600 21600 0 21600 0 0 Z N"/>
          </draw:custom-shape>
        </draw:g>
        <draw:g draw:id="id6">
          <draw:glue-point draw:id="4" svg:x="-0.872cm" svg:y="-4.03cm"/>
          <draw:glue-point draw:id="5" svg:x="-0.619cm" svg:y="-3.901cm"/>
          <draw:glue-point draw:id="6" svg:x="-0.776cm" svg:y="5.032cm"/>
          <draw:g>
            <draw:custom-shape draw:style-name="gr4" draw:text-style-name="P3" draw:layer="layout" svg:width="5.37cm" svg:height="0.635cm" svg:x="22.141cm" svg:y="5.574cm">
              <text:p text:style-name="P1"><text:span text:style-name="T1">Watch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5" draw:layer="layout" svg:width="5.379cm" svg:height="1cm" svg:x="22.141cm" svg:y="6.209cm">
              <text:p text:style-name="P4"><text:span text:style-name="T3">+state_in :</text:span></text:p>
              <text:p text:style-name="P4"><text:span text:style-name="T3"><text:s text:c="4"/></text:span><text:span text:style-name="T2">sc_in&lt;sc_uint&lt;STATE_SIZ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" draw:text-style-name="P7" draw:layer="layout" svg:width="3.073cm" svg:height="0.5cm" svg:x="25.621cm" svg:y="5.309cm">
            <text:p text:style-name="P6"><text:span text:style-name="T4">STATE_SIZE 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">
          <draw:custom-shape draw:style-name="gr4" draw:text-style-name="P3" draw:layer="layout" svg:width="3.235cm" svg:height="0.635cm" svg:x="16.392cm" svg:y="8.145cm">
            <text:p text:style-name="P1"><text:span text:style-name="T1">Aspect_Common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9" draw:layer="layout" svg:x1="16.392cm" svg:y1="8.462cm" svg:x2="9.439cm" svg:y2="10.014cm" draw:start-shape="id1" draw:start-glue-point="3" draw:end-shape="id2" draw:end-glue-point="0" svg:d="m16392 8462h-6953v1552">
          <text:p/>
        </draw:connector>
        <draw:g draw:id="id4">
          <draw:custom-shape draw:style-name="gr4" draw:text-style-name="P3" draw:layer="layout" svg:width="5.167cm" svg:height="0.635cm" svg:x="22.347cm" svg:y="9.078cm">
            <text:p text:style-name="P1"><text:span text:style-name="T1">Dynamic_Range_Compress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158cm" svg:height="2.785cm" svg:x="22.347cm" svg:y="9.713cm">
            <text:p text:style-name="P4"><text:span text:style-name="T2">+compress_in : sc_in&lt;bool&gt; </text:span></text:p>
            <text:p text:style-name="P4"><text:span text:style-name="T3">+sample_in : </text:span></text:p>
            <text:p text:style-name="P4"><text:span text:style-name="T3"><text:s text:c="4"/></text:span><text:span text:style-name="T2">sc_in&lt;sc_uint&lt;EXP_BITS&gt;&gt;</text:span></text:p>
            <text:p text:style-name="P4"><text:span text:style-name="T2">+sample_out : </text:span></text:p>
            <text:p text:style-name="P4"><text:span text:style-name="T2"><text:s text:c="4"/></text:span><text:span text:style-name="T2">sc_out&lt;sc_uint&lt;EXP_BITS&gt;&gt;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2.906cm" svg:height="1cm" svg:x="25.673cm" svg:y="8.175cm">
          <text:p text:style-name="P6"><text:span text:style-name="T4">COMP_BITS : int</text:span></text:p>
          <text:p text:style-name="P6"><text:span text:style-name="T4">EXP_BITS : int</text:span></text:p>
          <draw:enhanced-geometry svg:viewBox="0 0 21600 21600" draw:type="rectangle" draw:enhanced-path="M 0 0 L 21600 0 21600 21600 0 21600 0 0 Z N"/>
        </draw:custom-shape>
        <draw:g draw:id="id3">
          <draw:glue-point draw:id="4" svg:x="-0.87cm" svg:y="-3.697cm"/>
          <draw:glue-point draw:id="5" svg:x="-0.872cm" svg:y="-3.202cm"/>
          <draw:custom-shape draw:style-name="gr4" draw:text-style-name="P3" draw:layer="layout" svg:width="5.486cm" svg:height="0.635cm" svg:x="15.266cm" svg:y="10.064cm">
            <text:p text:style-name="P1"><text:span text:style-name="T1">ADPCM_Encod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477cm" svg:height="1.171cm" svg:x="15.266cm" svg:y="10.699cm">
            <text:p text:style-name="P4"><text:span text:style-name="T2">+pcm_in : sc_in&lt;sc_int&lt;16&gt;&gt;</text:span></text:p>
            <text:p text:style-name="P4"><text:span text:style-name="T3">+</text:span><text:span text:style-name="T2">adpcm_out : </text:span><text:span text:style-name="T3">sc_out&lt;sc_uint&lt;4&gt;&gt;</text:span></text:p>
            <draw:enhanced-geometry svg:viewBox="0 0 21600 21600" draw:type="rectangle" draw:enhanced-path="M 0 0 L 21600 0 21600 21600 0 21600 0 0 Z N"/>
          </draw:custom-shape>
        </draw:g>
        <draw:g draw:id="id2">
          <draw:glue-point draw:id="4" svg:x="-0.87cm" svg:y="-3.697cm"/>
          <draw:glue-point draw:id="5" svg:x="-0.872cm" svg:y="-3.202cm"/>
          <draw:custom-shape draw:style-name="gr4" draw:text-style-name="P3" draw:layer="layout" svg:width="5.486cm" svg:height="0.635cm" svg:x="6.696cm" svg:y="10.014cm">
            <text:p text:style-name="P1"><text:span text:style-name="T1">ADPCM_Decod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477cm" svg:height="1.171cm" svg:x="6.696cm" svg:y="10.649cm">
            <text:p text:style-name="P4"><text:span text:style-name="T3">+</text:span><text:span text:style-name="T2">adpcm_in : </text:span><text:span text:style-name="T3">sc_in&lt;sc_uint&lt;4&gt;&gt;</text:span></text:p>
            <text:p text:style-name="P4"><text:span text:style-name="T2">+pcm_out : sc_out&lt;sc_int&lt;16&gt;&gt;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9" draw:layer="layout" svg:x1="18.009cm" svg:y1="8.78cm" svg:x2="18.009cm" svg:y2="10.064cm" draw:start-shape="id1" draw:start-glue-point="2" draw:end-shape="id3" draw:end-glue-point="0" svg:d="m18009 8780v1284">
          <text:p/>
        </draw:connector>
        <draw:connector draw:style-name="gr7" draw:text-style-name="P9" draw:layer="layout" svg:x1="19.627cm" svg:y1="8.462cm" svg:x2="24.93cm" svg:y2="9.078cm" draw:start-shape="id1" draw:start-glue-point="1" draw:end-shape="id4" draw:end-glue-point="0" svg:d="m19627 8462h5303v616">
          <text:p/>
        </draw:connector>
        <draw:connector draw:style-name="gr7" draw:text-style-name="P9" draw:layer="layout" svg:x1="18.009cm" svg:y1="8.145cm" svg:x2="18.01cm" svg:y2="7.236cm" draw:start-shape="id1" draw:start-glue-point="0" svg:d="m18009 8145v-717h1v-192">
          <text:p/>
        </draw:connector>
        <draw:connector draw:style-name="gr7" draw:text-style-name="P9" draw:layer="layout" svg:x1="16.392cm" svg:y1="8.462cm" svg:x2="9.45cm" svg:y2="7.206cm" draw:start-shape="id1" draw:end-shape="id5" draw:end-glue-point="7" svg:d="m16392 8462h-6942v-1256">
          <text:p/>
        </draw:connector>
        <draw:connector draw:style-name="gr7" draw:text-style-name="P9" draw:layer="layout" svg:x1="19.627cm" svg:y1="8.462cm" svg:x2="24.909cm" svg:y2="7.209cm" draw:start-shape="id1" draw:start-glue-point="1" draw:end-shape="id6" draw:end-glue-point="6" svg:d="m19627 8462h5282v-1253">
          <text:p/>
        </draw:connector>
        <draw:frame draw:style-name="gr8" draw:text-style-name="P10" draw:layer="layout" svg:width="3.266cm" svg:height="0.759cm" svg:x="6.36cm" svg:y="3.382cm">
          <draw:text-box>
            <text:p><text:span text:style-name="T5">Debug aspects</text:span></text:p>
          </draw:text-box>
        </draw:frame>
        <draw:frame draw:style-name="gr9" draw:text-style-name="P10" draw:layer="layout" svg:width="4.549cm" svg:height="0.759cm" svg:x="6.505cm" svg:y="11.986cm">
          <draw:text-box>
            <text:p><text:span text:style-name="T5">Compression aspe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357 1440" svg:d="m703 300-500 1001h1001zm-1204 139 703-1440v0l654 1440z"/>
    <draw:marker draw:name="StrokedTriangle" svg:viewBox="0 0 100 100" svg:d="m0 100 50-100 50 96h-4l-46-92-46 92h96v4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4-03T12:07:40</dc:date>
    <meta:editing-duration>PT02H54M48S</meta:editing-duration>
    <meta:editing-cycles>38</meta:editing-cycles>
    <meta:generator>OpenOffice.org/3.1$Unix OpenOffice.org_project/310m19$Build-9420</meta:generator>
    <dc:creator>Tiago Mück</dc:cre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