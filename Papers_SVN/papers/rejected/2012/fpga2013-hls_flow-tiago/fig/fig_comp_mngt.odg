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heads_20_1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="Line_20_Arrow" draw:marker-end-width="0.2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="Line_20_Arrow" draw:marker-start-width="0.28cm" draw:marker-end="Arrowheads_20_3" draw:marker-end-width="0.2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family="Helvetica" style:font-family-generic="swiss" fo:font-size="10pt" style:font-size-asian="10pt" style:font-size-complex="10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3.724cm" svg:height="0.63cm" svg:x="19.628cm" svg:y="8.412cm">
          <draw:glue-point draw:id="4" svg:x="-2.865cm" svg:y="5.095cm"/>
          <draw:glue-point draw:id="5" svg:x="2.706cm" svg:y="5.095cm"/>
          <text:p text:style-name="P1"><text:span text:style-name="T1">Component_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2.619cm" svg:height="0.63cm" svg:x="24.062cm" svg:y="6.663cm"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724cm" svg:height="0.63cm" svg:x="23.509cm" svg:y="8.371cm">
          <text:p text:style-name="P1"><text:span text:style-name="T1">Component_Ag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2.619cm" svg:height="1.254cm" svg:x="20.85cm" svg:y="10.599cm">
          <draw:glue-point draw:id="4" svg:x="-2.565cm" svg:y="-4.84cm"/>
          <draw:glue-point draw:id="5" svg:x="2.359cm" svg:y="-4.912cm"/>
          <text:p text:style-name="P1"><text:span text:style-name="T1">Component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.619cm" svg:height="1.254cm" svg:x="20.85cm" svg:y="12.306cm">
          <text:p text:style-name="P1"><text:span text:style-name="T1">Resource</text:span></text:p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2.619cm" svg:height="1.254cm" svg:x="24.661cm" svg:y="10.599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5.371cm" svg:y1="7.293cm" svg:x2="25.371cm" svg:y2="8.371cm" draw:start-shape="id1" draw:end-shape="id2" svg:d="m25371 7293v1078">
          <text:p/>
        </draw:connector>
        <draw:connector draw:style-name="gr3" draw:text-style-name="P3" draw:layer="layout" draw:line-skew="-0.395cm" svg:x1="21.49cm" svg:y1="9.042cm" svg:x2="21.488cm" svg:y2="10.62cm" draw:start-shape="id3" draw:end-shape="id4" draw:end-glue-point="4" svg:d="m21490 9042v384h-2v1194">
          <text:p/>
        </draw:connector>
        <draw:connector draw:style-name="gr4" draw:text-style-name="P3" draw:layer="layout" draw:line-skew="0.023cm" svg:x1="25.371cm" svg:y1="9.001cm" svg:x2="22.776cm" svg:y2="10.611cm" draw:start-shape="id2" draw:end-shape="id4" draw:end-glue-point="5" svg:d="m25371 9001v822h-2595v788">
          <text:p/>
        </draw:connector>
        <draw:connector draw:style-name="gr5" draw:text-style-name="P1" draw:layer="layout" svg:x1="23.469cm" svg:y1="11.226cm" svg:x2="24.661cm" svg:y2="11.226cm" draw:start-shape="id4" draw:start-glue-point="1" draw:end-shape="id5" draw:end-glue-point="3" svg:d="m23469 11226h1192">
          <text:p/>
        </draw:connector>
        <draw:connector draw:style-name="gr5" draw:text-style-name="P1" draw:layer="layout" svg:x1="22.159cm" svg:y1="11.853cm" svg:x2="22.159cm" svg:y2="12.306cm" draw:start-shape="id4" draw:start-glue-point="2" draw:end-shape="id6" draw:end-glue-point="0" svg:d="m22159 11853v453">
          <text:p/>
        </draw:connector>
        <draw:custom-shape draw:style-name="gr6" draw:text-style-name="P1" draw:layer="layout" svg:width="8.419cm" svg:height="3.556cm" svg:x="19.029cm" svg:y="6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028cm" svg:height="3.756cm" svg:x="20.42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619cm" svg:height="0.63cm" svg:x="15.633cm" svg:y="6.663cm"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252cm" svg:y1="6.978cm" svg:x2="24.062cm" svg:y2="6.978cm" draw:start-shape="id7" draw:start-glue-point="1" draw:end-shape="id1" draw:end-glue-point="3" svg:d="m18252 6978h5810">
          <text:p/>
        </draw:connector>
        <draw:connector draw:style-name="gr7" draw:text-style-name="P1" draw:layer="layout" draw:line-skew="0.471cm" svg:x1="18.252cm" svg:y1="6.978cm" svg:x2="19.628cm" svg:y2="8.727cm" draw:start-shape="id7" draw:start-glue-point="1" draw:end-shape="id3" draw:end-glue-point="3" svg:d="m18252 6978h1159v1749h217">
          <text:p/>
        </draw:connector>
        <draw:frame draw:style-name="gr8" draw:text-style-name="P4" draw:layer="layout" svg:width="3.647cm" svg:height="0.692cm" svg:x="23.769cm" svg:y="13.059cm">
          <draw:text-box>
            <text:p><text:span text:style-name="T2">Namespace System</text:span></text:p>
          </draw:text-box>
        </draw:frame>
        <draw:frame draw:style-name="gr8" draw:text-style-name="P4" draw:layer="layout" svg:width="3.059cm" svg:height="0.692cm" svg:x="18.933cm" svg:y="5.992cm">
          <draw:text-box>
            <text:p><text:span text:style-name="T2">Namespace I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marker draw:name="Arrowheads_20_3" draw:display-name="Arrowheads 3" svg:viewBox="0 0 1241 2356" svg:d="m617 180-500 1000 500 1001 501-1001zm-511-1180 634 1188-634 1168-607-117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7-23T12:52:29</dc:date>
    <meta:editing-duration>PT06H47M12S</meta:editing-duration>
    <meta:editing-cycles>73</meta:editing-cycles>
    <meta:generator>OpenOffice.org/3.1$Unix OpenOffice.org_project/310m19$Build-9420</meta:generator>
    <meta:print-date>2011-08-20T15:00:02</meta:print-date>
    <dc:creator>Tiago Mück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