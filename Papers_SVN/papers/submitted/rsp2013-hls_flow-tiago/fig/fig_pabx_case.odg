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Arrowheads_20_4" draw:marker-start-width="0.275cm" draw:marker-end="" draw:marker-end-width="0.2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auto-grow-width="true" fo:min-height="0.4cm" fo:padding-top="0.076cm" fo:padding-bottom="0.076cm" fo:padding-left="0.152cm" fo:padding-right="0.152cm"/>
    </style:style>
    <style:style style:name="gr4" style:family="graphic" style:parent-style-name="objectwithoutfill">
      <style:graphic-properties svg:stroke-width="0.051cm" draw:marker-start-width="0.276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Helvetica" style:font-family-generic="swis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Helvetica" style:font-family-generic="swis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402cm" svg:height="0.914cm" svg:x="12.739cm" svg:y="11.434cm">
          <text:p text:style-name="P1"><text:span text:style-name="T1">E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141cm" svg:y1="11.891cm" svg:x2="16.605cm" svg:y2="10.202cm" draw:start-shape="id1" draw:start-glue-point="1" draw:end-shape="id2" draw:end-glue-point="6" svg:d="m14141 11891h2464v-1689" svg:viewBox="0 0 2465 1690">
          <text:p/>
        </draw:connector>
        <draw:connector draw:style-name="gr2" draw:text-style-name="P1" draw:layer="layout" svg:x1="16.858cm" svg:y1="9.418cm" svg:x2="20.177cm" svg:y2="9.418cm" draw:start-shape="id2" draw:start-glue-point="1" draw:end-shape="id3" svg:d="m16858 9418h3319" svg:viewBox="0 0 3320 1">
          <text:p/>
        </draw:connector>
        <draw:g xml:id="id3" draw:id="id3">
          <draw:glue-point draw:id="4" svg:x="0.85cm" svg:y="4.148cm"/>
          <draw:glue-point draw:id="5" svg:x="-0.496cm" svg:y="2.435cm"/>
          <draw:custom-shape draw:style-name="gr1" draw:text-style-name="P2" draw:layer="layout" svg:width="4.055cm" svg:height="0.631cm" svg:x="20.186cm" svg:y="8.66cm">
            <text:p text:style-name="P1"><text:span text:style-name="T1">ADPCM Codec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4.055cm" svg:height="0.89cm" svg:x="20.177cm" svg:y="9.287cm">
            <text:p text:style-name="P3"><text:span text:style-name="T2">+ encode (pcm_in : int)</text:span></text:p>
            <text:p text:style-name="P3"><text:span text:style-name="T2">+ decode (adpcm_in : uint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glue-point draw:id="4" svg:x="0.85cm" svg:y="4.148cm"/>
          <draw:glue-point draw:id="5" svg:x="-0.496cm" svg:y="2.435cm"/>
          <draw:custom-shape draw:style-name="gr1" draw:text-style-name="P2" draw:layer="layout" svg:width="3.274cm" svg:height="0.63cm" svg:x="21.974cm" svg:y="11.099cm">
            <text:p text:style-name="P1"><text:span text:style-name="T1">DTMF Detecto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3.274cm" svg:height="0.667cm" svg:x="21.97cm" svg:y="11.717cm">
            <text:p text:style-name="P3"><text:span text:style-name="T2">+ add_sample(s : i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5" draw:id="id5" draw:layer="layout" svg:width="2.071cm" svg:height="0.9cm" svg:x="17.256cm" svg:y="11.291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35cm" svg:x1="24.241cm" svg:y1="9.418cm" svg:x2="25.248cm" svg:y2="11.741cm" draw:start-shape="id3" draw:start-glue-point="1" draw:end-shape="id4" svg:d="m24241 9418h2268v2323h-1261" svg:viewBox="0 0 2269 2324">
          <text:p/>
        </draw:connector>
        <draw:connector draw:style-name="gr2" draw:text-style-name="P1" draw:layer="layout" svg:x1="21.97cm" svg:y1="11.741cm" svg:x2="19.327cm" svg:y2="11.741cm" draw:start-shape="id4" draw:start-glue-point="3" draw:end-shape="id5" draw:end-glue-point="1" svg:d="m21970 11741h-2643" svg:viewBox="0 0 2644 1">
          <text:p/>
        </draw:connector>
        <draw:g xml:id="id2" draw:id="id2">
          <draw:glue-point draw:id="4" svg:x="0.85cm" svg:y="4.148cm"/>
          <draw:glue-point draw:id="5" svg:x="-0.496cm" svg:y="2.435cm"/>
          <draw:glue-point draw:id="6" svg:x="4.41cm" svg:y="5.162cm"/>
          <draw:custom-shape draw:style-name="gr1" draw:text-style-name="P2" draw:layer="layout" svg:width="4.267cm" svg:height="0.63cm" svg:x="12.591cm" svg:y="8.635cm">
            <text:p text:style-name="P1"><text:span text:style-name="T1">AE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4.267cm" svg:height="0.929cm" svg:x="12.582cm" svg:y="9.273cm">
            <text:p text:style-name="P3"><text:span text:style-name="T2">+ cipher(data : uchar[16])</text:span></text:p>
            <text:p text:style-name="P3"><text:span text:style-name="T2">+ decipher(data : uchar[16]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0.524cm" svg:y="4.893cm"/>
          <draw:frame draw:style-name="gr3" draw:text-style-name="P3" draw:layer="layout" svg:width="2.173cm" svg:height="0.552cm" svg:x="14.222cm" svg:y="10.967cm">
            <draw:text-box>
              <text:p text:style-name="P3"><text:span text:style-name="T2">decipher(pkt)</text:span></text:p>
            </draw:text-box>
          </draw:frame>
          <draw:line draw:style-name="gr4" draw:text-style-name="P1" draw:layer="layout" svg:x1="14.668cm" svg:y1="11.623cm" svg:x2="15.902cm" svg:y2="11.623cm">
            <text:p/>
          </draw:line>
        </draw:g>
        <draw:g>
          <draw:frame draw:style-name="gr3" draw:text-style-name="P3" draw:layer="layout" svg:width="2.596cm" svg:height="0.552cm" svg:x="17.315cm" svg:y="8.443cm">
            <draw:text-box>
              <text:p text:style-name="P3"><text:span text:style-name="T2">decode(sample)</text:span></text:p>
            </draw:text-box>
          </draw:frame>
          <draw:line draw:style-name="gr4" draw:text-style-name="P1" draw:layer="layout" svg:x1="17.972cm" svg:y1="9.099cm" svg:x2="19.206cm" svg:y2="9.099cm">
            <text:p/>
          </draw:line>
        </draw:g>
        <draw:g>
          <draw:frame draw:style-name="gr3" draw:text-style-name="P3" draw:layer="layout" svg:width="2.418cm" svg:height="0.552cm" svg:x="24.393cm" svg:y="8.443cm">
            <draw:text-box>
              <text:p text:style-name="P3"><text:span text:style-name="T2">add_sample(s)</text:span></text:p>
            </draw:text-box>
          </draw:frame>
          <draw:line draw:style-name="gr4" draw:text-style-name="P1" draw:layer="layout" svg:x1="24.96cm" svg:y1="9.099cm" svg:x2="26.194cm" svg:y2="9.099cm">
            <text:p/>
          </draw:line>
        </draw:g>
        <draw:g>
          <draw:frame draw:style-name="gr3" draw:text-style-name="P3" draw:layer="layout" svg:width="2.634cm" svg:height="0.552cm" svg:x="19.237cm" svg:y="10.815cm">
            <draw:text-box>
              <text:p text:style-name="P3"><text:span text:style-name="T2">tone_detected(t)</text:span></text:p>
            </draw:text-box>
          </draw:frame>
          <draw:line draw:style-name="gr4" draw:text-style-name="P1" draw:layer="layout" svg:x1="21.146cm" svg:y1="11.471cm" svg:x2="19.912cm" svg:y2="11.4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4" draw:display-name="Arrowheads 4" svg:viewBox="0 0 1241 2356" svg:d="m617 180-500 1000 500 1001 501-1001zm-10-180 634 1188-634 1168-607-117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ago Mück</meta:initial-creator>
    <meta:creation-date>2011-01-28T14:48:19</meta:creation-date>
    <dc:date>2013-05-06T20:05:12</dc:date>
    <meta:editing-duration>PT6H3M6S</meta:editing-duration>
    <meta:editing-cycles>73</meta:editing-cycles>
    <meta:generator>LibreOffice/4.0.1.2$Linux_x86 LibreOffice_project/84102822e3d61eb989ddd325abf1ac077904985</meta:generator>
    <meta:print-date>2011-08-20T15:00:02</meta:print-date>
    <dc:creator>Tiago Mück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