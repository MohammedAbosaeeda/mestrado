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1.0063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5"/>
    <style:style style:name="gr1" style:family="graphic">
      <style:graphic-properties draw:ole-draw-aspect="1"/>
    </style:style>
    <style:style style:name="T1" style:family="text">
      <style:text-properties style:font-name="Liberation Sans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ce4"/>
        <table:table-column table:style-name="co2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7" table:number-rows-spanned="1">
            <text:p>Single-shot</text:p>
          </table:table-cell>
          <table:covered-table-cell table:style-name="ce1"/>
          <table:covered-table-cell table:style-name="ce3"/>
          <table:covered-table-cell table:style-name="ce1"/>
          <table:covered-table-cell table:style-name="ce3"/>
          <table:covered-table-cell table:style-name="ce1"/>
          <table:covered-table-cell/>
          <table:table-cell/>
          <table:table-cell>
            <draw:frame table:end-cell-address="Sheet1.O18" table:end-x="0.0228in" table:end-y="0.1496in" draw:z-index="1" draw:style-name="gr1" svg:width="5.3169in" svg:height="2.9638in" svg:x="0.0402in" svg:y="0.0394in">
              <draw:object draw:notify-on-update-of-ranges="Sheet1.A4:Sheet1.A9 Sheet1.B3:Sheet1.B3 Sheet1.C4:Sheet1.C9 Sheet1.D3:Sheet1.D3 Sheet1.E4:Sheet1.E9 Sheet1.F3:Sheet1.F3 Sheet1.G4:Sheet1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Target (<text:span text:style-name="T1">μs)</text:span></text:p>
          </table:table-cell>
          <table:table-cell table:style-name="ce1" office:value-type="string">
            <text:p>Measured (<text:span text:style-name="T1">μs)</text:span></text:p>
          </table:table-cell>
          <table:table-cell table:style-name="ce3" office:value-type="string">
            <text:p>Error (%)</text:p>
          </table:table-cell>
          <table:table-cell table:style-name="ce1" office:value-type="string">
            <text:p>Measured (<text:span text:style-name="T1">μs)</text:span></text:p>
          </table:table-cell>
          <table:table-cell table:style-name="ce3" office:value-type="string">
            <text:p>Error (%)</text:p>
          </table:table-cell>
          <table:table-cell table:style-name="ce1" office:value-type="string">
            <text:p>Measured (<text:span text:style-name="T1">μs)</text:span></text:p>
          </table:table-cell>
          <table:table-cell table:style-name="ce3" office:value-type="string">
            <text:p>Error (%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Clock = 7200 Hz</text:p>
          </table:table-cell>
          <table:covered-table-cell table:style-name="ce3"/>
          <table:table-cell table:style-name="ce1" office:value-type="string" table:number-columns-spanned="2" table:number-rows-spanned="1">
            <text:p>Clock = 28800 Hz</text:p>
          </table:table-cell>
          <table:covered-table-cell table:style-name="ce3"/>
          <table:table-cell table:style-name="ce1" office:value-type="string" table:number-columns-spanned="2" table:number-rows-spanned="1">
            <text:p>Clock = 115200 Hz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8">
            <text:p>268</text:p>
          </table:table-cell>
          <table:table-cell table:formula="of:=([.B4]-[.$A4])/[.$A4]" office:value-type="percentage" office:value="1.68">
            <text:p>168.00000%</text:p>
          </table:table-cell>
          <table:table-cell office:value-type="float" office:value="164">
            <text:p>164</text:p>
          </table:table-cell>
          <table:table-cell table:formula="of:=([.D4]-[.$A4])/[.$A4]" office:value-type="percentage" office:value="0.64">
            <text:p>64.00000%</text:p>
          </table:table-cell>
          <table:table-cell office:value-type="float" office:value="136">
            <text:p>136</text:p>
          </table:table-cell>
          <table:table-cell table:formula="of:=([.F4]-[.$A4])/[.$A4]" office:value-type="percentage" office:value="0.36">
            <text:p>36.00000%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240">
            <text:p>1240</text:p>
          </table:table-cell>
          <table:table-cell table:formula="of:=([.B5]-[.$A5])/[.$A5]" office:value-type="percentage" office:value="0.24">
            <text:p>24.00000%</text:p>
          </table:table-cell>
          <table:table-cell office:value-type="float" office:value="1031">
            <text:p>1031</text:p>
          </table:table-cell>
          <table:table-cell table:formula="of:=([.D5]-[.$A5])/[.$A5]" office:value-type="percentage" office:value="0.031">
            <text:p>3.10000%</text:p>
          </table:table-cell>
          <table:table-cell office:value-type="float" office:value="1031">
            <text:p>1031</text:p>
          </table:table-cell>
          <table:table-cell table:formula="of:=([.F5]-[.$A5])/[.$A5]" office:value-type="percentage" office:value="0.031">
            <text:p>3.10000%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128">
            <text:p>10128</text:p>
          </table:table-cell>
          <table:table-cell table:formula="of:=([.B6]-[.$A6])/[.$A6]" office:value-type="percentage" office:value="0.0128">
            <text:p>1.28000%</text:p>
          </table:table-cell>
          <table:table-cell office:value-type="float" office:value="10059">
            <text:p>10059</text:p>
          </table:table-cell>
          <table:table-cell table:formula="of:=([.D6]-[.$A6])/[.$A6]" office:value-type="percentage" office:value="0.0059">
            <text:p>0.59000%</text:p>
          </table:table-cell>
          <table:table-cell office:value-type="float" office:value="10033">
            <text:p>10033</text:p>
          </table:table-cell>
          <table:table-cell table:formula="of:=([.F6]-[.$A6])/[.$A6]" office:value-type="percentage" office:value="0.0033">
            <text:p>0.33000%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00128">
            <text:p>100128</text:p>
          </table:table-cell>
          <table:table-cell table:formula="of:=([.B7]-[.$A7])/[.$A7]" office:value-type="percentage" office:value="0.00128">
            <text:p>0.12800%</text:p>
          </table:table-cell>
          <table:table-cell office:value-type="float" office:value="100059">
            <text:p>100059</text:p>
          </table:table-cell>
          <table:table-cell table:formula="of:=([.D7]-[.$A7])/[.$A7]" office:value-type="percentage" office:value="0.00059">
            <text:p>0.05900%</text:p>
          </table:table-cell>
          <table:table-cell office:value-type="float" office:value="100036">
            <text:p>100036</text:p>
          </table:table-cell>
          <table:table-cell table:formula="of:=([.F7]-[.$A7])/[.$A7]" office:value-type="percentage" office:value="0.00036">
            <text:p>0.03600%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000128">
            <text:p>1000128</text:p>
          </table:table-cell>
          <table:table-cell table:formula="of:=([.B8]-[.$A8])/[.$A8]" office:value-type="percentage" office:value="0.000128">
            <text:p>0.01280%</text:p>
          </table:table-cell>
          <table:table-cell office:value-type="float" office:value="1000094">
            <text:p>1000094</text:p>
          </table:table-cell>
          <table:table-cell table:formula="of:=([.D8]-[.$A8])/[.$A8]" office:value-type="percentage" office:value="0.000094">
            <text:p>0.00940%</text:p>
          </table:table-cell>
          <table:table-cell office:value-type="float" office:value="1152970">
            <text:p>1152970</text:p>
          </table:table-cell>
          <table:table-cell table:formula="of:=([.F8]-[.$A8])/[.$A8]" office:value-type="percentage" office:value="0.15297">
            <text:p>15.29700%</text:p>
          </table:table-cell>
          <table:table-cell table:number-columns-repeated="2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0138457">
            <text:p>10138457</text:p>
          </table:table-cell>
          <table:table-cell table:formula="of:=([.B9]-[.$A9])/[.$A9]" office:value-type="percentage" office:value="0.0138457">
            <text:p>1.38457%</text:p>
          </table:table-cell>
          <table:table-cell office:value-type="float" office:value="10282728">
            <text:p>10282728</text:p>
          </table:table-cell>
          <table:table-cell table:formula="of:=([.D9]-[.$A9])/[.$A9]" office:value-type="percentage" office:value="0.0282728">
            <text:p>2.82728%</text:p>
          </table:table-cell>
          <table:table-cell office:value-type="float" office:value="10921704">
            <text:p>10921704</text:p>
          </table:table-cell>
          <table:table-cell table:formula="of:=([.F9]-[.$A9])/[.$A9]" office:value-type="percentage" office:value="0.0921704">
            <text:p>9.21704%</text:p>
          </table:table-cell>
          <table:table-cell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1.O37" table:end-x="0.0335in" table:end-y="0.124in" draw:z-index="0" draw:style-name="gr1" svg:width="5.3228in" svg:height="2.9854in" svg:x="0.0449in" svg:y="0.1598in">
              <draw:object draw:notify-on-update-of-ranges="Sheet1.A23:Sheet1.A28 Sheet1.B22:Sheet1.B22 Sheet1.C23:Sheet1.C28 Sheet1.D22:Sheet1.D22 Sheet1.E23:Sheet1.E28 Sheet1.F22:Sheet1.F22 Sheet1.G23:Sheet1.G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1" office:value-type="string" table:number-columns-spanned="7" table:number-rows-spanned="1">
            <text:p>Periodic</text:p>
          </table:table-cell>
          <table:covered-table-cell table:style-name="ce1"/>
          <table:covered-table-cell table:style-name="ce3"/>
          <table:covered-table-cell table:style-name="ce1"/>
          <table:covered-table-cell table:style-name="ce3"/>
          <table:covered-table-cell table:style-name="ce1"/>
          <table:covered-table-cell/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2">
            <text:p>Target (<text:span text:style-name="T1">μs)</text:span></text:p>
          </table:table-cell>
          <table:table-cell table:style-name="ce1" office:value-type="string">
            <text:p>Measured (<text:span text:style-name="T1">μs)</text:span></text:p>
          </table:table-cell>
          <table:table-cell table:style-name="ce3" office:value-type="string">
            <text:p>Error (%)</text:p>
          </table:table-cell>
          <table:table-cell table:style-name="ce1" office:value-type="string">
            <text:p>Measured (<text:span text:style-name="T1">μs)</text:span></text:p>
          </table:table-cell>
          <table:table-cell table:style-name="ce3" office:value-type="string">
            <text:p>Error (%)</text:p>
          </table:table-cell>
          <table:table-cell table:style-name="ce1" office:value-type="string">
            <text:p>Measured (<text:span text:style-name="T1">μs)</text:span></text:p>
          </table:table-cell>
          <table:table-cell table:style-name="ce3" office:value-type="string">
            <text:p>Error (%)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table:number-columns-spanned="2" table:number-rows-spanned="1">
            <text:p>Clock = 7200 Hz</text:p>
          </table:table-cell>
          <table:covered-table-cell table:style-name="ce3"/>
          <table:table-cell table:style-name="ce1" office:value-type="string" table:number-columns-spanned="2" table:number-rows-spanned="1">
            <text:p>Clock = 28800 Hz</text:p>
          </table:table-cell>
          <table:covered-table-cell table:style-name="ce3"/>
          <table:table-cell table:style-name="ce1" office:value-type="string" table:number-columns-spanned="2" table:number-rows-spanned="1">
            <text:p>Clock = 115200 Hz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7">
            <text:p>277</text:p>
          </table:table-cell>
          <table:table-cell table:formula="of:=([.B23]-[.$A23])/[.$A23]" office:value-type="percentage" office:value="1.77">
            <text:p>177.00000%</text:p>
          </table:table-cell>
          <table:table-cell office:value-type="float" office:value="173">
            <text:p>173</text:p>
          </table:table-cell>
          <table:table-cell table:formula="of:=([.D23]-[.$A23])/[.$A23]" office:value-type="percentage" office:value="0.73">
            <text:p>73.00000%</text:p>
          </table:table-cell>
          <table:table-cell office:value-type="float" office:value="147">
            <text:p>147</text:p>
          </table:table-cell>
          <table:table-cell table:formula="of:=([.F23]-[.$A23])/[.$A23]" office:value-type="percentage" office:value="0.47">
            <text:p>47.00000%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944">
            <text:p>1944</text:p>
          </table:table-cell>
          <table:table-cell table:formula="of:=([.B24]-[.$A24])/[.$A24]" office:value-type="percentage" office:value="0.944">
            <text:p>94.40000%</text:p>
          </table:table-cell>
          <table:table-cell office:value-type="float" office:value="1214">
            <text:p>1214</text:p>
          </table:table-cell>
          <table:table-cell table:formula="of:=([.D24]-[.$A24])/[.$A24]" office:value-type="percentage" office:value="0.214">
            <text:p>21.40000%</text:p>
          </table:table-cell>
          <table:table-cell office:value-type="float" office:value="1032">
            <text:p>1032</text:p>
          </table:table-cell>
          <table:table-cell table:formula="of:=([.F24]-[.$A24])/[.$A24]" office:value-type="percentage" office:value="0.032">
            <text:p>3.20000%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138">
            <text:p>10138</text:p>
          </table:table-cell>
          <table:table-cell table:formula="of:=([.B25]-[.$A25])/[.$A25]" office:value-type="percentage" office:value="0.0138">
            <text:p>1.38000%</text:p>
          </table:table-cell>
          <table:table-cell office:value-type="float" office:value="10034">
            <text:p>10034</text:p>
          </table:table-cell>
          <table:table-cell table:formula="of:=([.D25]-[.$A25])/[.$A25]" office:value-type="percentage" office:value="0.0034">
            <text:p>0.34000%</text:p>
          </table:table-cell>
          <table:table-cell office:value-type="float" office:value="10008">
            <text:p>10008</text:p>
          </table:table-cell>
          <table:table-cell table:formula="of:=([.F25]-[.$A25])/[.$A25]" office:value-type="percentage" office:value="0.0008">
            <text:p>0.08000%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00138">
            <text:p>100138</text:p>
          </table:table-cell>
          <table:table-cell table:formula="of:=([.B26]-[.$A26])/[.$A26]" office:value-type="percentage" office:value="0.00138">
            <text:p>0.13800%</text:p>
          </table:table-cell>
          <table:table-cell office:value-type="float" office:value="100034">
            <text:p>100034</text:p>
          </table:table-cell>
          <table:table-cell table:formula="of:=([.D26]-[.$A26])/[.$A26]" office:value-type="percentage" office:value="0.00034">
            <text:p>0.03400%</text:p>
          </table:table-cell>
          <table:table-cell office:value-type="float" office:value="100008">
            <text:p>100008</text:p>
          </table:table-cell>
          <table:table-cell table:formula="of:=([.F26]-[.$A26])/[.$A26]" office:value-type="percentage" office:value="0.00008">
            <text:p>0.00800%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000138">
            <text:p>1000138</text:p>
          </table:table-cell>
          <table:table-cell table:formula="of:=([.B27]-[.$A27])/[.$A27]" office:value-type="percentage" office:value="0.000138">
            <text:p>0.01380%</text:p>
          </table:table-cell>
          <table:table-cell office:value-type="float" office:value="1000034">
            <text:p>1000034</text:p>
          </table:table-cell>
          <table:table-cell table:formula="of:=([.D27]-[.$A27])/[.$A27]" office:value-type="percentage" office:value="0.000034">
            <text:p>0.00340%</text:p>
          </table:table-cell>
          <table:table-cell office:value-type="float" office:value="1000016">
            <text:p>1000016</text:p>
          </table:table-cell>
          <table:table-cell table:formula="of:=([.F27]-[.$A27])/[.$A27]" office:value-type="percentage" office:value="0.000016">
            <text:p>0.00160%</text:p>
          </table:table-cell>
          <table:table-cell table:number-columns-repeated="2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0001388">
            <text:p>10001388</text:p>
          </table:table-cell>
          <table:table-cell table:formula="of:=([.B28]-[.$A28])/[.$A28]" office:value-type="percentage" office:value="0.0001388">
            <text:p>0.01388%</text:p>
          </table:table-cell>
          <table:table-cell office:value-type="float" office:value="10000346">
            <text:p>10000346</text:p>
          </table:table-cell>
          <table:table-cell table:formula="of:=([.D28]-[.$A28])/[.$A28]" office:value-type="percentage" office:value="0.0000346">
            <text:p>0.00346%</text:p>
          </table:table-cell>
          <table:table-cell office:value-type="float" office:value="10000173">
            <text:p>10000173</text:p>
          </table:table-cell>
          <table:table-cell table:formula="of:=([.F28]-[.$A28])/[.$A28]" office:value-type="percentage" office:value="0.0000173">
            <text:p>0.00173%</text:p>
          </table:table-cell>
          <table:table-cell table:number-columns-repeated="2"/>
        </table:table-row>
        <table:table-row table:style-name="ro1" table:number-rows-repeated="65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05/21/2009</text:date>, <text:time>11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09:44:43</meta:creation-date>
    <dc:date>2009-05-21T11:07:38</dc:date>
    <meta:editing-duration>PT00H05M43S</meta:editing-duration>
    <meta:editing-cycles>2</meta:editing-cycles>
    <meta:generator>OpenOffice.org/3.0$Linux OpenOffice.org_project/300m15$Build-9379</meta:generator>
    <meta:document-statistic meta:table-count="3" meta:cell-count="10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06cm" svg:height="7.529cm" chart:class="chart:line" chart:style-name="ch1">
        <chart:title svg:x="5.641cm" svg:y="0.152cm" chart:style-name="ch2">
          <text:p>Error Rates</text:p>
        </chart:title>
        <chart:subtitle svg:x="5.787cm" svg:y="0.804cm" chart:style-name="ch3">
          <text:p>Single-shot</text:p>
        </chart:subtitle>
        <chart:legend chart:legend-position="end" svg:x="10.204cm" svg:y="3.106cm" chart:style-name="ch4"/>
        <chart:plot-area chart:style-name="ch5" table:cell-range-address="Sheet1.A4:Sheet1.A9 Sheet1.B3:Sheet1.B3 Sheet1.C4:Sheet1.C9 Sheet1.D3:Sheet1.D3 Sheet1.E4:Sheet1.E9 Sheet1.F3:Sheet1.F3 Sheet1.G4:Sheet1.G9" chart:data-source-has-labels="both" svg:x="0.339cm" svg:y="1.405cm" svg:width="9.597cm" svg:height="5.874cm">
          <chart:axis chart:dimension="x" chart:name="primary-x" chart:style-name="ch6">
            <chart:title svg:x="4.946cm" svg:y="6.858cm" chart:style-name="ch7">
              <text:p>Period</text:p>
            </chart:title>
            <chart:categories table:cell-range-address="Sheet1.A4:Sheet1.A9"/>
          </chart:axis>
          <chart:axis chart:dimension="y" chart:name="primary-y" chart:style-name="ch8">
            <chart:title svg:x="0.271cm" svg:y="4.202cm" chart:style-name="ch9">
              <text:p>%</text:p>
            </chart:title>
          </chart:axis>
          <chart:series chart:style-name="ch10" chart:values-cell-range-address="Sheet1.C4:Sheet1.C9" chart:label-cell-address="Sheet1.B3:Sheet1.B3" chart:class="chart:line">
            <chart:data-point chart:repeated="6"/>
          </chart:series>
          <chart:series chart:style-name="ch11" chart:values-cell-range-address="Sheet1.E4:Sheet1.E9" chart:label-cell-address="Sheet1.D3:Sheet1.D3" chart:class="chart:line">
            <chart:data-point chart:repeated="6"/>
          </chart:series>
          <chart:series chart:style-name="ch12" chart:values-cell-range-address="Sheet1.G4:Sheet1.G9" chart:label-cell-address="Sheet1.F3:Sheet1.F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Clock = 7200 Hz</text:p>
              </table:table-cell>
              <table:table-cell office:value-type="string">
                <text:p text:id="Sheet1.D3:Sheet1.D3">Clock = 28800 Hz</text:p>
              </table:table-cell>
              <table:table-cell office:value-type="string">
                <text:p text:id="Sheet1.F3:Sheet1.F3">Clock = 115200 Hz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9">100</text:p>
              </table:table-cell>
              <table:table-cell office:value-type="float" office:value="1.68">
                <text:p text:id="Sheet1.C4:Sheet1.C9">1.68</text:p>
              </table:table-cell>
              <table:table-cell office:value-type="float" office:value="0.64">
                <text:p text:id="Sheet1.E4:Sheet1.E9">0.64</text:p>
              </table:table-cell>
              <table:table-cell office:value-type="float" office:value="0.36">
                <text:p text:id="Sheet1.G4:Sheet1.G9">0.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4">
                <text:p>0.24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128">
                <text:p>0.0128</text:p>
              </table:table-cell>
              <table:table-cell office:value-type="float" office:value="0.0059">
                <text:p>0.005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00128">
                <text:p>0.00128</text:p>
              </table:table-cell>
              <table:table-cell office:value-type="float" office:value="0.00059">
                <text:p>0.00059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94">
                <text:p>0.000094</text:p>
              </table:table-cell>
              <table:table-cell office:value-type="float" office:value="0.15297">
                <text:p>0.15297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0.0138457">
                <text:p>0.0138457</text:p>
              </table:table-cell>
              <table:table-cell office:value-type="float" office:value="0.0282728">
                <text:p>0.0282728</text:p>
              </table:table-cell>
              <table:table-cell office:value-type="float" office:value="0.0921704">
                <text:p>0.0921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21cm" svg:height="7.584cm" chart:class="chart:line" chart:style-name="ch1">
        <chart:title svg:x="5.648cm" svg:y="0.153cm" chart:style-name="ch2">
          <text:p>Error Rates</text:p>
        </chart:title>
        <chart:subtitle svg:x="6.06cm" svg:y="0.806cm" chart:style-name="ch3">
          <text:p>Periodic</text:p>
        </chart:subtitle>
        <chart:legend chart:legend-position="end" svg:x="10.22cm" svg:y="3.134cm" chart:style-name="ch4"/>
        <chart:plot-area chart:style-name="ch5" table:cell-range-address="Sheet1.A23:Sheet1.A28 Sheet1.B22:Sheet1.B22 Sheet1.C23:Sheet1.C28 Sheet1.D22:Sheet1.D22 Sheet1.E23:Sheet1.E28 Sheet1.F22:Sheet1.F22 Sheet1.G23:Sheet1.G28" chart:data-source-has-labels="both" svg:x="0.339cm" svg:y="1.408cm" svg:width="9.611cm" svg:height="5.923cm">
          <chart:axis chart:dimension="x" chart:name="primary-x" chart:style-name="ch6">
            <chart:title svg:x="4.954cm" svg:y="6.911cm" chart:style-name="ch7">
              <text:p>Period</text:p>
            </chart:title>
            <chart:categories table:cell-range-address="Sheet1.A23:Sheet1.A28"/>
          </chart:axis>
          <chart:axis chart:dimension="y" chart:name="primary-y" chart:style-name="ch8">
            <chart:title svg:x="0.271cm" svg:y="4.23cm" chart:style-name="ch9">
              <text:p>%</text:p>
            </chart:title>
          </chart:axis>
          <chart:series chart:style-name="ch10" chart:values-cell-range-address="Sheet1.C23:Sheet1.C28" chart:label-cell-address="Sheet1.B22:Sheet1.B22" chart:class="chart:line">
            <chart:data-point chart:repeated="6"/>
          </chart:series>
          <chart:series chart:style-name="ch11" chart:values-cell-range-address="Sheet1.E23:Sheet1.E28" chart:label-cell-address="Sheet1.D22:Sheet1.D22" chart:class="chart:line">
            <chart:data-point chart:repeated="6"/>
          </chart:series>
          <chart:series chart:style-name="ch12" chart:values-cell-range-address="Sheet1.G23:Sheet1.G28" chart:label-cell-address="Sheet1.F22:Sheet1.F2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2:Sheet1.B22">Clock = 7200 Hz</text:p>
              </table:table-cell>
              <table:table-cell office:value-type="string">
                <text:p text:id="Sheet1.D22:Sheet1.D22">Clock = 28800 Hz</text:p>
              </table:table-cell>
              <table:table-cell office:value-type="string">
                <text:p text:id="Sheet1.F22:Sheet1.F22">Clock = 115200 Hz</text:p>
              </table:table-cell>
            </table:table-row>
          </table:table-header-rows>
          <table:table-rows>
            <table:table-row>
              <table:table-cell office:value-type="string">
                <text:p text:id="Sheet1.A23:Sheet1.A28">100</text:p>
              </table:table-cell>
              <table:table-cell office:value-type="float" office:value="1.77">
                <text:p text:id="Sheet1.C23:Sheet1.C28">1.77</text:p>
              </table:table-cell>
              <table:table-cell office:value-type="float" office:value="0.73">
                <text:p text:id="Sheet1.E23:Sheet1.E28">0.73</text:p>
              </table:table-cell>
              <table:table-cell office:value-type="float" office:value="0.47">
                <text:p text:id="Sheet1.G23:Sheet1.G28">0.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44">
                <text:p>0.944</text:p>
              </table:table-cell>
              <table:table-cell office:value-type="float" office:value="0.214">
                <text:p>0.21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138">
                <text:p>0.0138</text:p>
              </table:table-cell>
              <table:table-cell office:value-type="float" office:value="0.0034">
                <text:p>0.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00138">
                <text:p>0.00138</text:p>
              </table:table-cell>
              <table:table-cell office:value-type="float" office:value="0.00034">
                <text:p>0.0003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0.0001388">
                <text:p>0.0001388</text:p>
              </table:table-cell>
              <table:table-cell office:value-type="float" office:value="0.0000346">
                <text:p>0.0000346</text:p>
              </table:table-cell>
              <table:table-cell office:value-type="float" office:value="0.0000173">
                <text:p>0.0000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