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0E8462EF70E.png"/>
  <manifest:file-entry manifest:media-type="" manifest:full-path="Pictures/200000020000012D000001AD63A3D609.eps"/>
  <manifest:file-entry manifest:media-type="" manifest:full-path="Pictures/20000002000001DE0000017DB517AD0B.eps"/>
  <manifest:file-entry manifest:media-type="image/png" manifest:full-path="Pictures/10000000000000FA000000A26A41BD19.png"/>
  <manifest:file-entry manifest:media-type="image/jpeg" manifest:full-path="Pictures/100000000000016C00000153483253CA.jpg"/>
  <manifest:file-entry manifest:media-type="image/png" manifest:full-path="Pictures/100000000000012C000000F2875457D7.png"/>
  <manifest:file-entry manifest:media-type="image/png" manifest:full-path="Pictures/1000020100000660000002808E2596D0.png"/>
  <manifest:file-entry manifest:media-type="image/jpeg" manifest:full-path="Pictures/1000000000000087000000918D313B01.jpg"/>
  <manifest:file-entry manifest:media-type="image/png" manifest:full-path="Pictures/10000000000004E9000001EA6F8E683F.png"/>
  <manifest:file-entry manifest:media-type="" manifest:full-path="Pictures/20000002000001DB00000165820B4AD8.eps"/>
  <manifest:file-entry manifest:media-type="image/png" manifest:full-path="Pictures/100000000000038D000000FE02D73E2F.png"/>
  <manifest:file-entry manifest:media-type="image/gif" manifest:full-path="Pictures/10000000000002A00000012616DFD7B3.gif"/>
  <manifest:file-entry manifest:media-type="image/jpeg" manifest:full-path="Pictures/10000000000000780000005A262A2FA0.jpg"/>
  <manifest:file-entry manifest:media-type="" manifest:full-path="Pictures/TablePreview1.svm"/>
  <manifest:file-entry manifest:media-type="" manifest:full-path="Pictures/TablePreview4.svm"/>
  <manifest:file-entry manifest:media-type="" manifest:full-path="Pictures/20000002000001DB0000016545259140.eps"/>
  <manifest:file-entry manifest:media-type="" manifest:full-path="Pictures/200000020000018B0000021139CBF699.eps"/>
  <manifest:file-entry manifest:media-type="" manifest:full-path="Pictures/TablePreview7.svm"/>
  <manifest:file-entry manifest:media-type="image/png" manifest:full-path="Pictures/1000000000000151000000BA7431FD80.png"/>
  <manifest:file-entry manifest:media-type="image/gif" manifest:full-path="Pictures/100000000000028000000190DEF273F2.gif"/>
  <manifest:file-entry manifest:media-type="image/png" manifest:full-path="Pictures/100000000000008B0000005DFAC44491.png"/>
  <manifest:file-entry manifest:media-type="image/jpeg" manifest:full-path="Pictures/10000000000001A600000127908FFA4F.jpg"/>
  <manifest:file-entry manifest:media-type="" manifest:full-path="Pictures/2000000200000130000000ECCB104057.eps"/>
  <manifest:file-entry manifest:media-type="" manifest:full-path="Pictures/20000002000001DB000001658FDD7A46.eps"/>
  <manifest:file-entry manifest:media-type="image/gif" manifest:full-path="Pictures/100000000000003E0000004C46481C42.gif"/>
  <manifest:file-entry manifest:media-type="image/gif" manifest:full-path="Pictures/100002000000007200000054A07C13F7.gif"/>
  <manifest:file-entry manifest:media-type="" manifest:full-path="Pictures/20000002000001FC00000167A8849E01.eps"/>
  <manifest:file-entry manifest:media-type="image/png" manifest:full-path="Pictures/10000000000000C8000000965DB5BB37.png"/>
  <manifest:file-entry manifest:media-type="" manifest:full-path="Pictures/TablePreview3.svm"/>
  <manifest:file-entry manifest:media-type="image/gif" manifest:full-path="Pictures/100000000000024B000001106D866592.gif"/>
  <manifest:file-entry manifest:media-type="image/png" manifest:full-path="Pictures/10000000000000F0000000B4FAABABFF.png"/>
  <manifest:file-entry manifest:media-type="" manifest:full-path="Pictures/TablePreview6.svm"/>
  <manifest:file-entry manifest:media-type="image/png" manifest:full-path="Pictures/100002000000012C000000E1ACCE03CB.png"/>
  <manifest:file-entry manifest:media-type="image/png" manifest:full-path="Pictures/100002000000016E0000010EBCB03FF5.png"/>
  <manifest:file-entry manifest:media-type="image/png" manifest:full-path="Pictures/1000000000000151000000B178E4B41F.png"/>
  <manifest:file-entry manifest:media-type="image/png" manifest:full-path="Pictures/1000000000000151000000C26334992A.png"/>
  <manifest:file-entry manifest:media-type="image/png" manifest:full-path="Pictures/100000000000020B00000249DB050BF7.png"/>
  <manifest:file-entry manifest:media-type="image/png" manifest:full-path="Pictures/10000200000000BE000000BAE6C11BEE.png"/>
  <manifest:file-entry manifest:media-type="image/gif" manifest:full-path="Pictures/10000000000000620000002D61D2AAD6.gif"/>
  <manifest:file-entry manifest:media-type="image/png" manifest:full-path="Pictures/100002000000013D000000F9850D37A8.png"/>
  <manifest:file-entry manifest:media-type="image/gif" manifest:full-path="Pictures/100000000000008C00000040240C937C.gif"/>
  <manifest:file-entry manifest:media-type="image/png" manifest:full-path="Pictures/10000200000000DC000000B797209B67.png"/>
  <manifest:file-entry manifest:media-type="" manifest:full-path="Pictures/200000020000027A00000185F1ABBB18.eps"/>
  <manifest:file-entry manifest:media-type="" manifest:full-path="Pictures/20000002000001660000017AD98601C7.eps"/>
  <manifest:file-entry manifest:media-type="image/png" manifest:full-path="Pictures/100000000000012300000164D2456257.png"/>
  <manifest:file-entry manifest:media-type="image/gif" manifest:full-path="Pictures/100000000000028A000001ADAA692705.gif"/>
  <manifest:file-entry manifest:media-type="image/gif" manifest:full-path="Pictures/100002000000007E00000075DDD674B6.gif"/>
  <manifest:file-entry manifest:media-type="image/png" manifest:full-path="Pictures/10000200000000FA000000C0421A85E3.png"/>
  <manifest:file-entry manifest:media-type="image/gif" manifest:full-path="Pictures/10000000000002A0000001018096A901.gif"/>
  <manifest:file-entry manifest:media-type="image/png" manifest:full-path="Pictures/10000200000000C8000000F1980C2F1A.png"/>
  <manifest:file-entry manifest:media-type="image/png" manifest:full-path="Pictures/100000000000047D0000021163F1062F.png"/>
  <manifest:file-entry manifest:media-type="image/png" manifest:full-path="Pictures/1000000000000152000000B2F00AB25A.png"/>
  <manifest:file-entry manifest:media-type="image/gif" manifest:full-path="Pictures/10000000000001430000003AD6626AC4.gif"/>
  <manifest:file-entry manifest:media-type="" manifest:full-path="Pictures/200000020000019F000000857FB65AA0.eps"/>
  <manifest:file-entry manifest:media-type="" manifest:full-path="Pictures/TablePreview2.svm"/>
  <manifest:file-entry manifest:media-type="" manifest:full-path="Pictures/200000020000013300000038BB6DB2D6.eps"/>
  <manifest:file-entry manifest:media-type="image/png" manifest:full-path="Pictures/10000200000004000000030067DB7AA9.png"/>
  <manifest:file-entry manifest:media-type="" manifest:full-path="Pictures/TablePreview5.svm"/>
  <manifest:file-entry manifest:media-type="image/png" manifest:full-path="Pictures/10000200000001C6000000E3BF7684A4.png"/>
  <manifest:file-entry manifest:media-type="" manifest:full-path="Pictures/TablePreview8.svm"/>
  <manifest:file-entry manifest:media-type="" manifest:full-path="Pictures/2000000200000178000000DD418FEAC6.eps"/>
  <manifest:file-entry manifest:media-type="image/png" manifest:full-path="Pictures/100002000000011B0000012C4070230B.png"/>
  <manifest:file-entry manifest:media-type="" manifest:full-path="Pictures/200000020000018E000001F0EF206C81.eps"/>
  <manifest:file-entry manifest:media-type="image/png" manifest:full-path="Pictures/1000020000000118000000C8220B9533.png"/>
  <manifest:file-entry manifest:media-type="image/png" manifest:full-path="Pictures/10000000000002B2000001F563A7B646.png"/>
  <manifest:file-entry manifest:media-type="image/png" manifest:full-path="Pictures/10000000000001D4000001173B237706.png"/>
  <manifest:file-entry manifest:media-type="image/png" manifest:full-path="Pictures/100000000000016A0000012020224E42.png"/>
  <manifest:file-entry manifest:media-type="" manifest:full-path="Pictures/"/>
  <manifest:file-entry manifest:media-type="text/xml" manifest:full-path="content.xml"/>
  <manifest:file-entry manifest:media-type="application/x-openoffice-bitmap;windows_formatname=&quot;Bitmap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35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3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heads_20_15" draw:marker-end-width="0.3cm" draw:textarea-horizontal-align="center" draw:textarea-vertical-align="middle"/>
    </style:style>
    <style:style style:name="gr4" style:family="graphic" style:parent-style-name="standard">
      <style:graphic-properties draw:marker-end="Arrowheads_20_16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0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visible-area-left="0cm" draw:visible-area-top="0cm" draw:visible-area-width="3.73cm" draw:visible-area-height="1.428cm" draw:ole-draw-aspect="1"/>
    </style:style>
    <style:style style:name="gr11" style:family="graphic" style:parent-style-name="standard">
      <style:graphic-properties draw:stroke="none" draw:fill="none" draw:fill-color="#ffffff" fo:min-height="0.946cm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textarea-vertical-align="middle" draw:auto-grow-height="false" fo:min-height="0cm" fo:min-width="0cm"/>
    </style:style>
    <style:style style:name="gr14" style:family="graphic" style:parent-style-name="standard">
      <style:graphic-properties svg:stroke-width="0.2cm" svg:stroke-color="#0099ff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fit-to-contour="true" fo:min-height="15.876cm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dash" draw:stroke-dash="Fine_20_Dashed" draw:textarea-horizontal-align="center" draw:textarea-vertical-align="middle"/>
    </style:style>
    <style:style style:name="gr2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heads_20_44" draw:marker-start-width="0.3cm" draw:marker-end="Arrowheads_20_45" draw:marker-end-width="0.3cm" draw:textarea-horizontal-align="center" draw:textarea-vertical-align="middle"/>
    </style:style>
    <style:style style:name="gr23" style:family="graphic" style:parent-style-name="standard">
      <style:graphic-properties draw:marker-start="Arrowheads_20_46" draw:marker-start-width="0.3cm" draw:marker-end="Arrowheads_20_47" draw:marker-end-width="0.3cm" draw:textarea-horizontal-align="center" draw:textarea-vertical-align="middle"/>
    </style:style>
    <style:style style:name="gr24" style:family="graphic" style:parent-style-name="standard">
      <style:graphic-properties draw:marker-start="Arrowheads_20_48" draw:marker-start-width="0.3cm" draw:marker-end="Arrowheads_20_49" draw:marker-end-width="0.3cm" draw:textarea-horizontal-align="center" draw:textarea-vertical-align="middle"/>
    </style:style>
    <style:style style:name="gr25" style:family="graphic" style:parent-style-name="standard">
      <style:graphic-properties draw:marker-start="Arrowheads_20_50" draw:marker-start-width="0.3cm" draw:marker-end="Arrowheads_20_51" draw:marker-end-width="0.3cm" draw:textarea-horizontal-align="center" draw:textarea-vertical-align="middle"/>
    </style:style>
    <style:style style:name="gr26" style:family="graphic" style:parent-style-name="standard">
      <style:graphic-properties draw:stroke="dash" draw:stroke-dash="Fine_20_Dashed" draw:marker-start="Arrowheads_20_52" draw:marker-start-width="0.3cm" draw:marker-end="Arrowheads_20_53" draw:marker-end-width="0.3cm" draw:textarea-horizontal-align="center" draw:textarea-vertical-align="middle"/>
    </style:style>
    <style:style style:name="gr27" style:family="graphic" style:parent-style-name="standard">
      <style:graphic-properties draw:stroke="dash" draw:stroke-dash="Fine_20_Dashed" draw:marker-start="Arrowheads_20_54" draw:marker-start-width="0.3cm" draw:marker-end="Arrowheads_20_55" draw:marker-end-width="0.3cm" draw:textarea-horizontal-align="center" draw:textarea-vertical-align="middle"/>
    </style:style>
    <style:style style:name="gr28" style:family="graphic" style:parent-style-name="standard">
      <style:graphic-properties draw:stroke="dash" draw:stroke-dash="Fine_20_Dashed" draw:marker-start="Arrowheads_20_56" draw:marker-start-width="0.3cm" draw:marker-end="Arrowheads_20_57" draw:marker-end-width="0.3cm" draw:textarea-horizontal-align="center" draw:textarea-vertical-align="middle"/>
    </style:style>
    <style:style style:name="gr29" style:family="graphic" style:parent-style-name="standard">
      <style:graphic-properties draw:stroke="dash" draw:stroke-dash="Fine_20_Dashed" draw:marker-start="Arrowheads_20_58" draw:marker-start-width="0.3cm" draw:marker-end="Arrowheads_20_59" draw:marker-end-width="0.3cm" draw:textarea-horizontal-align="center" draw:textarea-vertical-align="middle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9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fill-color="#ffffff" draw:auto-grow-height="true" fo:min-height="1.906cm"/>
    </style:style>
    <style:style style:name="pr5" style:family="presentation" style:parent-style-name="lisha-clear-outline1">
      <style:graphic-properties draw:fill-color="#ffffff" draw:auto-grow-height="true" fo:min-height="15.876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fo:min-height="1.906cm"/>
    </style:style>
    <style:style style:name="pr8" style:family="presentation" style:parent-style-name="lisha-clear-outline1">
      <style:graphic-properties fo:min-height="2.539cm"/>
    </style:style>
    <style:style style:name="pr9" style:family="presentation" style:parent-style-name="lisha-clear-outline1">
      <style:graphic-properties fo:min-height="1.905cm"/>
    </style:style>
    <style:style style:name="pr10" style:family="presentation" style:parent-style-name="lisha-clear-outline1">
      <style:graphic-properties fo:min-height="2.54cm"/>
    </style:style>
    <style:style style:name="pr11" style:family="presentation" style:parent-style-name="lisha-clear-title">
      <style:graphic-properties draw:fill-color="#ffffff" draw:auto-grow-height="true" fo:min-height="2.301cm"/>
    </style:style>
    <style:style style:name="pr12" style:family="presentation" style:parent-style-name="lisha-clear-notes">
      <style:graphic-properties draw:fill-color="#ffffff" fo:min-height="9.96cm"/>
    </style:style>
    <style:style style:name="pr13" style:family="presentation" style:parent-style-name="lisha-clear-notes">
      <style:graphic-properties draw:fill-color="#ffffff" fo:min-height="9.369cm"/>
    </style:style>
    <style:style style:name="pr14" style:family="presentation" style:parent-style-name="lisha-clear-notes">
      <style:graphic-properties draw:fill-color="#ffffff" fo:min-height="8.813cm"/>
    </style:style>
    <style:style style:name="pr15" style:family="presentation" style:parent-style-name="lisha-clear-title">
      <style:graphic-properties draw:auto-grow-height="true" fo:min-height="1.906cm"/>
    </style:style>
    <style:style style:name="pr16" style:family="presentation" style:parent-style-name="lisha-clear-outline1">
      <style:graphic-properties draw:auto-grow-height="true" fo:min-height="8.255cm"/>
    </style:style>
    <style:style style:name="pr17" style:family="presentation" style:parent-style-name="lisha-clear-outline1">
      <style:graphic-properties fo:min-height="15.876cm"/>
    </style:style>
    <style:style style:name="pr18" style:family="presentation" style:parent-style-name="lisha-clear-outline1">
      <style:graphic-properties draw:auto-grow-height="true" fo:min-height="15.876cm"/>
    </style:style>
    <style:style style:name="pr19" style:family="presentation" style:parent-style-name="lisha-clear-outline1">
      <style:graphic-properties fo:min-height="3.175cm"/>
    </style:style>
    <style:style style:name="pr20" style:family="presentation" style:parent-style-name="lisha-clear-outline1">
      <style:graphic-properties fo:min-height="8.255cm"/>
    </style:style>
    <style:style style:name="pr21" style:family="presentation" style:parent-style-name="lisha-clear-outline1">
      <style:graphic-properties fo:min-height="11.43cm"/>
    </style:style>
    <style:style style:name="pr22" style:family="presentation" style:parent-style-name="lisha-clear-outline1">
      <style:graphic-properties fo:min-height="8.89cm"/>
    </style:style>
    <style:style style:name="pr23" style:family="presentation" style:parent-style-name="lisha-clear-outline1">
      <style:graphic-properties fo:min-height="6.35cm"/>
    </style:style>
    <style:style style:name="pr24" style:family="presentation" style:parent-style-name="lisha-clear-outline1">
      <style:graphic-properties fo:min-height="10.795cm"/>
    </style:style>
    <style:style style:name="pr25" style:family="presentation" style:parent-style-name="lisha-clear-outline1">
      <style:graphic-properties draw:auto-grow-height="true" fo:min-height="7.572cm"/>
    </style:style>
    <style:style style:name="pr26" style:family="presentation" style:parent-style-name="lisha-clear-outline1">
      <style:graphic-properties fo:min-height="1.27cm"/>
    </style:style>
    <style:style style:name="co1" style:family="table-column">
      <style:table-column-properties style:column-width="9.014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co3" style:family="table-column">
      <style:table-column-properties style:column-width="3.372cm" style:use-optimal-column-width="false"/>
    </style:style>
    <style:style style:name="co4" style:family="table-column">
      <style:table-column-properties style:column-width="4.047cm" style:use-optimal-column-width="false"/>
    </style:style>
    <style:style style:name="co5" style:family="table-column">
      <style:table-column-properties style:column-width="2.957cm" style:use-optimal-column-width="false"/>
    </style:style>
    <style:style style:name="co6" style:family="table-column">
      <style:table-column-properties style:column-width="2.646cm" style:use-optimal-column-width="false"/>
    </style:style>
    <style:style style:name="co7" style:family="table-column">
      <style:table-column-properties style:column-width="4.816cm" style:use-optimal-column-width="false"/>
    </style:style>
    <style:style style:name="co8" style:family="table-column">
      <style:table-column-properties style:column-width="4.807cm" style:use-optimal-column-width="false"/>
    </style:style>
    <style:style style:name="co9" style:family="table-column">
      <style:table-column-properties style:column-width="5.395cm" style:use-optimal-column-width="false"/>
    </style:style>
    <style:style style:name="co10" style:family="table-column">
      <style:table-column-properties style:column-width="4.592cm" style:use-optimal-column-width="false"/>
    </style:style>
    <style:style style:name="co11" style:family="table-column">
      <style:table-column-properties style:column-width="7.481cm" style:use-optimal-column-width="false"/>
    </style:style>
    <style:style style:name="co12" style:family="table-column">
      <style:table-column-properties style:column-width="6.009cm" style:use-optimal-column-width="false"/>
    </style:style>
    <style:style style:name="co13" style:family="table-column">
      <style:table-column-properties style:column-width="5.976cm" style:use-optimal-column-width="false"/>
    </style:style>
    <style:style style:name="co14" style:family="table-column">
      <style:table-column-properties style:column-width="7.204cm" style:use-optimal-column-width="false"/>
    </style:style>
    <style:style style:name="co15" style:family="table-column">
      <style:table-column-properties style:column-width="3.281cm" style:use-optimal-column-width="false"/>
    </style:style>
    <style:style style:name="co16" style:family="table-column">
      <style:table-column-properties style:column-width="3.267cm" style:use-optimal-column-width="false"/>
    </style:style>
    <style:style style:name="co17" style:family="table-column">
      <style:table-column-properties style:column-width="6.787cm" style:use-optimal-column-width="false"/>
    </style:style>
    <style:style style:name="co18" style:family="table-column">
      <style:table-column-properties style:column-width="4.28cm" style:use-optimal-column-width="false"/>
    </style:style>
    <style:style style:name="co19" style:family="table-column">
      <style:table-column-properties style:column-width="13.116cm" style:use-optimal-column-width="false"/>
    </style:style>
    <style:style style:name="co20" style:family="table-column">
      <style:table-column-properties style:column-width="5.871cm" style:use-optimal-column-width="false"/>
    </style:style>
    <style:style style:name="co21" style:family="table-column">
      <style:table-column-properties style:column-width="9.605cm" style:use-optimal-column-width="false"/>
    </style:style>
    <style:style style:name="co22" style:family="table-column">
      <style:table-column-properties style:column-width="4.754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94cm"/>
    </style:style>
    <style:style style:name="ro3" style:family="table-row">
      <style:table-row-properties style:row-height="1.005cm"/>
    </style:style>
    <style:style style:name="ro4" style:family="table-row">
      <style:table-row-properties style:row-height="0.882cm"/>
    </style:style>
    <style:style style:name="ro5" style:family="table-row">
      <style:table-row-properties style:row-height="0.844cm"/>
    </style:style>
    <style:style style:name="ro6" style:family="table-row">
      <style:table-row-properties style:row-height="0.816cm"/>
    </style:style>
    <style:style style:name="ro7" style:family="table-row">
      <style:table-row-properties style:row-height="1.683cm"/>
    </style:style>
    <style:style style:name="ro8" style:family="table-row">
      <style:table-row-properties style:row-height="0.972cm"/>
    </style:style>
    <style:style style:name="ro9" style:family="table-row">
      <style:table-row-properties style:row-height="1.197cm"/>
    </style:style>
    <style:style style:name="ro10" style:family="table-row">
      <style:table-row-properties style:row-height="0.321cm"/>
    </style:style>
    <style:style style:name="ro11" style:family="table-row">
      <style:table-row-properties style:row-height="1.022cm"/>
    </style:style>
    <style:style style:name="ro12" style:family="table-row">
      <style:table-row-properties style:row-height="0cm"/>
    </style:style>
    <style:style style:name="ro13" style:family="table-row">
      <style:table-row-properties style:row-height="1.021cm"/>
    </style:style>
    <style:style style:name="ro14" style:family="table-row">
      <style:table-row-properties style:row-height="0.96cm"/>
    </style:style>
    <style:style style:name="ce1" style:family="table-cell">
      <style:graphic-properties style:repeat="repeat"/>
      <style:paragraph-properties fo:text-align="star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>
      <style:graphic-properties style:repeat="repeat"/>
      <style:text-properties fo:font-size="14pt" style:font-size-asian="14pt" style:font-size-complex="14pt"/>
    </style:style>
    <style:style style:name="ce7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8" style:family="table-cell">
      <style:graphic-properties draw:fill="none" style:repeat="repeat"/>
      <style:paragraph-properties fo:border-left="0.001cm solid #ffffff" fo:border-right="0.001cm solid #ffffff" fo:border-top="0.001cm solid #000000" fo:border-bottom="0.001cm solid #000000"/>
      <style:text-properties fo:font-family="'Nimbus Sans L'" style:font-family-generic="swiss" style:font-pitch="variable" fo:font-size="22pt" style:font-size-asian="22pt" style:font-size-complex="22pt"/>
    </style:style>
    <style:style style:name="ce9" style:family="table-cell">
      <style:graphic-properties draw:fill="none" style:repeat="repeat"/>
      <style:paragraph-properties fo:text-align="center" fo:border-left="0.001cm solid #ffffff" fo:border-right="0.001cm solid #ffffff" fo:border-top="0.001cm solid #000000" fo:border-bottom="0.001cm solid #000000"/>
      <style:text-properties fo:font-family="'Nimbus Sans L'" style:font-family-generic="swiss" style:font-pitch="variable" fo:font-size="22pt" style:font-size-asian="22pt" style:font-size-complex="22pt"/>
    </style:style>
    <style:style style:name="ce10" style:family="table-cell">
      <style:graphic-properties draw:fill="none" style:repeat="repeat"/>
      <style:paragraph-properties fo:border-left="0.001cm solid #ffffff" fo:border-right="0.001cm solid #ffffff" fo:border-top="none" fo:border-bottom="0.001cm solid #ffffff"/>
      <style:text-properties fo:font-family="'Nimbus Sans L'" style:font-family-generic="swiss" style:font-pitch="variable" fo:font-size="22pt" style:font-size-asian="22pt" style:font-size-complex="22pt"/>
    </style:style>
    <style:style style:name="ce11" style:family="table-cell">
      <style:graphic-properties draw:fill="none" style:repeat="repeat"/>
      <style:paragraph-properties fo:text-align="center" fo:border-left="0.001cm solid #ffffff" fo:border-right="0.001cm solid #ffffff" fo:border-top="none" fo:border-bottom="0.001cm solid #ffffff"/>
      <style:text-properties fo:font-family="'Nimbus Sans L'" style:font-family-generic="swiss" style:font-pitch="variable" fo:font-size="22pt" style:font-size-asian="22pt" style:font-size-complex="22pt"/>
    </style:style>
    <style:style style:name="ce12" style:family="table-cell">
      <style:graphic-properties draw:fill="none" style:repeat="repeat"/>
      <style:text-properties fo:font-family="'Nimbus Sans L'" style:font-family-generic="swiss" style:font-pitch="variable" fo:font-size="22pt" style:font-size-asian="22pt" style:font-size-complex="22pt"/>
    </style:style>
    <style:style style:name="ce13" style:family="table-cell">
      <style:graphic-properties draw:fill="none" style:repeat="repeat"/>
      <style:paragraph-properties fo:text-align="center"/>
      <style:text-properties fo:font-family="'Nimbus Sans L'" style:font-family-generic="swiss" style:font-pitch="variable" fo:font-size="22pt" style:font-size-asian="22pt" style:font-size-complex="22pt"/>
    </style:style>
    <style:style style:name="ce14" style:family="table-cell">
      <style:graphic-properties draw:fill="none" style:repeat="repeat"/>
      <style:paragraph-properties fo:border-left="0.001cm solid #ffffff" fo:border-right="0.001cm solid #ffffff" fo:border-top="0.001cm solid #ffffff" fo:border-bottom="0.001cm solid #000000"/>
      <style:text-properties fo:font-family="'Nimbus Sans L'" style:font-family-generic="swiss" style:font-pitch="variable" fo:font-size="22pt" style:font-size-asian="22pt" style:font-size-complex="22pt"/>
    </style:style>
    <style:style style:name="ce15" style:family="table-cell">
      <style:graphic-properties draw:fill="none" style:repeat="repeat"/>
      <style:paragraph-properties fo:text-align="center" fo:border-left="0.001cm solid #ffffff" fo:border-right="0.001cm solid #ffffff" fo:border-top="0.001cm solid #ffffff" fo:border-bottom="0.001cm solid #000000"/>
      <style:text-properties fo:font-family="'Nimbus Sans L'" style:font-family-generic="swiss" style:font-pitch="variable" fo:font-size="22pt" style:font-size-asian="22pt" style:font-size-complex="2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0.6cm" fo:margin-right="0cm" fo:text-align="center" fo:text-indent="-0.6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margin-left="1.7cm" fo:margin-right="0cm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size="16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color="#0000ff" fo:font-size="20pt"/>
    </style:style>
    <style:style style:name="P14" style:family="paragraph">
      <style:paragraph-properties fo:margin-left="0cm" fo:margin-right="0cm" fo:text-indent="0cm"/>
      <style:text-properties fo:font-size="22.6000003814697pt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text-indent="0cm"/>
      <style:text-properties fo:font-size="21.2000007629395pt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paragraph-properties fo:margin-left="0cm" fo:margin-right="0cm" fo:text-align="center" fo:text-indent="0cm"/>
      <style:text-properties fo:font-size="36pt"/>
    </style:style>
    <style:style style:name="P19" style:family="paragraph">
      <style:paragraph-properties fo:margin-left="0cm" fo:margin-right="0cm" fo:text-align="center" fo:text-indent="0cm"/>
      <style:text-properties fo:font-size="24pt"/>
    </style:style>
    <style:style style:name="P20" style:family="paragraph">
      <style:paragraph-properties fo:text-align="start"/>
      <style:text-properties style:font-weight-asian="bold" style:font-weight-complex="bold"/>
    </style:style>
    <style:style style:name="P21" style:family="paragraph">
      <style:paragraph-properties fo:text-align="center"/>
      <style:text-properties style:font-weight-asian="bold" style:font-weight-complex="bold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24pt"/>
    </style:style>
    <style:style style:name="P24" style:family="paragraph">
      <style:text-properties fo:color="#ff0000"/>
    </style:style>
    <style:style style:name="P25" style:family="paragraph">
      <style:text-properties fo:color="#ff0000" fo:font-size="72pt" style:font-size-asian="72pt" style:font-size-complex="72pt"/>
    </style:style>
    <style:style style:name="P26" style:family="paragraph">
      <style:paragraph-properties fo:text-align="center"/>
      <style:text-properties style:font-size-asian="14pt" style:font-weight-asian="bold" style:font-size-complex="14pt" style:font-weight-complex="bold"/>
    </style:style>
    <style:style style:name="P27" style:family="paragraph">
      <style:text-properties style:font-size-asian="14pt" style:font-size-complex="14pt"/>
    </style:style>
    <style:style style:name="P28" style:family="paragraph">
      <style:paragraph-properties fo:text-align="center"/>
      <style:text-properties style:font-size-asian="14pt" style:font-size-complex="14pt"/>
    </style:style>
    <style:style style:name="P29" style:family="paragraph">
      <style:text-properties fo:color="#ff0000" fo:font-size="24pt"/>
    </style:style>
    <style:style style:name="P30" style:family="paragraph">
      <style:text-properties fo:color="#ff0000" fo:font-size="60pt" style:font-size-asian="60pt" style:font-size-complex="60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text-properties fo:font-size="39pt" style:font-size-asian="39pt" style:font-size-complex="39pt"/>
    </style:style>
    <style:style style:name="P33" style:family="paragraph">
      <style:text-properties fo:font-style="italic" style:font-style-asian="italic" style:font-style-complex="italic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style:font-size-asian="22pt" style:font-size-complex="22pt"/>
    </style:style>
    <style:style style:name="P36" style:family="paragraph">
      <style:paragraph-properties fo:text-align="center"/>
      <style:text-properties style:font-size-asian="22pt" style:font-size-complex="22pt"/>
    </style:style>
    <style:style style:name="P37" style:family="paragraph">
      <style:text-properties fo:font-size="40pt" style:font-size-asian="40pt" style:font-size-complex="40pt"/>
    </style:style>
    <style:style style:name="T1" style:family="text">
      <style:text-properties fo:language="pt" fo:country="BR" fo:font-weight="bold"/>
    </style:style>
    <style:style style:name="T2" style:family="text">
      <style:text-properties fo:language="en" fo:country="US" fo:font-weight="bold"/>
    </style:style>
    <style:style style:name="T3" style:family="text">
      <style:text-properties fo:color="#004a4a" fo:font-family="'Nimbus Sans L'" style:font-pitch="variable" fo:font-size="32pt" fo:font-weight="bold" style:font-size-asian="24pt" style:font-weight-asian="bold" style:font-weight-complex="bold"/>
    </style:style>
    <style:style style:name="T4" style:family="text">
      <style:text-properties fo:color="#004a4a" fo:font-family="'Nimbus Sans L'" style:font-pitch="variable" fo:font-size="32pt" fo:font-weight="normal" style:font-size-asian="24pt"/>
    </style:style>
    <style:style style:name="T5" style:family="text">
      <style:text-properties fo:color="#004a4a" fo:font-family="'Nimbus Mono L'" style:font-pitch="fixed" fo:font-size="24pt" fo:font-weight="normal" style:font-size-asian="24pt"/>
    </style:style>
    <style:style style:name="T6" style:family="text">
      <style:text-properties fo:color="#004a4a" fo:font-family="'Nimbus Sans L'" style:font-pitch="variable" fo:font-size="24pt" fo:font-weight="normal" style:font-size-asian="24pt"/>
    </style:style>
    <style:style style:name="T7" style:family="text">
      <style:text-properties fo:color="#0000ff"/>
    </style:style>
    <style:style style:name="T8" style:family="text">
      <style:text-properties fo:font-size="16pt"/>
    </style:style>
    <style:style style:name="T9" style:family="text">
      <style:text-properties fo:font-size="20pt"/>
    </style:style>
    <style:style style:name="T10" style:family="text">
      <style:text-properties fo:color="#0000ff" fo:font-size="20pt"/>
    </style:style>
    <style:style style:name="T11" style:family="text">
      <style:text-properties fo:font-size="18pt"/>
    </style:style>
    <style:style style:name="T12" style:family="text">
      <style:text-properties fo:font-size="36pt"/>
    </style:style>
    <style:style style:name="T13" style:family="text">
      <style:text-properties fo:font-size="24pt"/>
    </style:style>
    <style:style style:name="T14" style:family="text">
      <style:text-properties fo:color="#0000ff" fo:font-size="2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family="'Courier 10 Pitch'" style:font-pitch="fixed"/>
    </style:style>
    <style:style style:name="T17" style:family="text">
      <style:text-properties fo:font-family="'Nimbus Sans L'" style:font-family-generic="swiss" style:font-pitch="variable"/>
    </style:style>
    <style:style style:name="T18" style:family="text">
      <style:text-properties fo:font-family="'Courier 10 Pitch'" style:font-pitch="fixed" fo:font-size="26pt" style:font-size-asian="26pt" style:font-size-complex="26pt"/>
    </style:style>
    <style:style style:name="T19" style:family="text">
      <style:text-properties fo:color="#ff0000"/>
    </style:style>
    <style:style style:name="T20" style:family="text">
      <style:text-properties fo:color="#ff0000" fo:font-size="72pt" style:font-size-asian="72pt" style:font-size-complex="72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ff0000" fo:font-size="24pt"/>
    </style:style>
    <style:style style:name="T24" style:family="text">
      <style:text-properties fo:color="#ff0000" fo:font-size="60pt" style:font-size-asian="60pt" style:font-size-complex="60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39pt" style:font-size-asian="39pt" style:font-size-complex="39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style:use-window-font-color="true"/>
    </style:style>
    <style:style style:name="T34" style:family="text">
      <style:text-properties fo:color="#000000" fo:font-style="normal" style:font-style-asian="normal" style:font-style-complex="normal"/>
    </style:style>
    <style:style style:name="T35" style:family="text">
      <style:text-properties style:use-window-font-color="true" fo:font-style="normal" style:font-style-asian="normal" style:font-style-complex="normal"/>
    </style:style>
    <style:style style:name="T36" style:family="text">
      <style:text-properties style:use-window-font-color="true" fo:font-style="italic" style:font-style-asian="italic" style:font-style-complex="italic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family="'Nimbus Sans L'" style:font-family-generic="swiss" style:font-pitch="variable" fo:font-size="22pt" style:font-size-asian="22pt" style:font-size-complex="22pt"/>
    </style:style>
    <style:style style:name="T39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1"><text:span text:style-name="T1">Redes </text:span><text:span text:style-name="T2">de sensores sem-fio sob a perspectiva do EPOS</text:span><text:span text:style-name="T2"><text:line-break/></text:span><text:span text:style-name="T2">– Minicurso –</text:span></text:p>
          </draw:text-box>
        </draw:frame>
        <draw:frame presentation:style-name="pr2" draw:text-style-name="P5" draw:layer="layout" svg:width="26cm" svg:height="9cm" svg:x="1cm" svg:y="11cm" presentation:class="subtitle" presentation:user-transformed="true">
          <draw:text-box>
            <text:p text:style-name="P3"><text:span text:style-name="T3">Arliones Hoeller Jr</text:span><text:span text:style-name="T4">, Antônio Augusto Fröhlich</text:span></text:p>
            <text:p text:style-name="P4"><text:span text:style-name="T5">arliones@lisha.ufsc.br</text:span></text:p>
            <text:p text:style-name="P3"><text:span text:style-name="T5">http://www.lisha.ufsc.br/Arliones</text:span></text:p>
            <text:p text:style-name="P3"><text:span text:style-name="T6"/></text:p>
            <text:p text:style-name="P3"><text:span text:style-name="T6">28 de outubro de 2010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 presentation:user-transformed="true">
          <draw:text-box>
            <text:p text:style-name="P6">Sobre o curso</text:p>
          </draw:text-box>
        </draw:frame>
        <draw:frame presentation:style-name="pr5" draw:text-style-name="P8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>Conceitos básicos de RSSF</text:p>
                <text:list>
                  <text:list-item>
                    <text:p>Aplicações</text:p>
                  </text:list-item>
                  <text:list-item>
                    <text:p>Módulos de sensoriamento</text:p>
                  </text:list-item>
                  <text:list-item>
                    <text:p>Sensores e aquisição de dados</text:p>
                  </text:list-item>
                  <text:list-item>
                    <text:p>Controle de acesso ao meio (MAC)</text:p>
                  </text:list-item>
                  <text:list-item>
                    <text:p>Sistemas operacionais para RSSF</text:p>
                  </text:list-item>
                </text:list>
              </text:list-item>
            </text:list>
            <text:p text:style-name="P7"/>
            <text:list text:continue-numbering="true" text:style-name="L3">
              <text:list-item>
                <text:p>Paralelo com projetos EPOS e EPOSMote</text:p>
              </text:list-item>
            </text:list>
            <text:p/>
            <text:list text:continue-numbering="true" text:style-name="L3">
              <text:list-item>
                <text:p>Exercícios práticos de programação no EPOS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genda</text:p>
          </draw:text-box>
        </draw:frame>
        <draw:frame presentation:style-name="pr8" draw:id="id6" draw:layer="layout" svg:width="26.67cm" svg:height="2.635cm" svg:x="0.635cm" svg:y="3.811cm" presentation:class="outline" presentation:user-transformed="true">
          <draw:text-box>
            <text:list text:style-name="L3">
              <text:list-item>
                <text:p>Redes de sensores sem-fio e aplicações</text:p>
                <text:list>
                  <text:list-item>
                    <text:p>Ex. 01: programação de aplicações no EPOS</text:p>
                  </text:list-item>
                </text:list>
              </text:list-item>
            </text:list>
          </draw:text-box>
        </draw:frame>
        <draw:frame presentation:style-name="pr9" draw:id="id11" draw:layer="layout" svg:width="26.67cm" svg:height="1.905cm" svg:x="0.635cm" svg:y="17.78cm" presentation:class="outline" presentation:user-transformed="true">
          <draw:text-box>
            <text:list text:style-name="L3">
              <text:list-item>
                <text:p>Gerência do consumo de energia para RSSF</text:p>
              </text:list-item>
            </text:list>
          </draw:text-box>
        </draw:frame>
        <draw:frame presentation:style-name="pr10" draw:id="id10" draw:layer="layout" svg:width="26.67cm" svg:height="2.635cm" svg:x="0.635cm" svg:y="13.97cm" presentation:class="outline" presentation:user-transformed="true">
          <draw:text-box>
            <text:list text:style-name="L3">
              <text:list-item>
                <text:p>Sistemas operacionais para RSSF</text:p>
                <text:list>
                  <text:list-item>
                    <text:p>Ex. 04: gerando EPOS e executando no EPOSMote</text:p>
                  </text:list-item>
                </text:list>
              </text:list-item>
            </text:list>
          </draw:text-box>
        </draw:frame>
        <draw:frame presentation:style-name="pr10" draw:id="id9" draw:layer="layout" svg:width="26.67cm" svg:height="2.635cm" svg:x="0.635cm" svg:y="11.43cm" presentation:class="outline" presentation:user-transformed="true">
          <draw:text-box>
            <text:list text:style-name="L3">
              <text:list-item>
                <text:p>Controle de acesso ao meio (MAC)</text:p>
                <text:list>
                  <text:list-item>
                    <text:p>Ex. 03: configuração do C-MAC no EPOS</text:p>
                  </text:list-item>
                </text:list>
              </text:list-item>
            </text:list>
          </draw:text-box>
        </draw:frame>
        <draw:frame presentation:style-name="pr10" draw:id="id8" draw:layer="layout" svg:width="26.67cm" svg:height="2.635cm" svg:x="0.635cm" svg:y="8.89cm" presentation:class="outline" presentation:user-transformed="true">
          <draw:text-box>
            <text:list text:style-name="L3">
              <text:list-item>
                <text:p>Sensores e aquisição de dados</text:p>
                <text:list>
                  <text:list-item>
                    <text:p>Ex. 02: aquisição de dados no EPOS</text:p>
                  </text:list-item>
                </text:list>
              </text:list-item>
            </text:list>
          </draw:text-box>
        </draw:frame>
        <draw:frame presentation:style-name="pr10" draw:id="id7" draw:layer="layout" svg:width="26.67cm" svg:height="2.635cm" svg:x="0.635cm" svg:y="6.35cm" presentation:class="outline" presentation:user-transformed="true">
          <draw:text-box>
            <text:list text:style-name="L3">
              <text:list-item>
                <text:p>Módulos de sensoriamento</text:p>
                <text:list>
                  <text:list-item>
                    <text:p>Apresentação do EPOS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ghten">
                  <anim:animateColor smil:dur="0.5s" smil:fill="hold" smil:targetElement="id11" smil:attributeName="color" smil:by="hsl(0,12%,25%)" anim:color-interpolation="hsl" anim:color-interpolation-direction="clockwise"/>
                  <anim:animateColor smil:dur="0.5s" smil:fill="hold" smil:targetElement="id11" smil:attributeName="fill-color" smil:by="hsl(0,12%,25%)" anim:color-interpolation="hsl" anim:color-interpolation-direction="clockwise"/>
                  <anim:animateColor smil:dur="0.5s" smil:fill="hold" smil:targetElement="id11" smil:attributeName="stroke-color" smil:by="hsl(0,12%,25%)" anim:color-interpolation="hsl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10" smil:attributeName="color" smil:by="hsl(0,12%,25%)" anim:color-interpolation="hsl" anim:color-interpolation-direction="clockwise"/>
                  <anim:animateColor smil:dur="0.5s" smil:fill="hold" smil:targetElement="id10" smil:attributeName="fill-color" smil:by="hsl(0,12%,25%)" anim:color-interpolation="hsl" anim:color-interpolation-direction="clockwise"/>
                  <anim:animateColor smil:dur="0.5s" smil:fill="hold" smil:targetElement="id10" smil:attributeName="stroke-color" smil:by="hsl(0,12%,25%)" anim:color-interpolation="hsl" anim:color-interpolation-direction="clockwise"/>
                  <anim:set smil:dur="0.5s" smil:fill="hold" smil:targetElement="id10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9" smil:attributeName="color" smil:by="hsl(0,12%,25%)" anim:color-interpolation="hsl" anim:color-interpolation-direction="clockwise"/>
                  <anim:animateColor smil:dur="0.5s" smil:fill="hold" smil:targetElement="id9" smil:attributeName="fill-color" smil:by="hsl(0,12%,25%)" anim:color-interpolation="hsl" anim:color-interpolation-direction="clockwise"/>
                  <anim:animateColor smil:dur="0.5s" smil:fill="hold" smil:targetElement="id9" smil:attributeName="stroke-color" smil:by="hsl(0,12%,25%)" anim:color-interpolation="hsl" anim:color-interpolation-direction="clockwise"/>
                  <anim:set smil:dur="0.5s" smil:fill="hold" smil:targetElement="id9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8" smil:attributeName="color" smil:by="hsl(0,12%,25%)" anim:color-interpolation="hsl" anim:color-interpolation-direction="clockwise"/>
                  <anim:animateColor smil:dur="0.5s" smil:fill="hold" smil:targetElement="id8" smil:attributeName="fill-color" smil:by="hsl(0,12%,25%)" anim:color-interpolation="hsl" anim:color-interpolation-direction="clockwise"/>
                  <anim:animateColor smil:dur="0.5s" smil:fill="hold" smil:targetElement="id8" smil:attributeName="stroke-color" smil:by="hsl(0,12%,25%)" anim:color-interpolation="hsl" anim:color-interpolation-direction="clockwise"/>
                  <anim:set smil:dur="0.5s" smil:fill="hold" smil:targetElement="id8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7" smil:attributeName="color" smil:by="hsl(0,12%,25%)" anim:color-interpolation="hsl" anim:color-interpolation-direction="clockwise"/>
                  <anim:animateColor smil:dur="0.5s" smil:fill="hold" smil:targetElement="id7" smil:attributeName="fill-color" smil:by="hsl(0,12%,25%)" anim:color-interpolation="hsl" anim:color-interpolation-direction="clockwise"/>
                  <anim:animateColor smil:dur="0.5s" smil:fill="hold" smil:targetElement="id7" smil:attributeName="stroke-color" smil:by="hsl(0,12%,25%)" anim:color-interpolation="hsl" anim:color-interpolation-direction="clockwise"/>
                  <anim:set smil:dur="0.5s" smil:fill="hold" smil:targetElement="id7" smil:attributeName="fill" smil:to="solid"/>
                </anim:par>
                <anim:par smil:begin="0s" presentation:text-only="true" presentation:node-type="with-previous" presentation:preset-class="emphasis" presentation:preset-id="ooo-emphasis-bold-reveal">
                  <anim:set smil:dur="indefinite" smil:targetElement="id6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3" draw:master-page-name="lisha-clear" presentation:presentation-page-layout-name="AL2T1">
        <office:forms form:automatic-focus="false" form:apply-design-mode="false"/>
        <draw:frame draw:style-name="gr2" draw:text-style-name="P9" draw:layer="layout" svg:width="14.86cm" svg:height="8.858cm" svg:x="12.065cm" svg:y="11.227cm">
          <draw:image xlink:href="Pictures/10000000000001D4000001173B237706.png" xlink:type="simple" xlink:show="embed" xlink:actuate="onLoad">
            <text:p/>
          </draw:image>
        </draw:frame>
        <draw:frame presentation:style-name="pr4" draw:text-style-name="P6" draw:layer="layout" svg:width="23.495cm" svg:height="1.906cm" svg:x="0.635cm" svg:y="0.635cm" presentation:class="title">
          <draw:text-box>
            <text:p text:style-name="P6">Redes de Sensores Sem Fios</text:p>
          </draw:text-box>
        </draw:frame>
        <draw:frame presentation:style-name="pr5" draw:text-style-name="P8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 text:style-name="P6">Micro-sensoriamento pervasivo</text:p>
                <text:list>
                  <text:list-item>
                    <text:p text:style-name="P6">Escala microscópica</text:p>
                  </text:list-item>
                  <text:list-item>
                    <text:p text:style-name="P6"><text:span text:style-name="T7">Baixíssimo consumo de energia</text:span></text:p>
                  </text:list-item>
                </text:list>
              </text:list-item>
              <text:list-item>
                <text:p text:style-name="P6">Plataformas de Hardware</text:p>
                <text:list>
                  <text:list-item>
                    <text:p text:style-name="P6">Microcontrolador</text:p>
                  </text:list-item>
                  <text:list-item>
                    <text:p text:style-name="P6">Comunicação de baixa potência</text:p>
                  </text:list-item>
                  <text:list-item>
                    <text:p text:style-name="P6">Módulo de energia</text:p>
                  </text:list-item>
                  <text:list-item>
                    <text:p text:style-name="P6">Sensores dive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text-style-name="P10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4" draw:master-page-name="lisha-clear" presentation:presentation-page-layout-name="AL3T19">
        <office:forms form:automatic-focus="false" form:apply-design-mode="false"/>
        <draw:frame presentation:style-name="pr11" draw:text-style-name="P6" draw:layer="layout" svg:width="23.501cm" svg:height="2.301cm" svg:x="0.999cm" svg:y="0.2cm" presentation:class="title" presentation:user-transformed="true">
          <draw:text-box>
            <text:p text:style-name="P6">Hardware</text:p>
          </draw:text-box>
        </draw:frame>
        <draw:line draw:style-name="gr3" draw:text-style-name="P9" draw:layer="layout" svg:x1="6.35cm" svg:y1="18.415cm" svg:x2="6.35cm" svg:y2="3.81cm">
          <text:p/>
        </draw:line>
        <draw:line draw:style-name="gr4" draw:text-style-name="P9" draw:layer="layout" svg:x1="6.35cm" svg:y1="18.415cm" svg:x2="24.765cm" svg:y2="18.415cm">
          <text:p/>
        </draw:line>
        <draw:frame draw:style-name="gr5" draw:text-style-name="P11" draw:layer="layout" svg:width="6.932cm" svg:height="0.7cm" svg:x="12.753cm" svg:y="18.982cm">
          <draw:text-box>
            <text:p text:style-name="P6"><text:span text:style-name="T8">Capacidade Computacional</text:span></text:p>
          </draw:text-box>
        </draw:frame>
        <draw:frame draw:style-name="gr5" draw:text-style-name="P11" draw:layer="layout" svg:width="5.234cm" svg:height="0.7cm" draw:transform="rotate (1.5707963267946) translate (1.202cm 13.329cm)">
          <draw:text-box>
            <text:p text:style-name="P6"><text:span text:style-name="T8">Consumo de energia</text:span></text:p>
          </draw:text-box>
        </draw:frame>
        <draw:frame draw:style-name="gr2" draw:text-style-name="P9" draw:layer="layout" svg:width="3.748cm" svg:height="2.765cm" svg:x="2.54cm" svg:y="6.985cm">
          <draw:image xlink:href="Pictures/100002000000016E0000010EBCB03FF5.png" xlink:type="simple" xlink:show="embed" xlink:actuate="onLoad">
            <text:p/>
          </draw:image>
        </draw:frame>
        <draw:frame draw:style-name="gr2" draw:text-style-name="P9" draw:layer="layout" svg:width="2.982cm" svg:height="3.162cm" svg:x="3.175cm" svg:y="9.538cm">
          <draw:image xlink:href="Pictures/100002000000011B0000012C4070230B.png" xlink:type="simple" xlink:show="embed" xlink:actuate="onLoad">
            <text:p/>
          </draw:image>
        </draw:frame>
        <draw:frame draw:style-name="gr2" draw:text-style-name="P9" draw:layer="layout" svg:width="3.175cm" svg:height="2.381cm" svg:x="3.175cm" svg:y="16.034cm">
          <draw:image xlink:href="Pictures/10000000000000C8000000965DB5BB37.png" xlink:type="simple" xlink:show="embed" xlink:actuate="onLoad">
            <text:p/>
          </draw:image>
        </draw:frame>
        <draw:frame draw:style-name="gr2" draw:text-style-name="P9" draw:layer="layout" svg:width="3.495cm" svg:height="3.175cm" svg:x="2.855cm" svg:y="12.7cm">
          <draw:image xlink:href="Pictures/100002000000013D000000F9850D37A8.png" xlink:type="simple" xlink:show="embed" xlink:actuate="onLoad">
            <text:p/>
          </draw:image>
        </draw:frame>
        <draw:frame draw:style-name="gr2" draw:text-style-name="P9" draw:layer="layout" svg:width="3.81cm" svg:height="2.858cm" svg:x="2.54cm" svg:y="3.492cm">
          <draw:image xlink:href="Pictures/10000200000004000000030067DB7AA9.png" xlink:type="simple" xlink:show="embed" xlink:actuate="onLoad">
            <text:p/>
          </draw:image>
        </draw:frame>
        <draw:frame draw:style-name="gr2" draw:text-style-name="P9" draw:layer="layout" svg:width="3.197cm" svg:height="3.577cm" svg:x="10.138cm" svg:y="14.605cm">
          <draw:image xlink:href="Pictures/100000000000020B00000249DB050BF7.png" xlink:type="simple" xlink:show="embed" xlink:actuate="onLoad">
            <text:p/>
          </draw:image>
        </draw:frame>
        <draw:frame draw:style-name="gr2" draw:text-style-name="P9" draw:layer="layout" svg:width="3cm" svg:height="2.178cm" svg:x="12.875cm" svg:y="14.967cm">
          <draw:image xlink:href="Pictures/10000000000002B2000001F563A7B646.png" xlink:type="simple" xlink:show="embed" xlink:actuate="onLoad">
            <text:p/>
          </draw:image>
        </draw:frame>
        <draw:frame draw:style-name="gr2" draw:text-style-name="P9" draw:layer="layout" svg:width="1.723cm" svg:height="1.27cm" svg:x="6.985cm" svg:y="17.145cm">
          <draw:image xlink:href="Pictures/100002000000007200000054A07C13F7.gif" xlink:type="simple" xlink:show="embed" xlink:actuate="onLoad">
            <text:p/>
          </draw:image>
        </draw:frame>
        <draw:frame draw:style-name="gr2" draw:text-style-name="P9" draw:layer="layout" svg:width="3.274cm" svg:height="2.64cm" svg:x="17.78cm" svg:y="10.695cm">
          <draw:image xlink:href="Pictures/100000000000012C000000F2875457D7.png" xlink:type="simple" xlink:show="embed" xlink:actuate="onLoad">
            <text:p/>
          </draw:image>
        </draw:frame>
        <draw:frame draw:style-name="gr2" draw:text-style-name="P9" draw:layer="layout" svg:width="3.399cm" svg:height="2.202cm" svg:x="15.651cm" svg:y="13.335cm">
          <draw:image xlink:href="Pictures/10000000000000FA000000A26A41BD19.png" xlink:type="simple" xlink:show="embed" xlink:actuate="onLoad">
            <text:p/>
          </draw:image>
        </draw:frame>
        <draw:frame draw:style-name="gr2" draw:text-style-name="P9" draw:layer="layout" svg:width="5.08cm" svg:height="3.81cm" svg:x="20.955cm" svg:y="4.445cm">
          <draw:image xlink:href="Pictures/100002000000012C000000E1ACCE03CB.png" xlink:type="simple" xlink:show="embed" xlink:actuate="onLoad">
            <text:p/>
          </draw:image>
        </draw:frame>
        <draw:rect draw:style-name="gr6" draw:text-style-name="P9" draw:layer="layout" svg:width="6.35cm" svg:height="4.445cm" svg:x="20.32cm" svg:y="4.445cm">
          <text:p/>
        </draw:rect>
        <draw:rect draw:style-name="gr6" draw:text-style-name="P9" draw:layer="layout" svg:width="11.709cm" svg:height="8.255cm" svg:x="9.881cm" svg:y="10.16cm">
          <text:p/>
        </draw:rect>
        <draw:rect draw:style-name="gr6" draw:text-style-name="P9" draw:layer="layout" svg:width="2.721cm" svg:height="1.905cm" svg:x="6.35cm" svg:y="16.51cm">
          <text:p/>
        </draw:rect>
        <draw:frame draw:style-name="gr7" draw:text-style-name="P12" draw:layer="layout" svg:width="4.201cm" svg:height="3.525cm" svg:x="14.65cm" svg:y="4.724cm">
          <draw:text-box>
            <text:p text:style-name="P1"><text:span text:style-name="T9">1,8 Ghz</text:span></text:p>
            <text:p text:style-name="P1"><text:span text:style-name="T9">512 MB RAM</text:span></text:p>
            <text:p text:style-name="P1"><text:span text:style-name="T10">40~80 W</text:span></text:p>
            <text:p text:style-name="P6"><text:span text:style-name="T9"/></text:p>
          </draw:text-box>
        </draw:frame>
        <draw:frame draw:style-name="gr7" draw:text-style-name="P12" draw:layer="layout" svg:width="4.892cm" svg:height="3.525cm" svg:x="22.27cm" svg:y="11.709cm">
          <draw:text-box>
            <text:p text:style-name="P1"><text:span text:style-name="T9">4 ~ 16 Mhz</text:span></text:p>
            <text:p text:style-name="P1"><text:span text:style-name="T9">4~128 KB RAM</text:span></text:p>
            <text:p text:style-name="P1"><text:span text:style-name="T10">&lt; 100 mW</text:span></text:p>
            <text:p text:style-name="P6"><text:span text:style-name="T9"/></text:p>
          </draw:text-box>
        </draw:frame>
        <draw:frame draw:style-name="gr5" draw:text-style-name="P13" draw:layer="layout" svg:width="2.851cm" svg:height="0.882cm" svg:x="6.5cm" svg:y="15.118cm">
          <draw:text-box>
            <text:p text:style-name="P6"><text:span text:style-name="T10">&lt; 10 mW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12" draw:text-style-name="P14" draw:layer="layout" svg:width="15.45cm" svg:height="9.96cm" svg:x="3.386cm" svg:y="12.468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lisha-clear" presentation:presentation-page-layout-name="AL3T19">
        <office:forms form:automatic-focus="false" form:apply-design-mode="false"/>
        <draw:frame presentation:style-name="pr11" draw:text-style-name="P6" draw:layer="layout" svg:width="23.501cm" svg:height="2.301cm" svg:x="0.999cm" svg:y="0.2cm" presentation:class="title" presentation:user-transformed="true">
          <draw:text-box>
            <text:p text:style-name="P6">Comunicação</text:p>
          </draw:text-box>
        </draw:frame>
        <draw:g>
          <draw:line draw:style-name="gr3" draw:text-style-name="P9" draw:layer="layout" svg:x1="6.35cm" svg:y1="18.415cm" svg:x2="6.35cm" svg:y2="3.81cm">
            <text:p/>
          </draw:line>
          <draw:line draw:style-name="gr4" draw:text-style-name="P9" draw:layer="layout" svg:x1="6.35cm" svg:y1="18.415cm" svg:x2="24.765cm" svg:y2="18.415cm">
            <text:p/>
          </draw:line>
          <draw:frame draw:style-name="gr5" draw:text-style-name="P11" draw:layer="layout" svg:width="3.732cm" svg:height="0.7cm" svg:x="14.605cm" svg:y="18.982cm">
            <draw:text-box>
              <text:p text:style-name="P6"><text:span text:style-name="T8">Taxa de dados</text:span></text:p>
            </draw:text-box>
          </draw:frame>
          <draw:frame draw:style-name="gr5" draw:text-style-name="P11" draw:layer="layout" svg:width="5.234cm" svg:height="0.7cm" draw:transform="rotate (1.5707963267946) translate (1.202cm 13.329cm)">
            <draw:text-box>
              <text:p text:style-name="P6"><text:span text:style-name="T8">Consumo de energia</text:span></text:p>
            </draw:text-box>
          </draw:frame>
          <draw:frame draw:style-name="gr2" draw:text-style-name="P9" draw:layer="layout" svg:width="3.748cm" svg:height="2.765cm" svg:x="2.54cm" svg:y="6.985cm">
            <draw:image xlink:href="Pictures/100002000000016E0000010EBCB03FF5.png" xlink:type="simple" xlink:show="embed" xlink:actuate="onLoad">
              <text:p/>
            </draw:image>
          </draw:frame>
          <draw:frame draw:style-name="gr2" draw:text-style-name="P9" draw:layer="layout" svg:width="2.982cm" svg:height="3.162cm" svg:x="3.175cm" svg:y="9.538cm">
            <draw:image xlink:href="Pictures/100002000000011B0000012C4070230B.png" xlink:type="simple" xlink:show="embed" xlink:actuate="onLoad">
              <text:p/>
            </draw:image>
          </draw:frame>
          <draw:frame draw:style-name="gr2" draw:text-style-name="P9" draw:layer="layout" svg:width="3.175cm" svg:height="2.381cm" svg:x="3.175cm" svg:y="16.034cm">
            <draw:image xlink:href="Pictures/10000000000000C8000000965DB5BB37.png" xlink:type="simple" xlink:show="embed" xlink:actuate="onLoad">
              <text:p/>
            </draw:image>
          </draw:frame>
          <draw:frame draw:style-name="gr2" draw:text-style-name="P9" draw:layer="layout" svg:width="3.495cm" svg:height="3.175cm" svg:x="2.855cm" svg:y="12.7cm">
            <draw:image xlink:href="Pictures/100002000000013D000000F9850D37A8.png" xlink:type="simple" xlink:show="embed" xlink:actuate="onLoad">
              <text:p/>
            </draw:image>
          </draw:frame>
          <draw:frame draw:style-name="gr2" draw:text-style-name="P9" draw:layer="layout" svg:width="3.81cm" svg:height="2.858cm" svg:x="2.54cm" svg:y="3.492cm">
            <draw:image xlink:href="Pictures/10000200000004000000030067DB7AA9.png" xlink:type="simple" xlink:show="embed" xlink:actuate="onLoad">
              <text:p/>
            </draw:image>
          </draw:frame>
          <draw:frame draw:style-name="gr8" draw:text-style-name="P9" draw:layer="layout" svg:width="4.709cm" svg:height="3.616cm" svg:x="16.246cm" svg:y="4.445cm">
            <draw:image xlink:href="Pictures/10000200000000FA000000C0421A85E3.png" xlink:type="simple" xlink:show="embed" xlink:actuate="onLoad">
              <text:p/>
            </draw:image>
          </draw:frame>
          <draw:frame draw:style-name="gr8" draw:text-style-name="P9" draw:layer="layout" svg:width="3.162cm" svg:height="3.81cm" svg:x="12.7cm" svg:y="6.35cm">
            <draw:image xlink:href="Pictures/10000200000000C8000000F1980C2F1A.png" xlink:type="simple" xlink:show="embed" xlink:actuate="onLoad">
              <text:p/>
            </draw:image>
          </draw:frame>
          <draw:frame draw:style-name="gr2" draw:text-style-name="P9" draw:layer="layout" svg:width="5.12cm" svg:height="2.56cm" svg:x="8.85cm" svg:y="10.795cm">
            <draw:image xlink:href="Pictures/10000200000001C6000000E3BF7684A4.png" xlink:type="simple" xlink:show="embed" xlink:actuate="onLoad">
              <text:p/>
            </draw:image>
          </draw:frame>
          <draw:frame draw:style-name="gr2" draw:text-style-name="P9" draw:layer="layout" svg:width="3.333cm" svg:height="3.095cm" svg:x="22.067cm" svg:y="3.255cm">
            <draw:image xlink:href="Pictures/100002000000007E00000075DDD674B6.gif" xlink:type="simple" xlink:show="embed" xlink:actuate="onLoad">
              <text:p/>
            </draw:image>
          </draw:frame>
          <draw:frame draw:style-name="gr2" draw:text-style-name="P9" draw:layer="layout" svg:width="4.014cm" svg:height="3.339cm" svg:x="7.416cm" svg:y="13.335cm">
            <draw:image xlink:href="Pictures/10000200000000DC000000B797209B67.png" xlink:type="simple" xlink:show="embed" xlink:actuate="onLoad">
              <text:p/>
            </draw:image>
          </draw:frame>
          <draw:rect draw:style-name="gr6" draw:text-style-name="P9" draw:layer="layout" svg:width="5.715cm" svg:height="5.715cm" svg:x="15.875cm" svg:y="3.81cm">
            <text:p/>
          </draw:rect>
          <draw:rect draw:style-name="gr6" draw:text-style-name="P9" draw:layer="layout" svg:width="4.445cm" svg:height="4.445cm" svg:x="21.59cm" svg:y="3.175cm">
            <text:p/>
          </draw:rect>
          <draw:rect draw:style-name="gr6" draw:text-style-name="P9" draw:layer="layout" svg:width="9.525cm" svg:height="12.065cm" svg:x="6.35cm" svg:y="6.35cm">
            <text:p/>
          </draw:rect>
          <draw:frame draw:style-name="gr5" draw:text-style-name="P15" draw:layer="layout" svg:width="1.573cm" svg:height="0.882cm" svg:x="24.13cm" svg:y="6.261cm">
            <draw:text-box>
              <text:p text:style-name="P6"><text:span text:style-name="T9">MAN</text:span></text:p>
            </draw:text-box>
          </draw:frame>
          <draw:frame draw:style-name="gr5" draw:text-style-name="P12" draw:layer="layout" svg:width="1.378cm" svg:height="0.882cm" svg:x="19.685cm" svg:y="8.166cm">
            <draw:text-box draw:corner-radius="2.208cm">
              <text:p text:style-name="P6"><text:span text:style-name="T9">LAN</text:span></text:p>
            </draw:text-box>
          </draw:frame>
          <draw:frame draw:style-name="gr5" draw:text-style-name="P15" draw:layer="layout" svg:width="1.454cm" svg:height="0.882cm" svg:x="13.335cm" svg:y="16.263cm">
            <draw:text-box>
              <text:p text:style-name="P6"><text:span text:style-name="T9">PAN</text:span></text:p>
            </draw:text-box>
          </draw:frame>
          <draw:frame draw:style-name="gr9" draw:text-style-name="P9" draw:layer="layout" svg:width="2.666cm" svg:height="1.905cm" svg:x="6.35cm" svg:y="16.51cm">
            <draw:image xlink:href="Pictures/1000020000000118000000C8220B953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13" draw:text-style-name="P16" draw:layer="layout" svg:width="15.892cm" svg:height="9.369cm" svg:x="3.482cm" svg:y="11.72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lisha-clear" presentation:presentation-page-layout-name="AL3T19">
        <office:forms form:automatic-focus="false" form:apply-design-mode="false"/>
        <draw:frame draw:style-name="gr2" draw:text-style-name="P9" draw:layer="layout" svg:width="4.342cm" svg:height="3.257cm" svg:x="12.658cm" svg:y="9cm">
          <draw:image xlink:href="Pictures/10000000000000F0000000B4FAABABFF.png" xlink:type="simple" xlink:show="embed" xlink:actuate="onLoad">
            <text:p/>
          </draw:image>
        </draw:frame>
        <draw:frame presentation:style-name="pr11" draw:text-style-name="P6" draw:layer="layout" svg:width="23.501cm" svg:height="2.301cm" svg:x="0.999cm" svg:y="0.2cm" presentation:class="title" presentation:user-transformed="true">
          <draw:text-box>
            <text:p text:style-name="P6">Sistemas Operacionais</text:p>
          </draw:text-box>
        </draw:frame>
        <draw:line draw:style-name="gr3" draw:text-style-name="P9" draw:layer="layout" svg:x1="6.35cm" svg:y1="18.415cm" svg:x2="6.35cm" svg:y2="3.81cm">
          <text:p/>
        </draw:line>
        <draw:line draw:style-name="gr4" draw:text-style-name="P9" draw:layer="layout" svg:x1="6.35cm" svg:y1="18.415cm" svg:x2="24.765cm" svg:y2="18.415cm">
          <text:p/>
        </draw:line>
        <draw:frame draw:style-name="gr5" draw:text-style-name="P11" draw:layer="layout" svg:width="2.385cm" svg:height="0.7cm" svg:x="14.605cm" svg:y="18.982cm">
          <draw:text-box>
            <text:p text:style-name="P6"><text:span text:style-name="T8">Recursos</text:span></text:p>
          </draw:text-box>
        </draw:frame>
        <draw:frame draw:style-name="gr5" draw:text-style-name="P11" draw:layer="layout" svg:width="2.728cm" svg:height="0.7cm" draw:transform="rotate (1.5707963267946) translate (1.3cm 12cm)">
          <draw:text-box>
            <text:p text:style-name="P6"><text:span text:style-name="T8">Plataforma</text:span></text:p>
          </draw:text-box>
        </draw:frame>
        <draw:frame draw:style-name="gr2" draw:text-style-name="P9" draw:layer="layout" svg:width="2.5cm" svg:height="2.448cm" svg:x="3cm" svg:y="13.5cm">
          <draw:image xlink:href="Pictures/10000200000000BE000000BAE6C11BEE.png" xlink:type="simple" xlink:show="embed" xlink:actuate="onLoad">
            <text:p/>
          </draw:image>
        </draw:frame>
        <draw:frame draw:style-name="gr2" draw:text-style-name="P9" draw:layer="layout" svg:width="3.258cm" svg:height="1.5cm" svg:x="2.742cm" svg:y="16.5cm">
          <draw:image xlink:href="Pictures/100000000000047D0000021163F1062F.png" xlink:type="simple" xlink:show="embed" xlink:actuate="onLoad">
            <text:p/>
          </draw:image>
        </draw:frame>
        <draw:frame draw:style-name="gr2" draw:text-style-name="P9" draw:layer="layout" svg:width="2.592cm" svg:height="1.19cm" svg:x="3cm" svg:y="11.5cm">
          <draw:image xlink:href="Pictures/10000000000000620000002D61D2AAD6.gif" xlink:type="simple" xlink:show="embed" xlink:actuate="onLoad">
            <text:p/>
          </draw:image>
        </draw:frame>
        <draw:frame draw:style-name="gr2" draw:text-style-name="P9" draw:layer="layout" svg:width="3.282cm" svg:height="1.5cm" svg:x="2.797cm" svg:y="9cm">
          <draw:image xlink:href="Pictures/100000000000008C00000040240C937C.gif" xlink:type="simple" xlink:show="embed" xlink:actuate="onLoad">
            <text:p/>
          </draw:image>
        </draw:frame>
        <draw:frame draw:style-name="gr2" draw:text-style-name="P9" draw:layer="layout" svg:width="3.181cm" svg:height="0.571cm" svg:x="2.819cm" svg:y="7cm">
          <draw:image xlink:href="Pictures/10000000000001430000003AD6626AC4.gif" xlink:type="simple" xlink:show="embed" xlink:actuate="onLoad">
            <text:p/>
          </draw:image>
        </draw:frame>
        <draw:frame draw:style-name="gr2" draw:text-style-name="P9" draw:layer="layout" svg:width="1.639cm" svg:height="2.01cm" svg:x="3.5cm" svg:y="3.5cm">
          <draw:image xlink:href="Pictures/100000000000003E0000004C46481C42.gif" xlink:type="simple" xlink:show="embed" xlink:actuate="onLoad">
            <text:p/>
          </draw:image>
        </draw:frame>
        <draw:frame draw:style-name="gr2" draw:text-style-name="P9" draw:layer="layout" svg:width="3.269cm" svg:height="4cm" svg:x="17.231cm" svg:y="6.5cm">
          <draw:image xlink:href="Pictures/100000000000012300000164D2456257.png" xlink:type="simple" xlink:show="embed" xlink:actuate="onLoad">
            <text:p/>
          </draw:image>
        </draw:frame>
        <draw:frame draw:style-name="gr2" draw:text-style-name="P9" draw:layer="layout" svg:width="5.698cm" svg:height="6.971cm" svg:x="21cm" svg:y="3.529cm">
          <draw:image xlink:href="Pictures/100000000000012300000164D2456257.png" xlink:type="simple" xlink:show="embed" xlink:actuate="onLoad">
            <text:p/>
          </draw:image>
        </draw:frame>
        <draw:frame draw:style-name="gr10" draw:layer="layout" svg:width="3.729cm" svg:height="1.427cm" svg:x="9.5cm" svg:y="11.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7" draw:layer="layout" svg:width="1.098cm" svg:height="0.946cm" svg:x="18.402cm" svg:y="8.5cm">
          <draw:text-box>
            <text:p text:style-name="P6"><text:span text:style-name="T11">μC</text:span></text:p>
          </draw:text-box>
        </draw:frame>
        <draw:rect draw:style-name="gr6" draw:text-style-name="P9" draw:layer="layout" svg:width="11cm" svg:height="9cm" svg:x="9.5cm" svg:y="4cm">
          <text:p/>
        </draw:rect>
        <draw:rect draw:style-name="gr6" draw:text-style-name="P9" draw:layer="layout" svg:width="6.5cm" svg:height="7.5cm" svg:x="20.5cm" svg:y="3cm">
          <text:p/>
        </draw:rect>
        <draw:rect draw:style-name="gr12" draw:text-style-name="P18" draw:layer="layout" svg:width="3.149cm" svg:height="6.416cm" svg:x="6.351cm" svg:y="12cm">
          <text:p text:style-name="P1"><text:span text:style-name="T12">?</text:span></text:p>
        </draw:rect>
        <draw:frame draw:style-name="gr5" draw:text-style-name="P19" draw:layer="layout" svg:width="7.529cm" svg:height="2.101cm" svg:x="9.971cm" svg:y="4.288cm">
          <draw:text-box>
            <text:p text:style-name="P1"><text:span text:style-name="T13">64KB ~ 1MB</text:span></text:p>
            <text:p text:style-name="P1"><text:span text:style-name="T13">Processos, Threads</text:span></text:p>
          </draw:text-box>
        </draw:frame>
        <draw:frame draw:style-name="gr5" draw:text-style-name="P19" draw:layer="layout" svg:width="3.952cm" svg:height="2.101cm" svg:x="22cm" svg:y="10.788cm">
          <draw:text-box>
            <text:p text:style-name="P1"><text:span text:style-name="T13">&gt; 2 MB </text:span></text:p>
            <text:p text:style-name="P1"><text:span text:style-name="T13">Processos</text:span></text:p>
          </draw:text-box>
        </draw:frame>
        <draw:frame draw:style-name="gr5" draw:text-style-name="P19" draw:layer="layout" svg:width="6.636cm" svg:height="2.101cm" svg:x="9.864cm" svg:y="14.399cm">
          <draw:text-box>
            <text:p text:style-name="P1"><text:span text:style-name="T14">&lt; 64 KB</text:span></text:p>
            <text:p text:style-name="P1"><text:span text:style-name="T13">Threads, Eventos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14" draw:text-style-name="P12" draw:layer="layout" svg:width="16.347cm" svg:height="8.813cm" svg:x="3.581cm" svg:y="11.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lisha-clear" presentation:presentation-page-layout-name="AL2T1">
        <office:forms form:automatic-focus="false" form:apply-design-mode="false"/>
        <draw:frame draw:style-name="gr2" draw:text-style-name="P9" draw:id="id12" draw:layer="layout" svg:width="26.192cm" svg:height="9.208cm" svg:x="0.903cm" svg:y="10.795cm">
          <draw:image xlink:href="Pictures/10000000000004E9000001EA6F8E683F.png" xlink:type="simple" xlink:show="embed" xlink:actuate="onLoad">
            <text:p/>
          </draw:image>
        </draw:frame>
        <draw:frame presentation:style-name="pr15" draw:layer="layout" svg:width="23.495cm" svg:height="1.906cm" svg:x="0.635cm" svg:y="0.635cm" presentation:class="title">
          <draw:text-box>
            <text:p>Aplicações</text:p>
          </draw:text-box>
        </draw:frame>
        <draw:frame presentation:style-name="pr16" draw:layer="layout" svg:width="26.67cm" svg:height="8.255cm" svg:x="0.635cm" svg:y="3.81cm" presentation:class="outline" presentation:user-transformed="true">
          <draw:text-box>
            <text:list text:style-name="L3">
              <text:list-item>
                <text:p>Plataforma depende de requisitos aplicação</text:p>
                <text:list>
                  <text:list-item>
                    <text:p>Demanda de processamento</text:p>
                  </text:list-item>
                  <text:list-item>
                    <text:p>Comunicação</text:p>
                    <text:list>
                      <text:list-item>
                        <text:p>Alcance</text:p>
                      </text:list-item>
                      <text:list-item>
                        <text:p>Taxa de transmissão</text:p>
                      </text:list-item>
                      <text:list-item>
                        <text:p>Mecanismo MAC</text:p>
                      </text:list-item>
                    </text:list>
                  </text:list-item>
                  <text:list-item>
                    <text:p>Heterogeneidade</text:p>
                  </text:list-item>
                </text:list>
              </text:list-item>
            </text:list>
          </draw:text-box>
        </draw:frame>
        <draw:custom-shape draw:style-name="gr13" draw:text-style-name="P9" draw:id="id13" draw:layer="layout" svg:width="4.445cm" svg:height="13.335cm" svg:x="0cm" svg:y="5.08cm">
          <text:p/>
          <draw:enhanced-geometry svg:viewBox="0 0 21600 21600" draw:text-areas="0 0 21600 21600" draw:type="circular-arrow" draw:modifiers="89.7292082576902 -89.6258373643365 8463.3383567227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9" draw:id="id14" draw:layer="layout" svg:width="6.685cm" svg:height="8.255cm" svg:x="7.92cm" svg:y="9.737cm">
          <text:p/>
          <draw:enhanced-geometry svg:viewBox="0 0 21600 21600" draw:mirror-vertical="true" draw:mirror-horizontal="false" draw:text-areas="0 0 21600 21600" draw:type="circular-arrow" draw:modifiers="-92.3239565603726 92.1349485827546 8631.658014476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9" draw:id="id15" draw:layer="layout" svg:width="12.065cm" svg:height="8.89cm" svg:x="6.327cm" svg:y="8.89cm">
          <text:p/>
          <draw:enhanced-geometry svg:viewBox="0 0 21600 21600" draw:mirror-vertical="true" draw:mirror-horizontal="true" draw:text-areas="0 0 21600 21600" draw:type="circular-arrow" draw:modifiers="-92.3239565603726 -0.878384992751566 8953.778079267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4T3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Classificação de aplicações</text:p>
          </draw:text-box>
        </draw:frame>
        <draw:frame presentation:style-name="pr16" draw:layer="layout" svg:width="13.014cm" svg:height="8.255cm" svg:x="0.635cm" svg:y="3.81cm" presentation:class="outline" presentation:user-transformed="true">
          <draw:text-box>
            <text:list text:style-name="L3">
              <text:list-item>
                <text:p>Objetivo &gt;&gt; Reagir</text:p>
                <text:list>
                  <text:list-item>
                    <text:p>+ processamento</text:p>
                  </text:list-item>
                  <text:list-item>
                    <text:p>+ energia</text:p>
                  </text:list-item>
                </text:list>
              </text:list-item>
              <text:list-item>
                <text:p>Interação &gt;&gt; *-1</text:p>
                <text:list>
                  <text:list-item>
                    <text:p>+ comum</text:p>
                  </text:list-item>
                  <text:list-item>
                    <text:p>Sensores → Gateway</text:p>
                  </text:list-item>
                </text:list>
              </text:list-item>
            </text:list>
          </draw:text-box>
        </draw:frame>
        <draw:frame presentation:style-name="pr17" draw:layer="layout" svg:width="15.24cm" svg:height="15.876cm" svg:x="12.7cm" svg:y="3.81cm" presentation:class="outline" presentation:user-transformed="true">
          <draw:text-box>
            <text:list text:style-name="L3">
              <text:list-item>
                <text:p>Mobilidade &gt;&gt; Roteamento</text:p>
                <text:list>
                  <text:list-item>
                    <text:p>+ energia</text:p>
                  </text:list-item>
                  <text:list-item>
                    <text:p>+ processamento</text:p>
                  </text:list-item>
                </text:list>
              </text:list-item>
              <text:list-item>
                <text:p>Espaço &gt;&gt; semântica</text:p>
                <text:list>
                  <text:list-item>
                    <text:p>Leituras individuais válidas?</text:p>
                  </text:list-item>
                </text:list>
              </text:list-item>
              <text:list-item>
                <text:p>Tempo &gt;&gt; eventos</text:p>
                <text:list>
                  <text:list-item>
                    <text:p>Modo quiescente</text:p>
                    <text:list>
                      <text:list-item>
                        <text:p>- consumo</text:p>
                      </text:list-item>
                      <text:list-item>
                        <text:p>- intera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id="id16" draw:layer="layout" svg:width="25.187cm" svg:height="4.892cm" svg:x="1.893cm" svg:y="15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20"><text:span text:style-name="T15">Aplicação</text:span></text:p>
              </table:table-cell>
              <table:table-cell>
                <text:p text:style-name="P21"><text:span text:style-name="T15">Objetivo</text:span></text:p>
              </table:table-cell>
              <table:table-cell>
                <text:p text:style-name="P21"><text:span text:style-name="T15">Interação</text:span></text:p>
              </table:table-cell>
              <table:table-cell>
                <text:p text:style-name="P21"><text:span text:style-name="T15">Mobilidade</text:span></text:p>
              </table:table-cell>
              <table:table-cell>
                <text:p text:style-name="P21"><text:span text:style-name="T15">Espaço</text:span></text:p>
              </table:table-cell>
              <table:table-cell>
                <text:p text:style-name="P21"><text:span text:style-name="T15">Tempo</text:span></text:p>
              </table:table-cell>
            </table:table-row>
            <table:table-row table:style-name="ro2" table:default-cell-style-name="ce4">
              <table:table-cell table:style-name="ce3">
                <text:p text:style-name="P7">Monitoramento de habitat</text:p>
              </table:table-cell>
              <table:table-cell>
                <text:p text:style-name="P9">AS</text:p>
              </table:table-cell>
              <table:table-cell>
                <text:p text:style-name="P9">*-1</text:p>
              </table:table-cell>
              <table:table-cell>
                <text:p text:style-name="P9">E</text:p>
              </table:table-cell>
              <table:table-cell>
                <text:p text:style-name="P9">G</text:p>
              </table:table-cell>
              <table:table-cell>
                <text:p text:style-name="P9">P</text:p>
              </table:table-cell>
            </table:table-row>
            <table:table-row table:style-name="ro3" table:default-cell-style-name="ce4">
              <table:table-cell table:style-name="ce3">
                <text:p text:style-name="P7">Resgate em avalanches</text:p>
              </table:table-cell>
              <table:table-cell>
                <text:p text:style-name="P9">AS</text:p>
              </table:table-cell>
              <table:table-cell>
                <text:p text:style-name="P9">*-*</text:p>
              </table:table-cell>
              <table:table-cell>
                <text:p text:style-name="P9">E</text:p>
              </table:table-cell>
              <table:table-cell>
                <text:p text:style-name="P9">R</text:p>
              </table:table-cell>
              <table:table-cell>
                <text:p text:style-name="P9">P</text:p>
              </table:table-cell>
            </table:table-row>
            <table:table-row table:style-name="ro4" table:default-cell-style-name="ce4">
              <table:table-cell table:style-name="ce3">
                <text:p text:style-name="P7">Navegação de robô</text:p>
              </table:table-cell>
              <table:table-cell>
                <text:p text:style-name="P9">AS</text:p>
              </table:table-cell>
              <table:table-cell>
                <text:p text:style-name="P9">*-1</text:p>
              </table:table-cell>
              <table:table-cell>
                <text:p text:style-name="P9">CM</text:p>
              </table:table-cell>
              <table:table-cell>
                <text:p text:style-name="P9">R</text:p>
              </table:table-cell>
              <table:table-cell>
                <text:p text:style-name="P9">BE</text:p>
              </table:table-cell>
            </table:table-row>
            <table:table-row table:style-name="ro5" table:default-cell-style-name="ce4">
              <table:table-cell table:style-name="ce3">
                <text:p text:style-name="P7">Controle de tráfego veicular</text:p>
              </table:table-cell>
              <table:table-cell>
                <text:p text:style-name="P9">SR</text:p>
              </table:table-cell>
              <table:table-cell>
                <text:p text:style-name="P9">*-*</text:p>
              </table:table-cell>
              <table:table-cell>
                <text:p text:style-name="P9">E</text:p>
              </table:table-cell>
              <table:table-cell>
                <text:p text:style-name="P9">R</text:p>
              </table:table-cell>
              <table:table-cell>
                <text:p text:style-name="P9">P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Aplicações no EPOS</text:p>
          </draw:text-box>
        </draw:frame>
        <draw:frame presentation:style-name="pr18" draw:layer="layout" svg:width="26.67cm" svg:height="15.876cm" svg:x="0.635cm" svg:y="3.81cm" presentation:class="outline">
          <draw:text-box>
            <text:list text:style-name="L3">
              <text:list-item>
                <text:p>Modelo de programação orientada a objetos</text:p>
                <text:list>
                  <text:list-item>
                    <text:p>C++</text:p>
                  </text:list-item>
                  <text:list-item>
                    <text:p>Componentes com interfaces uniformes</text:p>
                  </text:list-item>
                </text:list>
              </text:list-item>
              <text:list-item>
                <text:p>Biblioteca de componentes</text:p>
                <text:list>
                  <text:list-item>
                    <text:p>Abstrações: funcionalidades abstratas de alto-nível</text:p>
                  </text:list-item>
                  <text:list-item>
                    <text:p>Mediadores: acesso uniforme a componentes de hardware</text:p>
                  </text:list-item>
                  <text:list-item>
                    <text:p>Utilitários: estruturas de dados e algoritmos</text:p>
                    <text:list>
                      <text:list-item>
                        <text:p>list, queue, random, etc</text:p>
                      </text:list-item>
                    </text:list>
                  </text:list-item>
                </text:list>
              </text:list-item>
              <text:list-item>
                <text:p>Compilação</text:p>
                <text:list>
                  <text:list-item>
                    <text:p>Pelo GCC, sem ferramentas complex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Ex. 1: Aplicações no EPOS</text:p>
          </draw:text-box>
        </draw:frame>
        <draw:frame presentation:style-name="pr19" draw:layer="layout" svg:width="26.67cm" svg:height="5.209cm" svg:x="0.635cm" svg:y="3.81cm" presentation:class="outline" presentation:user-transformed="true">
          <draw:text-box>
            <text:list text:style-name="L3">
              <text:list-item>
                <text:p>Compilar o EPOS</text:p>
                <text:list>
                  <text:list-item>
                    <text:p><text:span text:style-name="T16">cd $EPOS &amp;&amp; make all</text:span></text:p>
                  </text:list-item>
                </text:list>
              </text:list-item>
              <text:list-item>
                <text:p>Criar arquivo para aplicação em <text:span text:style-name="T16">$EPOS/app</text:span></text:p>
                <text:list>
                  <text:list-item>
                    <text:p><text:span text:style-name="T17">Ex.: </text:span><text:span text:style-name="T16">hello_epos.cc</text:span></text:p>
                  </text:list-item>
                </text:list>
              </text:list-item>
            </text:list>
          </draw:text-box>
        </draw:frame>
        <draw:frame presentation:style-name="pr19" draw:text-style-name="P22" draw:layer="layout" svg:width="15.875cm" svg:height="7.47cm" svg:x="6.063cm" svg:y="9.511cm" presentation:class="outline" presentation:user-transformed="true">
          <draw:text-box>
            <text:p><text:span text:style-name="T18">#include &lt;utility/ostream.h&gt;</text:span></text:p>
            <text:p><text:span text:style-name="T18">__USING_SYS</text:span></text:p>
            <text:p><text:span text:style-name="T18"/></text:p>
            <text:p><text:span text:style-name="T18">int main() {</text:span></text:p>
            <text:p><text:span text:style-name="T18"><text:s text:c="4"/></text:span><text:span text:style-name="T18">OStream cout;</text:span></text:p>
            <text:p><text:span text:style-name="T18"><text:s text:c="4"/></text:span><text:span text:style-name="T18">cout &lt;&lt; "Hello EPOS!\n";</text:span></text:p>
            <text:p><text:span text:style-name="T18">}</text:span></text:p>
          </draw:text-box>
        </draw:frame>
        <draw:frame presentation:style-name="pr19" draw:layer="layout" svg:width="26.67cm" svg:height="3.175cm" svg:x="0.635cm" svg:y="17.211cm" presentation:class="outline" presentation:user-transformed="true">
          <draw:text-box>
            <text:list text:style-name="L3">
              <text:list-item>
                <text:p>Compilar aplicação e gerar imagem do sistema</text:p>
                <text:list>
                  <text:list-item>
                    <text:p><text:span text:style-name="T16">make APPLICATION=hello_ep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genda</text:p>
          </draw:text-box>
        </draw:frame>
        <draw:frame presentation:style-name="pr8" draw:id="id22" draw:layer="layout" svg:width="26.67cm" svg:height="2.635cm" svg:x="0.635cm" svg:y="3.811cm" presentation:class="outline" presentation:user-transformed="true">
          <draw:text-box>
            <text:list text:style-name="L3">
              <text:list-item>
                <text:p>Redes de sensores sem-fio e aplicações</text:p>
                <text:list>
                  <text:list-item>
                    <text:p>Ex. 01: programação de aplicações no EPOS</text:p>
                  </text:list-item>
                </text:list>
              </text:list-item>
            </text:list>
          </draw:text-box>
        </draw:frame>
        <draw:frame presentation:style-name="pr9" draw:id="id17" draw:layer="layout" svg:width="26.67cm" svg:height="1.905cm" svg:x="0.635cm" svg:y="17.78cm" presentation:class="outline" presentation:user-transformed="true">
          <draw:text-box>
            <text:list text:style-name="L3">
              <text:list-item>
                <text:p>Gerência do consumo de energia para RSSF</text:p>
              </text:list-item>
            </text:list>
          </draw:text-box>
        </draw:frame>
        <draw:frame presentation:style-name="pr10" draw:id="id18" draw:layer="layout" svg:width="26.67cm" svg:height="2.635cm" svg:x="0.635cm" svg:y="13.97cm" presentation:class="outline" presentation:user-transformed="true">
          <draw:text-box>
            <text:list text:style-name="L3">
              <text:list-item>
                <text:p>Sistemas operacionais para RSSF</text:p>
                <text:list>
                  <text:list-item>
                    <text:p>Ex. 04: gerando EPOS e executando no EPOSMote</text:p>
                  </text:list-item>
                </text:list>
              </text:list-item>
            </text:list>
          </draw:text-box>
        </draw:frame>
        <draw:frame presentation:style-name="pr10" draw:id="id19" draw:layer="layout" svg:width="26.67cm" svg:height="2.635cm" svg:x="0.635cm" svg:y="11.43cm" presentation:class="outline" presentation:user-transformed="true">
          <draw:text-box>
            <text:list text:style-name="L3">
              <text:list-item>
                <text:p>Controle de acesso ao meio (MAC)</text:p>
                <text:list>
                  <text:list-item>
                    <text:p>Ex. 03: configuração do C-MAC no EPOS</text:p>
                  </text:list-item>
                </text:list>
              </text:list-item>
            </text:list>
          </draw:text-box>
        </draw:frame>
        <draw:frame presentation:style-name="pr10" draw:id="id20" draw:layer="layout" svg:width="26.67cm" svg:height="2.635cm" svg:x="0.635cm" svg:y="8.89cm" presentation:class="outline" presentation:user-transformed="true">
          <draw:text-box>
            <text:list text:style-name="L3">
              <text:list-item>
                <text:p>Sensores e aquisição de dados</text:p>
                <text:list>
                  <text:list-item>
                    <text:p>Ex. 02: aquisição de dados no EPOS</text:p>
                  </text:list-item>
                </text:list>
              </text:list-item>
            </text:list>
          </draw:text-box>
        </draw:frame>
        <draw:frame presentation:style-name="pr10" draw:id="id21" draw:layer="layout" svg:width="26.67cm" svg:height="2.635cm" svg:x="0.635cm" svg:y="6.35cm" presentation:class="outline" presentation:user-transformed="true">
          <draw:text-box>
            <text:list text:style-name="L3">
              <text:list-item>
                <text:p>Módulos de sensoriamento</text:p>
                <text:list>
                  <text:list-item>
                    <text:p>Apresentação do EPOS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lighten">
                  <anim:animateColor smil:dur="0.5s" smil:fill="hold" smil:targetElement="id17" smil:attributeName="color" smil:by="hsl(0,12%,25%)" anim:color-interpolation="hsl" anim:color-interpolation-direction="clockwise"/>
                  <anim:animateColor smil:dur="0.5s" smil:fill="hold" smil:targetElement="id17" smil:attributeName="fill-color" smil:by="hsl(0,12%,25%)" anim:color-interpolation="hsl" anim:color-interpolation-direction="clockwise"/>
                  <anim:animateColor smil:dur="0.5s" smil:fill="hold" smil:targetElement="id17" smil:attributeName="stroke-color" smil:by="hsl(0,12%,25%)" anim:color-interpolation="hsl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18" smil:attributeName="color" smil:by="hsl(0,12%,25%)" anim:color-interpolation="hsl" anim:color-interpolation-direction="clockwise"/>
                  <anim:animateColor smil:dur="0.5s" smil:fill="hold" smil:targetElement="id18" smil:attributeName="fill-color" smil:by="hsl(0,12%,25%)" anim:color-interpolation="hsl" anim:color-interpolation-direction="clockwise"/>
                  <anim:animateColor smil:dur="0.5s" smil:fill="hold" smil:targetElement="id18" smil:attributeName="stroke-color" smil:by="hsl(0,12%,25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19" smil:attributeName="color" smil:by="hsl(0,12%,25%)" anim:color-interpolation="hsl" anim:color-interpolation-direction="clockwise"/>
                  <anim:animateColor smil:dur="0.5s" smil:fill="hold" smil:targetElement="id19" smil:attributeName="fill-color" smil:by="hsl(0,12%,25%)" anim:color-interpolation="hsl" anim:color-interpolation-direction="clockwise"/>
                  <anim:animateColor smil:dur="0.5s" smil:fill="hold" smil:targetElement="id19" smil:attributeName="stroke-color" smil:by="hsl(0,12%,25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0" smil:attributeName="color" smil:by="hsl(0,12%,25%)" anim:color-interpolation="hsl" anim:color-interpolation-direction="clockwise"/>
                  <anim:animateColor smil:dur="0.5s" smil:fill="hold" smil:targetElement="id20" smil:attributeName="fill-color" smil:by="hsl(0,12%,25%)" anim:color-interpolation="hsl" anim:color-interpolation-direction="clockwise"/>
                  <anim:animateColor smil:dur="0.5s" smil:fill="hold" smil:targetElement="id20" smil:attributeName="stroke-color" smil:by="hsl(0,12%,25%)" anim:color-interpolation="hsl" anim:color-interpolation-direction="clockwise"/>
                  <anim:set smil:dur="0.5s" smil:fill="hold" smil:targetElement="id20" smil:attributeName="fill" smil:to="solid"/>
                </anim:par>
                <anim:par smil:begin="0s" presentation:text-only="true" presentation:node-type="with-previous" presentation:preset-class="emphasis" presentation:preset-id="ooo-emphasis-bold-reveal">
                  <anim:set smil:dur="indefinite" smil:targetElement="id21" smil:attributeName="font-weight" smil:to="bol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22" anim:sub-item="text" smil:attributeName="color" smil:by="hsl(0,12%,25%)" anim:color-interpolation="hsl" anim:color-interpolation-direction="clockwise"/>
                  <anim:animateColor smil:dur="0s" smil:fill="hold" smil:targetElement="id22" anim:sub-item="text" smil:attributeName="fill-color" smil:by="hsl(0,12%,25%)" anim:color-interpolation="hsl" anim:color-interpolation-direction="clockwise"/>
                  <anim:animateColor smil:dur="0s" smil:fill="hold" smil:targetElement="id22" anim:sub-item="text" smil:attributeName="stroke-color" smil:by="hsl(0,12%,25%)" anim:color-interpolation="hsl" anim:color-interpolation-direction="clockwise"/>
                  <anim:set smil:dur="0s" smil:fill="hold" smil:targetElement="id22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draw:style-name="gr2" draw:text-style-name="P9" draw:layer="layout" svg:width="8.146cm" svg:height="6.631cm" svg:x="0.94cm" svg:y="12.816cm">
          <draw:image xlink:href="Pictures/100000000000011D000000E8462EF70E.png" xlink:type="simple" xlink:show="embed" xlink:actuate="onLoad">
            <text:p/>
          </draw:image>
        </draw:frame>
        <draw:frame presentation:style-name="pr7" draw:layer="layout" svg:width="23.495cm" svg:height="1.906cm" svg:x="0.635cm" svg:y="0.635cm" presentation:class="title">
          <draw:text-box>
            <text:p>Módulos de sensoriamento</text:p>
          </draw:text-box>
        </draw:frame>
        <draw:frame presentation:style-name="pr20" draw:layer="layout" svg:width="26.67cm" svg:height="8.953cm" svg:x="0.635cm" svg:y="3.81cm" presentation:class="outline" presentation:user-transformed="true">
          <draw:text-box>
            <text:list text:style-name="L3">
              <text:list-item>
                <text:p>Compostos por quatro componentes principais</text:p>
                <text:list>
                  <text:list-item>
                    <text:p>processador, rádio, sensores, alimentação</text:p>
                  </text:list-item>
                </text:list>
              </text:list-item>
              <text:list-item>
                <text:p>Módulos de sensoriamento devem apresentar:</text:p>
                <text:list>
                  <text:list-item>
                    <text:p>dimensões reduzidas</text:p>
                  </text:list-item>
                  <text:list-item>
                    <text:p>consumo de energia</text:p>
                  </text:list-item>
                  <text:list-item>
                    <text:p>Modularidade</text:p>
                  </text:list-item>
                  <text:list-item>
                    <text:p>canal de comunicação adaptável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466cm" svg:height="4.996cm" svg:x="11.544cm" svg:y="13.335cm">
          <draw:image xlink:href="Pictures/100000000000020B00000249DB050BF7.png" xlink:type="simple" xlink:show="embed" xlink:actuate="onLoad">
            <text:p/>
          </draw:image>
        </draw:frame>
        <draw:frame draw:style-name="gr2" draw:text-style-name="P9" draw:layer="layout" svg:width="8.408cm" svg:height="3.297cm" svg:x="17.78cm" svg:y="15.118cm">
          <draw:image xlink:href="Pictures/1000020100000660000002808E2596D0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Requisitos de módulos (1/4)</text:p>
          </draw:text-box>
        </draw:frame>
        <draw:frame presentation:style-name="pr21" draw:layer="layout" svg:width="26.67cm" svg:height="11.43cm" svg:x="0.635cm" svg:y="3.81cm" presentation:class="outline" presentation:user-transformed="true">
          <draw:text-box>
            <text:list text:style-name="L3">
              <text:list-item>
                <text:p>Dimensões reduzidas</text:p>
                <text:list>
                  <text:list-item>
                    <text:p>Instalação não-intrusiva</text:p>
                  </text:list-item>
                  <text:list-item>
                    <text:p>Viabilizado pela miniaturização de componentes eletrônicos</text:p>
                  </text:list-item>
                </text:list>
              </text:list-item>
              <text:list-item>
                <text:p>Grande limitação: fonte de alimentação</text:p>
                <text:list>
                  <text:list-item>
                    <text:p>Baterias são grandes</text:p>
                  </text:list-item>
                  <text:list-item>
                    <text:p>Técnicas de captura de energia do ambiente são maiores ainda!</text:p>
                    <text:list>
                      <text:list-item>
                        <text:p>Painéis solares, mini-captadores eólicos, et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4" draw:layer="layout" svg:width="8.147cm" svg:height="1.051cm" svg:x="9.525cm" svg:y="17.145cm">
          <draw:text-box>
            <text:p><text:span text:style-name="T19">Foto: bateria X emote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draw:style-name="gr2" draw:text-style-name="P9" draw:layer="layout" svg:width="2.987cm" svg:height="2.24cm" svg:x="15.151cm" svg:y="17.78cm">
          <draw:image xlink:href="Pictures/10000000000000780000005A262A2FA0.jpg" xlink:type="simple" xlink:show="embed" xlink:actuate="onLoad">
            <text:p/>
          </draw:image>
        </draw:frame>
        <draw:frame draw:style-name="gr2" draw:text-style-name="P9" draw:layer="layout" svg:width="2.979cm" svg:height="3.2cm" svg:x="10.399cm" svg:y="13.31cm">
          <draw:image xlink:href="Pictures/1000000000000087000000918D313B01.jpg" xlink:type="simple" xlink:show="embed" xlink:actuate="onLoad">
            <text:p/>
          </draw:image>
        </draw:frame>
        <draw:frame presentation:style-name="pr7" draw:layer="layout" svg:width="23.495cm" svg:height="1.906cm" svg:x="0.635cm" svg:y="0.635cm" presentation:class="title">
          <draw:text-box>
            <text:p>Requisitos de módulos (2/4)</text:p>
          </draw:text-box>
        </draw:frame>
        <draw:frame presentation:style-name="pr22" draw:layer="layout" svg:width="26.67cm" svg:height="9.291cm" svg:x="0.635cm" svg:y="3.81cm" presentation:class="outline" presentation:user-transformed="true">
          <draw:text-box>
            <text:list text:style-name="L3">
              <text:list-item>
                <text:p>Tempo de operação → duração da bateria</text:p>
                <text:list>
                  <text:list-item>
                    <text:p>Fator determinante no projeto de hardware</text:p>
                  </text:list-item>
                  <text:list-item>
                    <text:p>Prioridade para componentes:</text:p>
                    <text:list>
                      <text:list-item>
                        <text:p>de baixa potência, suporte a gerência de energia</text:p>
                      </text:list-item>
                      <text:list-item>
                        <text:p>DVS, DPM, sleep modes, etc</text:p>
                      </text:list-item>
                    </text:list>
                  </text:list-item>
                  <text:list-item>
                    <text:p>Decisões que abrem mão de</text:p>
                    <text:list>
                      <text:list-item>
                        <text:p>alta capacidade de processamento</text:p>
                      </text:list-item>
                      <text:list-item>
                        <text:p>potênc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5" draw:layer="layout" svg:width="1.695cm" svg:height="3.146cm" svg:x="13.454cm" svg:y="15.113cm">
          <draw:text-box>
            <text:p text:style-name="P9"><text:span text:style-name="T20">X</text:span></text:p>
          </draw:text-box>
        </draw:frame>
        <draw:frame draw:style-name="standard" draw:layer="layout" svg:width="9.622cm" svg:height="7.394cm" svg:x="18.099cm" svg:y="13.33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5">
              <table:table-cell table:number-columns-spanned="2">
                <text:p text:style-name="P26"><text:span text:style-name="T21">MeshNetics ZigBit</text:span></text:p>
              </table:table-cell>
              <table:covered-table-cell/>
            </table:table-row>
            <table:table-row table:style-name="ro6">
              <table:table-cell table:style-name="ce6">
                <text:p text:style-name="P27"><text:span text:style-name="T22">Rx current</text:span></text:p>
              </table:table-cell>
              <table:table-cell table:style-name="ce7">
                <text:p text:style-name="P28"><text:span text:style-name="T22">19 mA</text:span></text:p>
              </table:table-cell>
            </table:table-row>
            <table:table-row table:style-name="ro6">
              <table:table-cell table:style-name="ce6">
                <text:p text:style-name="P27"><text:span text:style-name="T22">Tx current</text:span></text:p>
              </table:table-cell>
              <table:table-cell table:style-name="ce7">
                <text:p text:style-name="P28"><text:span text:style-name="T22">18 mA</text:span></text:p>
              </table:table-cell>
            </table:table-row>
            <table:table-row table:style-name="ro6">
              <table:table-cell table:style-name="ce6">
                <text:p text:style-name="P27"><text:span text:style-name="T22">Sleep current</text:span></text:p>
              </table:table-cell>
              <table:table-cell table:style-name="ce7">
                <text:p text:style-name="P28"><text:span text:style-name="T22">6 uA</text:span></text:p>
              </table:table-cell>
            </table:table-row>
            <table:table-row table:style-name="ro6">
              <table:table-cell table:style-name="ce6">
                <text:p text:style-name="P27"><text:span text:style-name="T22">CPU</text:span></text:p>
              </table:table-cell>
              <table:table-cell table:style-name="ce7">
                <text:p text:style-name="P28"><text:span text:style-name="T22">8 bits @ 8 MHz</text:span></text:p>
              </table:table-cell>
            </table:table-row>
            <table:table-row table:style-name="ro6">
              <table:table-cell table:style-name="ce6">
                <text:p text:style-name="P27"><text:span text:style-name="T22">RAM</text:span></text:p>
              </table:table-cell>
              <table:table-cell table:style-name="ce7">
                <text:p text:style-name="P28"><text:span text:style-name="T22">8 KB</text:span></text:p>
              </table:table-cell>
            </table:table-row>
            <table:table-row table:style-name="ro6">
              <table:table-cell table:style-name="ce6">
                <text:p text:style-name="P27"><text:span text:style-name="T22">Flash</text:span></text:p>
              </table:table-cell>
              <table:table-cell table:style-name="ce7">
                <text:p text:style-name="P28"><text:span text:style-name="T22">128 KB</text:span></text:p>
              </table:table-cell>
            </table:table-row>
            <table:table-row table:style-name="ro7" table:default-cell-style-name="ce3">
              <table:table-cell>
                <text:p>Tamanho (mm)</text:p>
              </table:table-cell>
              <table:table-cell>
                <text:p text:style-name="P9">18,8 x 13,5 x 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986cm" svg:height="6.683cm" svg:x="0.4cm" svg:y="13.33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 table:default-cell-style-name="ce5">
              <table:table-cell table:number-columns-spanned="2">
                <text:p text:style-name="P26"><text:span text:style-name="T21">Freescale MC13224V</text:span></text:p>
              </table:table-cell>
              <table:covered-table-cell/>
            </table:table-row>
            <table:table-row table:style-name="ro6">
              <table:table-cell table:style-name="ce6">
                <text:p text:style-name="P27"><text:span text:style-name="T22">Rx current</text:span></text:p>
              </table:table-cell>
              <table:table-cell table:style-name="ce7">
                <text:p text:style-name="P28"><text:span text:style-name="T22">22 mA</text:span></text:p>
              </table:table-cell>
            </table:table-row>
            <table:table-row table:style-name="ro6">
              <table:table-cell table:style-name="ce6">
                <text:p text:style-name="P27"><text:span text:style-name="T22">Tx current</text:span></text:p>
              </table:table-cell>
              <table:table-cell table:style-name="ce7">
                <text:p text:style-name="P28"><text:span text:style-name="T22">29 mA</text:span></text:p>
              </table:table-cell>
            </table:table-row>
            <table:table-row table:style-name="ro6">
              <table:table-cell table:style-name="ce6">
                <text:p text:style-name="P27"><text:span text:style-name="T22">Sleep current</text:span></text:p>
              </table:table-cell>
              <table:table-cell table:style-name="ce7">
                <text:p text:style-name="P28"><text:span text:style-name="T22">0,85 uA</text:span></text:p>
              </table:table-cell>
            </table:table-row>
            <table:table-row table:style-name="ro6">
              <table:table-cell table:style-name="ce6">
                <text:p text:style-name="P27"><text:span text:style-name="T22">CPU</text:span></text:p>
              </table:table-cell>
              <table:table-cell table:style-name="ce7">
                <text:p text:style-name="P28"><text:span text:style-name="T22">32 bits @ 24 MHz</text:span></text:p>
              </table:table-cell>
            </table:table-row>
            <table:table-row table:style-name="ro6">
              <table:table-cell table:style-name="ce6">
                <text:p text:style-name="P27"><text:span text:style-name="T22">RAM</text:span></text:p>
              </table:table-cell>
              <table:table-cell table:style-name="ce7">
                <text:p text:style-name="P28"><text:span text:style-name="T22">96 KB</text:span></text:p>
              </table:table-cell>
            </table:table-row>
            <table:table-row table:style-name="ro6">
              <table:table-cell table:style-name="ce6">
                <text:p text:style-name="P27"><text:span text:style-name="T22">Flash</text:span></text:p>
              </table:table-cell>
              <table:table-cell table:style-name="ce7">
                <text:p text:style-name="P28"><text:span text:style-name="T22">128 KB</text:span></text:p>
              </table:table-cell>
            </table:table-row>
            <table:table-row table:style-name="ro1" table:default-cell-style-name="ce3">
              <table:table-cell>
                <text:p>Tamanho (mm)</text:p>
              </table:table-cell>
              <table:table-cell>
                <text:p text:style-name="P9">9,5 x 9,5 x 1,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Requisitos de módulos (3/4)</text:p>
          </draw:text-box>
        </draw:frame>
        <draw:frame presentation:style-name="pr23" draw:layer="layout" svg:width="26.67cm" svg:height="6.35cm" svg:x="0.635cm" svg:y="3.81cm" presentation:class="outline" presentation:user-transformed="true">
          <draw:text-box>
            <text:list text:style-name="L3">
              <text:list-item>
                <text:p>Modularidade</text:p>
                <text:list>
                  <text:list-item>
                    <text:p>Diferentes aplicações demandam diferentes sensores</text:p>
                  </text:list-item>
                  <text:list-item>
                    <text:p>Hardware não utilizado gera desperdício</text:p>
                    <text:list>
                      <text:list-item>
                        <text:p>de tamanho e de energia</text:p>
                      </text:list-item>
                    </text:list>
                  </text:list-item>
                  <text:list-item>
                    <text:p>Remoção e inclusão de componentes facilitada</text:p>
                  </text:list-item>
                </text:list>
              </text:list-item>
            </text:list>
          </draw:text-box>
        </draw:frame>
        <draw:frame draw:style-name="gr5" draw:text-style-name="P29" draw:layer="layout" svg:width="9.836cm" svg:height="1.051cm" svg:x="7.62cm" svg:y="14.189cm">
          <draw:text-box>
            <text:p><text:span text:style-name="T23">Foto: módulos EPOSMote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Requisitos de módulos (4/4)</text:p>
          </draw:text-box>
        </draw:frame>
        <draw:frame presentation:style-name="pr21" draw:layer="layout" svg:width="26.67cm" svg:height="11.43cm" svg:x="0.635cm" svg:y="3.81cm" presentation:class="outline" presentation:user-transformed="true">
          <draw:text-box>
            <text:list text:style-name="L3">
              <text:list-item>
                <text:p>Ampla configuração do canal de comunicação</text:p>
                <text:list>
                  <text:list-item>
                    <text:p>Transceptor é o vilão do consumo de energia</text:p>
                  </text:list-item>
                  <text:list-item>
                    <text:p>Melhor permanecer desligado sempre que possível</text:p>
                  </text:list-item>
                  <text:list-item>
                    <text:p>Aplicações</text:p>
                    <text:list>
                      <text:list-item>
                        <text:p>padrões de comunicação específicos</text:p>
                      </text:list-item>
                      <text:list-item>
                        <text:p>beneficiam-se de características do canal de comunicação</text:p>
                        <text:list>
                          <text:list-item>
                            <text:p>modulação</text:p>
                          </text:list-item>
                          <text:list-item>
                            <text:p>MAC</text:p>
                          </text:list-item>
                        </text:list>
                      </text:list-item>
                      <text:list-item>
                        <text:p>permite controle do consumo de energia sem comprometer comunica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9" draw:layer="layout" svg:width="7.296cm" svg:height="1.051cm" svg:x="9.525cm" svg:y="17.145cm">
          <draw:text-box>
            <text:p><text:span text:style-name="T23">Foto: figura C-MAC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3T19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Integração de componentes</text:p>
          </draw:text-box>
        </draw:frame>
        <draw:frame draw:style-name="gr2" draw:text-style-name="P9" draw:layer="layout" svg:width="8.36cm" svg:height="7.786cm" svg:x="0.53cm" svg:y="3.009cm">
          <draw:image xlink:href="Pictures/100000000000016C00000153483253CA.jpg" xlink:type="simple" xlink:show="embed" xlink:actuate="onLoad">
            <text:p/>
          </draw:image>
        </draw:frame>
        <draw:g draw:id="id23">
          <draw:frame draw:style-name="gr2" draw:text-style-name="P9" draw:layer="layout" svg:width="3.362cm" svg:height="2.54cm" svg:x="10.795cm" svg:y="6.985cm">
            <draw:image xlink:href="Pictures/10000000000001A600000127908FFA4F.jpg" xlink:type="simple" xlink:show="embed" xlink:actuate="onLoad">
              <text:p/>
            </draw:image>
          </draw:frame>
          <draw:frame draw:style-name="gr2" draw:text-style-name="P9" draw:layer="layout" svg:width="10.922cm" svg:height="6.826cm" svg:x="16.51cm" svg:y="3.81cm">
            <draw:image xlink:href="Pictures/100000000000028000000190DEF273F2.gif" xlink:type="simple" xlink:show="embed" xlink:actuate="onLoad">
              <text:p/>
            </draw:image>
          </draw:frame>
          <draw:line draw:style-name="gr14" draw:layer="layout" svg:x1="13.335cm" svg:y1="6.985cm" svg:x2="16.51cm" svg:y2="3.81cm">
            <text:p/>
          </draw:line>
          <draw:line draw:style-name="gr14" draw:layer="layout" svg:x1="13.97cm" svg:y1="8.89cm" svg:x2="16.51cm" svg:y2="10.795cm">
            <text:p/>
          </draw:line>
          <draw:frame draw:style-name="gr5" draw:layer="layout" svg:width="5.687cm" svg:height="1.051cm" svg:x="8.918cm" svg:y="10.16cm">
            <draw:text-box>
              <text:p>single-package</text:p>
            </draw:text-box>
          </draw:frame>
        </draw:g>
        <draw:g draw:id="id24">
          <draw:frame draw:style-name="gr2" draw:text-style-name="P9" draw:layer="layout" svg:width="1.905cm" svg:height="2.045cm" svg:x="1.27cm" svg:y="13.195cm">
            <draw:image xlink:href="Pictures/1000000000000087000000918D313B01.jpg" xlink:type="simple" xlink:show="embed" xlink:actuate="onLoad">
              <text:p/>
            </draw:image>
          </draw:frame>
          <draw:frame draw:style-name="gr5" draw:layer="layout" svg:width="6.064cm" svg:height="1.051cm" svg:x="1.556cm" svg:y="17.364cm">
            <draw:text-box>
              <text:p>single-die (SoC)</text:p>
            </draw:text-box>
          </draw:frame>
          <draw:frame draw:style-name="gr2" draw:text-style-name="P9" draw:layer="layout" svg:width="6.985cm" svg:height="4.609cm" svg:x="5.715cm" svg:y="12.065cm">
            <draw:image xlink:href="Pictures/100000000000028A000001ADAA692705.gif" xlink:type="simple" xlink:show="embed" xlink:actuate="onLoad">
              <text:p/>
            </draw:image>
          </draw:frame>
          <draw:line draw:style-name="gr14" draw:layer="layout" svg:x1="2.54cm" svg:y1="13.335cm" svg:x2="5.715cm" svg:y2="12.065cm">
            <text:p/>
          </draw:line>
          <draw:line draw:style-name="gr14" draw:layer="layout" svg:x1="3.175cm" svg:y1="15.24cm" svg:x2="5.715cm" svg:y2="16.51cm">
            <text:p/>
          </draw:line>
        </draw:g>
        <draw:g draw:id="id25">
          <draw:custom-shape draw:style-name="gr15" draw:text-style-name="P9" draw:layer="layout" svg:width="1.905cm" svg:height="2.54cm" svg:x="24.13cm" svg:y="11.4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text-style-name="P9" draw:layer="layout" svg:width="4.884cm" svg:height="1.915cm" svg:x="22.86cm" svg:y="15.24cm">
            <draw:image xlink:href="Pictures/1000020100000660000002808E2596D0.png" xlink:type="simple" xlink:show="embed" xlink:actuate="onLoad">
              <text:p/>
            </draw:image>
          </draw:frame>
          <draw:frame draw:style-name="gr5" draw:layer="layout" svg:width="4.709cm" svg:height="1.051cm" svg:x="22.941cm" svg:y="17.599cm">
            <draw:text-box>
              <text:p>EPOSMote I</text:p>
            </draw:text-box>
          </draw:frame>
        </draw:g>
        <draw:g draw:id="id26">
          <draw:custom-shape draw:style-name="gr15" draw:text-style-name="P9" draw:layer="layout" svg:width="2.54cm" svg:height="1.905cm" svg:x="13.335cm" svg:y="13.4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layer="layout" svg:width="4.947cm" svg:height="1.051cm" svg:x="16.275cm" svg:y="17.629cm">
            <draw:text-box>
              <text:p>EPOSMote II</text:p>
            </draw:text-box>
          </draw:frame>
          <draw:frame draw:style-name="gr5" draw:text-style-name="P30" draw:layer="layout" svg:width="1.179cm" svg:height="2.626cm" svg:x="18.115cm" svg:y="13.305cm">
            <draw:text-box>
              <text:p><text:span text:style-name="T24">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3T19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Comparação dos módulos</text:p>
          </draw:text-box>
        </draw:frame>
        <draw:frame draw:style-name="standard" draw:layer="layout" svg:width="26.669cm" svg:height="12.113cm" svg:x="0.666cm" svg:y="4.9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2">
              <table:table-cell>
                <text:p text:style-name="P21"><text:span text:style-name="T15">Módulo</text:span></text:p>
              </table:table-cell>
              <table:table-cell>
                <text:p text:style-name="P21"><text:span text:style-name="T15">MicaZ</text:span></text:p>
              </table:table-cell>
              <table:table-cell>
                <text:p text:style-name="P21"><text:span text:style-name="T15">ZigBit</text:span></text:p>
              </table:table-cell>
              <table:table-cell>
                <text:p text:style-name="P21"><text:span text:style-name="T15">MC13224V</text:span></text:p>
              </table:table-cell>
            </table:table-row>
            <table:table-row table:style-name="ro8" table:default-cell-style-name="ce4">
              <table:table-cell table:style-name="ce3">
                <text:p>Encapsulamento</text:p>
              </table:table-cell>
              <table:table-cell>
                <text:p text:style-name="P9">módulo</text:p>
              </table:table-cell>
              <table:table-cell>
                <text:p text:style-name="P9">single-package</text:p>
              </table:table-cell>
              <table:table-cell>
                <text:p text:style-name="P9">single-die (SoC)</text:p>
              </table:table-cell>
            </table:table-row>
            <table:table-row table:style-name="ro7" table:default-cell-style-name="ce4">
              <table:table-cell table:style-name="ce3">
                <text:p>Processador</text:p>
              </table:table-cell>
              <table:table-cell>
                <text:p text:style-name="P9">8-bits ATMega128L</text:p>
              </table:table-cell>
              <table:table-cell>
                <text:p text:style-name="P9">8-bits ATMega128v</text:p>
              </table:table-cell>
              <table:table-cell>
                <text:p text:style-name="P9">32-bits ARM7 TDMI</text:p>
              </table:table-cell>
            </table:table-row>
            <table:table-row table:style-name="ro8" table:default-cell-style-name="ce4">
              <table:table-cell table:style-name="ce3">
                <text:p>RAM</text:p>
              </table:table-cell>
              <table:table-cell>
                <text:p text:style-name="P9">4 kB</text:p>
              </table:table-cell>
              <table:table-cell>
                <text:p text:style-name="P9">8 kB</text:p>
              </table:table-cell>
              <table:table-cell>
                <text:p text:style-name="P9">96 kB</text:p>
              </table:table-cell>
            </table:table-row>
            <table:table-row table:style-name="ro8" table:default-cell-style-name="ce4">
              <table:table-cell table:style-name="ce3">
                <text:p>Flash</text:p>
              </table:table-cell>
              <table:table-cell>
                <text:p text:style-name="P9">128 kB</text:p>
              </table:table-cell>
              <table:table-cell>
                <text:p text:style-name="P9">128 kB</text:p>
              </table:table-cell>
              <table:table-cell>
                <text:p text:style-name="P9">128 kB</text:p>
              </table:table-cell>
            </table:table-row>
            <table:table-row table:style-name="ro7" table:default-cell-style-name="ce4">
              <table:table-cell table:style-name="ce3">
                <text:p>Potência de transmissão</text:p>
              </table:table-cell>
              <table:table-cell>
                <text:p text:style-name="P9">0 dBm</text:p>
              </table:table-cell>
              <table:table-cell>
                <text:p text:style-name="P9">+3 dBm</text:p>
              </table:table-cell>
              <table:table-cell>
                <text:p text:style-name="P9">+4 dBm</text:p>
              </table:table-cell>
            </table:table-row>
            <table:table-row table:style-name="ro8" table:default-cell-style-name="ce4">
              <table:table-cell table:style-name="ce3">
                <text:p>Corrente Tx*</text:p>
              </table:table-cell>
              <table:table-cell>
                <text:p text:style-name="P9">17.4 mA</text:p>
              </table:table-cell>
              <table:table-cell>
                <text:p text:style-name="P9">18 mA</text:p>
              </table:table-cell>
              <table:table-cell>
                <text:p text:style-name="P9">29 mA</text:p>
              </table:table-cell>
            </table:table-row>
            <table:table-row table:style-name="ro8" table:default-cell-style-name="ce4">
              <table:table-cell table:style-name="ce3">
                <text:p>Corrente Rx*</text:p>
              </table:table-cell>
              <table:table-cell>
                <text:p text:style-name="P9">19.7 mA</text:p>
              </table:table-cell>
              <table:table-cell>
                <text:p text:style-name="P9">19 mA</text:p>
              </table:table-cell>
              <table:table-cell>
                <text:p text:style-name="P9">22 mA</text:p>
              </table:table-cell>
            </table:table-row>
            <table:table-row table:style-name="ro8" table:default-cell-style-name="ce4">
              <table:table-cell table:style-name="ce3">
                <text:p>Corrente <text:span text:style-name="T25">sleep</text:span></text:p>
              </table:table-cell>
              <table:table-cell>
                <text:p text:style-name="P9">15 uA</text:p>
              </table:table-cell>
              <table:table-cell>
                <text:p text:style-name="P9">6 uA</text:p>
              </table:table-cell>
              <table:table-cell>
                <text:p text:style-name="P9">0.85 uA</text:p>
              </table:table-cell>
            </table:table-row>
            <table:table-row table:style-name="ro8" table:default-cell-style-name="ce4">
              <table:table-cell table:style-name="ce3">
                <text:p>Dimensões (mm)</text:p>
              </table:table-cell>
              <table:table-cell>
                <text:p text:style-name="P9">58 x 32 x 7</text:p>
              </table:table-cell>
              <table:table-cell>
                <text:p text:style-name="P9">24 x 13,5 x 2</text:p>
              </table:table-cell>
              <table:table-cell>
                <text:p text:style-name="P9">9,5 x 9,5 x 1,2</text:p>
              </table:table-cell>
            </table:table-row>
            <table:table-row table:style-name="ro8" table:default-cell-style-name="ce4">
              <table:table-cell table:style-name="ce3">
                <text:p>Preço (USD)</text:p>
              </table:table-cell>
              <table:table-cell>
                <text:p text:style-name="P9">$ 144,00 (2005)</text:p>
              </table:table-cell>
              <table:table-cell>
                <text:p text:style-name="P9">$ 18,25</text:p>
              </table:table-cell>
              <table:table-cell>
                <text:p text:style-name="P9">$ 4,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31" draw:layer="layout" svg:width="21.969cm" svg:height="0.7cm" svg:x="3.016cm" svg:y="17.88cm">
          <draw:text-box>
            <text:p><text:span text:style-name="T26">* Corrente drenada quando operando na potência máxima de transmissão ou recepção.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EPOSMote</text:p>
          </draw:text-box>
        </draw:frame>
        <draw:frame presentation:style-name="pr17" draw:layer="layout" svg:width="26.67cm" svg:height="15.947cm" svg:x="0.635cm" svg:y="3.81cm" presentation:class="outline" presentation:user-transformed="true">
          <draw:text-box>
            <text:list text:style-name="L3">
              <text:list-item>
                <text:p>Desenvolvido na UFSC – LISHA</text:p>
              </text:list-item>
              <text:list-item>
                <text:p>Objetivos</text:p>
                <text:list>
                  <text:list-item>
                    <text:p>Desenvolver uma família de motes:</text:p>
                    <text:list>
                      <text:list-item>
                        <text:p>modulares</text:p>
                      </text:list-item>
                      <text:list-item>
                        <text:p>configuráveis </text:p>
                      </text:list-item>
                      <text:list-item>
                        <text:p>custo acessível</text:p>
                      </text:list-item>
                      <text:list-item>
                        <text:p>atendendo adequadamente necessidades do LISHA</text:p>
                      </text:list-item>
                    </text:list>
                  </text:list-item>
                  <text:list-item>
                    <text:p>Servir de plataforma para validação do EPOS</text:p>
                    <text:list>
                      <text:list-item>
                        <text:p>serviços de SO para RSSF</text:p>
                      </text:list-item>
                      <text:list-item>
                        <text:p>C-MAC: Configurable MAC</text:p>
                      </text:list-item>
                      <text:list-item>
                        <text:p>HECOPS: localização baseada em RSSI</text:p>
                      </text:list-item>
                      <text:list-item>
                        <text:p>Roteamento: ACO + ZRP</text:p>
                      </text:list-item>
                      <text:list-item>
                        <text:p>Fontes alternativas de energia (energy harvesting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6" draw:layer="layout" svg:width="15.02cm" svg:height="10.588cm" svg:x="3.292cm" svg:y="13.255cm" presentation:class="notes" presentation:user-transformed="true">
            <draw:text-box>
              <text:p>HECOPS = Heuristic Environmental Consideration Over Positioning System</text:p>
              <text:p/>
              <text:p>RSSI = received signal strength indication</text:p>
              <text:p/>
              <text:p>ACO = Ant-Colony Optimization</text:p>
              <text:p/>
              <text:p>ZRP = Zone Routing Protocol</text:p>
            </draw:text-box>
          </draw:frame>
        </presentation:notes>
      </draw:page>
      <draw:page draw:name="page21" draw:style-name="dp1" draw:master-page-name="lisha-clear" presentation:presentation-page-layout-name="AL5T9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EPOSMote I</text:p>
          </draw:text-box>
        </draw:frame>
        <draw:frame presentation:style-name="pr18" draw:layer="layout" svg:width="13.014cm" svg:height="15.876cm" svg:x="14.3cm" svg:y="3.81cm" presentation:class="outline">
          <draw:text-box>
            <text:list text:style-name="L3">
              <text:list-item>
                <text:p>MeshNetics ZigBit</text:p>
                <text:list>
                  <text:list-item>
                    <text:p>8-bits ATMega1281v</text:p>
                    <text:list>
                      <text:list-item>
                        <text:p>128 KB Flash + 8 KB RAM</text:p>
                      </text:list-item>
                    </text:list>
                  </text:list-item>
                  <text:list-item>
                    <text:p>AT86RF230</text:p>
                    <text:list>
                      <text:list-item>
                        <text:p>-101dBm sensibilidade Rx</text:p>
                      </text:list-item>
                      <text:list-item>
                        <text:p>+3dBm potência Tx</text:p>
                      </text:list-item>
                      <text:list-item>
                        <text:p>IEEE 802.15.4</text:p>
                      </text:list-item>
                      <text:list-item>
                        <text:p>2.4 Ghz ISM</text:p>
                      </text:list-item>
                    </text:list>
                  </text:list-item>
                </text:list>
              </text:list-item>
              <text:list-item>
                <text:p>Sensor SHT-11</text:p>
                <text:list>
                  <text:list-item>
                    <text:p>Integrado: temperatura e humidade</text:p>
                  </text:list-item>
                  <text:list-item>
                    <text:p>Digital: SPI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3.014cm" svg:height="5.102cm" svg:x="0.635cm" svg:y="4.196cm" presentation:class="graphic" presentation:user-transformed="true">
          <draw:image xlink:href="Pictures/1000020100000660000002808E2596D0.png" xlink:type="simple" xlink:show="embed" xlink:actuate="onLoad">
            <text:p/>
          </draw:image>
        </draw:frame>
        <draw:frame draw:style-name="gr5" draw:text-style-name="P24" draw:layer="layout" svg:width="8.287cm" svg:height="1.051cm" svg:x="2.775cm" svg:y="14.757cm">
          <draw:text-box>
            <text:p><text:span text:style-name="T19">Foto Emote I embaixo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5T9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EPOSMote II</text:p>
          </draw:text-box>
        </draw:frame>
        <draw:frame draw:style-name="gr16" draw:text-style-name="P9" draw:layer="layout" svg:width="13.014cm" svg:height="3.635cm" svg:x="0.635cm" svg:y="4.229cm" presentation:class="graphic" presentation:user-transformed="true">
          <draw:image xlink:href="Pictures/100000000000038D000000FE02D73E2F.png" xlink:type="simple" xlink:show="embed" xlink:actuate="onLoad">
            <text:p/>
          </draw:image>
        </draw:frame>
        <draw:frame presentation:style-name="pr17" draw:layer="layout" svg:width="13.64cm" svg:height="16.125cm" svg:x="14.1cm" svg:y="3.81cm" presentation:class="outline" presentation:user-transformed="true">
          <draw:text-box>
            <text:list text:style-name="L3">
              <text:list-item>
                <text:p>Projeto modular</text:p>
                <text:list>
                  <text:list-item>
                    <text:p>Interfaces padrão</text:p>
                  </text:list-item>
                  <text:list-item>
                    <text:p>3 módulos:</text:p>
                    <text:list>
                      <text:list-item>
                        <text:p>Base: CPU + rádio</text:p>
                      </text:list-item>
                      <text:list-item>
                        <text:p>I/O: sensores</text:p>
                      </text:list-item>
                      <text:list-item>
                        <text:p>Alimentação: bateria ++</text:p>
                      </text:list-item>
                    </text:list>
                  </text:list-item>
                </text:list>
              </text:list-item>
              <text:list-item>
                <text:p>Freescale MC13224v</text:p>
                <text:list>
                  <text:list-item>
                    <text:p>32-bits ARM7 TDMI</text:p>
                    <text:list>
                      <text:list-item>
                        <text:p>128 KB Flash + 96 KB RAM</text:p>
                      </text:list-item>
                    </text:list>
                  </text:list-item>
                  <text:list-item>
                    <text:p>Rádio integrado</text:p>
                    <text:list>
                      <text:list-item>
                        <text:p>-96 dBm sensibilidade Rx</text:p>
                      </text:list-item>
                      <text:list-item>
                        <text:p>+4 dBm potência Tx</text:p>
                      </text:list-item>
                      <text:list-item>
                        <text:p>IEEE 802.15.4</text:p>
                      </text:list-item>
                      <text:list-item>
                        <text:p>2.4 Ghz IS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4" draw:layer="layout" svg:width="6.602cm" svg:height="4.201cm" svg:x="3.81cm" svg:y="12.065cm">
          <draw:text-box>
            <text:p><text:span text:style-name="T19">Foto Emote II (3):</text:span></text:p>
            <text:p><text:span text:style-name="T19"><text:s/></text:span><text:span text:style-name="T19">- zigbit</text:span></text:p>
            <text:p><text:span text:style-name="T19"><text:s/></text:span><text:span text:style-name="T19">- mc13224</text:span></text:p>
            <text:p><text:span text:style-name="T19"><text:s/></text:span><text:span text:style-name="T19">- startup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genda</text:p>
          </draw:text-box>
        </draw:frame>
        <draw:frame presentation:style-name="pr8" draw:id="id32" draw:layer="layout" svg:width="26.67cm" svg:height="2.635cm" svg:x="0.635cm" svg:y="3.811cm" presentation:class="outline" presentation:user-transformed="true">
          <draw:text-box>
            <text:list text:style-name="L3">
              <text:list-item>
                <text:p>Redes de sensores sem-fio e aplicações</text:p>
                <text:list>
                  <text:list-item>
                    <text:p>Ex. 01: programação de aplicações no EPOS</text:p>
                  </text:list-item>
                </text:list>
              </text:list-item>
            </text:list>
          </draw:text-box>
        </draw:frame>
        <draw:frame presentation:style-name="pr9" draw:id="id27" draw:layer="layout" svg:width="26.67cm" svg:height="1.905cm" svg:x="0.635cm" svg:y="17.78cm" presentation:class="outline" presentation:user-transformed="true">
          <draw:text-box>
            <text:list text:style-name="L3">
              <text:list-item>
                <text:p>Gerência do consumo de energia para RSSF</text:p>
              </text:list-item>
            </text:list>
          </draw:text-box>
        </draw:frame>
        <draw:frame presentation:style-name="pr10" draw:id="id28" draw:layer="layout" svg:width="26.67cm" svg:height="2.635cm" svg:x="0.635cm" svg:y="13.97cm" presentation:class="outline" presentation:user-transformed="true">
          <draw:text-box>
            <text:list text:style-name="L3">
              <text:list-item>
                <text:p>Sistemas operacionais para RSSF</text:p>
                <text:list>
                  <text:list-item>
                    <text:p>Ex. 04: gerando EPOS e executando no EPOSMote</text:p>
                  </text:list-item>
                </text:list>
              </text:list-item>
            </text:list>
          </draw:text-box>
        </draw:frame>
        <draw:frame presentation:style-name="pr10" draw:id="id29" draw:layer="layout" svg:width="26.67cm" svg:height="2.635cm" svg:x="0.635cm" svg:y="11.43cm" presentation:class="outline" presentation:user-transformed="true">
          <draw:text-box>
            <text:list text:style-name="L3">
              <text:list-item>
                <text:p>Controle de acesso ao meio (MAC)</text:p>
                <text:list>
                  <text:list-item>
                    <text:p>Ex. 03: configuração do C-MAC no EPOS</text:p>
                  </text:list-item>
                </text:list>
              </text:list-item>
            </text:list>
          </draw:text-box>
        </draw:frame>
        <draw:frame presentation:style-name="pr10" draw:id="id30" draw:layer="layout" svg:width="26.67cm" svg:height="2.635cm" svg:x="0.635cm" svg:y="8.89cm" presentation:class="outline" presentation:user-transformed="true">
          <draw:text-box>
            <text:list text:style-name="L3">
              <text:list-item>
                <text:p>Sensores e aquisição de dados</text:p>
                <text:list>
                  <text:list-item>
                    <text:p>Ex. 02: aquisição de dados no EPOS</text:p>
                  </text:list-item>
                </text:list>
              </text:list-item>
            </text:list>
          </draw:text-box>
        </draw:frame>
        <draw:frame presentation:style-name="pr10" draw:id="id31" draw:layer="layout" svg:width="26.67cm" svg:height="2.635cm" svg:x="0.635cm" svg:y="6.35cm" presentation:class="outline" presentation:user-transformed="true">
          <draw:text-box>
            <text:list text:style-name="L3">
              <text:list-item>
                <text:p>Módulos de sensoriamento</text:p>
                <text:list>
                  <text:list-item>
                    <text:p>Apresentação do EPOS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lighten">
                  <anim:animateColor smil:dur="0.5s" smil:fill="hold" smil:targetElement="id27" smil:attributeName="color" smil:by="hsl(0,12%,25%)" anim:color-interpolation="hsl" anim:color-interpolation-direction="clockwise"/>
                  <anim:animateColor smil:dur="0.5s" smil:fill="hold" smil:targetElement="id27" smil:attributeName="fill-color" smil:by="hsl(0,12%,25%)" anim:color-interpolation="hsl" anim:color-interpolation-direction="clockwise"/>
                  <anim:animateColor smil:dur="0.5s" smil:fill="hold" smil:targetElement="id27" smil:attributeName="stroke-color" smil:by="hsl(0,12%,25%)" anim:color-interpolation="hsl" anim:color-interpolation-direction="clockwise"/>
                  <anim:set smil:dur="0.5s" smil:fill="hold" smil:targetElement="id27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8" smil:attributeName="color" smil:by="hsl(0,12%,25%)" anim:color-interpolation="hsl" anim:color-interpolation-direction="clockwise"/>
                  <anim:animateColor smil:dur="0.5s" smil:fill="hold" smil:targetElement="id28" smil:attributeName="fill-color" smil:by="hsl(0,12%,25%)" anim:color-interpolation="hsl" anim:color-interpolation-direction="clockwise"/>
                  <anim:animateColor smil:dur="0.5s" smil:fill="hold" smil:targetElement="id28" smil:attributeName="stroke-color" smil:by="hsl(0,12%,25%)" anim:color-interpolation="hsl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9" smil:attributeName="color" smil:by="hsl(0,12%,25%)" anim:color-interpolation="hsl" anim:color-interpolation-direction="clockwise"/>
                  <anim:animateColor smil:dur="0.5s" smil:fill="hold" smil:targetElement="id29" smil:attributeName="fill-color" smil:by="hsl(0,12%,25%)" anim:color-interpolation="hsl" anim:color-interpolation-direction="clockwise"/>
                  <anim:animateColor smil:dur="0.5s" smil:fill="hold" smil:targetElement="id29" smil:attributeName="stroke-color" smil:by="hsl(0,12%,25%)" anim:color-interpolation="hsl" anim:color-interpolation-direction="clockwise"/>
                  <anim:set smil:dur="0.5s" smil:fill="hold" smil:targetElement="id29" smil:attributeName="fill" smil:to="solid"/>
                </anim:par>
                <anim:par smil:begin="0s" presentation:text-only="true" presentation:node-type="with-previous" presentation:preset-class="emphasis" presentation:preset-id="ooo-emphasis-bold-reveal">
                  <anim:set smil:dur="indefinite" smil:targetElement="id30" smil:attributeName="font-weight" smil:to="bol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1" smil:attributeName="color" smil:by="hsl(0,12%,25%)" anim:color-interpolation="hsl" anim:color-interpolation-direction="clockwise"/>
                  <anim:animateColor smil:dur="0.5s" smil:fill="hold" smil:targetElement="id31" smil:attributeName="fill-color" smil:by="hsl(0,12%,25%)" anim:color-interpolation="hsl" anim:color-interpolation-direction="clockwise"/>
                  <anim:animateColor smil:dur="0.5s" smil:fill="hold" smil:targetElement="id31" smil:attributeName="stroke-color" smil:by="hsl(0,12%,25%)" anim:color-interpolation="hsl" anim:color-interpolation-direction="clockwise"/>
                  <anim:set smil:dur="0.5s" smil:fill="hold" smil:targetElement="id31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32" anim:sub-item="text" smil:attributeName="color" smil:by="hsl(0,12%,25%)" anim:color-interpolation="hsl" anim:color-interpolation-direction="clockwise"/>
                  <anim:animateColor smil:dur="0s" smil:fill="hold" smil:targetElement="id32" anim:sub-item="text" smil:attributeName="fill-color" smil:by="hsl(0,12%,25%)" anim:color-interpolation="hsl" anim:color-interpolation-direction="clockwise"/>
                  <anim:animateColor smil:dur="0s" smil:fill="hold" smil:targetElement="id32" anim:sub-item="text" smil:attributeName="stroke-color" smil:by="hsl(0,12%,25%)" anim:color-interpolation="hsl" anim:color-interpolation-direction="clockwise"/>
                  <anim:set smil:dur="0s" smil:fill="hold" smil:targetElement="id32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Sensores e aquisição de dados</text:p>
          </draw:text-box>
        </draw:frame>
        <draw:frame presentation:style-name="pr16" draw:layer="layout" svg:width="26.67cm" svg:height="8.255cm" svg:x="0.635cm" svg:y="3.81cm" presentation:class="outline" presentation:user-transformed="true">
          <draw:text-box>
            <text:list text:style-name="L3">
              <text:list-item>
                <text:p>Sensor</text:p>
                <text:list>
                  <text:list-item>
                    <text:p>responde estímulos físicos (luz, temperatura, etc)</text:p>
                  </text:list-item>
                  <text:list-item>
                    <text:p>transmite impulso resultante (corrente, tensão, etc)</text:p>
                  </text:list-item>
                </text:list>
              </text:list-item>
              <text:list-item>
                <text:p>Normalmente interage com sistema digital</text:p>
                <text:list>
                  <text:list-item>
                    <text:p>através de um ADC (Analog-to-Digital Converter)</text:p>
                  </text:list-item>
                  <text:list-item>
                    <text:p>provendo informações sobre o mundo analógico</text:p>
                  </text:list-item>
                </text:list>
              </text:list-item>
            </text:list>
          </draw:text-box>
        </draw:frame>
        <draw:frame draw:style-name="gr5" draw:text-style-name="P24" draw:layer="layout" svg:width="10.966cm" svg:height="1.051cm" svg:x="7.62cm" svg:y="16.51cm">
          <draw:text-box>
            <text:p><text:span text:style-name="T19">Fig: Sensor =&gt; ADC =&gt; MCU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6T6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Sinais analógicos</text:p>
          </draw:text-box>
        </draw:frame>
        <draw:frame presentation:style-name="pr18" draw:layer="layout" svg:width="13.014cm" svg:height="15.876cm" svg:x="0.635cm" svg:y="3.81cm" presentation:class="outline">
          <draw:text-box>
            <text:list text:style-name="L3">
              <text:list-item>
                <text:p>Sinal</text:p>
                <text:list>
                  <text:list-item>
                    <text:p>Volume detectável de energia que pode carregar informação</text:p>
                  </text:list-item>
                </text:list>
              </text:list-item>
              <text:list-item>
                <text:p>Sinais analógicos</text:p>
                <text:list>
                  <text:list-item>
                    <text:p>Contínuos</text:p>
                  </text:list-item>
                  <text:list-item>
                    <text:p>Valores reais (infinitos)</text:p>
                  </text:list-item>
                  <text:list-item>
                    <text:p>Informação carregada em variações de</text:p>
                    <text:list>
                      <text:list-item>
                        <text:p>Amplitude</text:p>
                      </text:list-item>
                      <text:list-item>
                        <text:p>Frequência</text:p>
                      </text:list-item>
                      <text:list-item>
                        <text:p>Fa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0.795cm" svg:height="5.001cm" svg:x="15.34cm" svg:y="8.669cm">
          <draw:image xlink:href="Pictures/100000000000024B000001106D866592.gif" xlink:type="simple" xlink:show="embed" xlink:actuate="onLoad">
            <text:p/>
          </draw:image>
        </draw:frame>
        <draw:frame draw:style-name="gr2" draw:text-style-name="P9" draw:layer="layout" svg:width="9.472cm" svg:height="4.144cm" svg:x="16.001cm" svg:y="3.175cm">
          <draw:image xlink:href="Pictures/10000000000002A00000012616DFD7B3.gif" xlink:type="simple" xlink:show="embed" xlink:actuate="onLoad">
            <text:p/>
          </draw:image>
        </draw:frame>
        <draw:frame draw:style-name="gr2" draw:text-style-name="P9" draw:layer="layout" svg:width="11.231cm" svg:height="4.295cm" svg:x="15.122cm" svg:y="15.105cm">
          <draw:image xlink:href="Pictures/10000000000002A0000001018096A901.gif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6T6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Sinais digitais</text:p>
          </draw:text-box>
        </draw:frame>
        <draw:frame presentation:style-name="pr17" draw:layer="layout" svg:width="13.335cm" svg:height="15.876cm" svg:x="0.635cm" svg:y="3.81cm" presentation:class="outline" presentation:user-transformed="true">
          <draw:text-box>
            <text:list text:style-name="L3">
              <text:list-item>
                <text:p>Sinais digitais</text:p>
                <text:list>
                  <text:list-item>
                    <text:p>Discretos</text:p>
                  </text:list-item>
                  <text:list-item>
                    <text:p>Conjunto definido de valores possíveis (finito)</text:p>
                  </text:list-item>
                  <text:list-item>
                    <text:p>Informação em estados discretos do sinal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478cm" svg:height="7.54cm" svg:x="15.922cm" svg:y="5.16cm">
          <draw:image xlink:href="Pictures/100000000000016A0000012020224E4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Sinais: interface com o mundo real</text:p>
          </draw:text-box>
        </draw:frame>
        <draw:frame presentation:style-name="pr18" draw:layer="layout" svg:width="26.67cm" svg:height="15.876cm" svg:x="0.635cm" svg:y="3.81cm" presentation:class="outline">
          <draw:text-box>
            <text:list text:style-name="L3">
              <text:list-item>
                <text:p>O mundo é analógico</text:p>
              </text:list-item>
              <text:list-item>
                <text:p>Computadores digitais são... digitais (e geralmente binários)!</text:p>
              </text:list-item>
              <text:list-item>
                <text:p>Permitir que um processador digital interprete sinais analógicos é importante</text:p>
                <text:list>
                  <text:list-item>
                    <text:p>Áudio e vídeo digitais</text:p>
                  </text:list-item>
                  <text:list-item>
                    <text:p>Telefonia digital</text:p>
                  </text:list-item>
                  <text:list-item>
                    <text:p>Sensores e atua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onversão analógico-digital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Sinal analógico é</text:p>
                <text:list>
                  <text:list-item>
                    <text:p>Amostrado (i.e., medido) em um intervalo regular</text:p>
                  </text:list-item>
                  <text:list-item>
                    <text:p>Cada amostra é quantizada (i.e., convertida para um valor discreto)</text:p>
                  </text:list-item>
                  <text:list-item>
                    <text:p>Resultado: um valor discreto que <text:span text:style-name="T19">aproxima</text:span> o valor real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655cm" svg:height="6.985cm" svg:x="7.673cm" svg:y="12.065cm">
          <draw:image xlink:href="Pictures/1000000000000151000000BA7431FD80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mostragem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Teorema de Nyquist</text:p>
              </text:list-item>
            </text:list>
          </draw:text-box>
        </draw:frame>
        <draw:frame draw:style-name="gr17" draw:layer="layout" svg:width="4.495cm" svg:height="1.232cm" svg:x="5.43cm" svg:y="6.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9" draw:layer="layout" svg:width="15.24cm" svg:height="7.06cm" svg:x="6.38cm" svg:y="8.255cm">
          <draw:image xlink:href="Pictures/100000000000024B000001106D866592.gif" xlink:type="simple" xlink:show="embed" xlink:actuate="onLoad">
            <text:p/>
          </draw:image>
        </draw:frame>
        <draw:custom-shape draw:style-name="gr15" draw:text-style-name="P9" draw:layer="layout" svg:width="0.635cm" svg:height="3.81cm" svg:x="10.795cm" svg:y="13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out" svg:width="0.635cm" svg:height="3.81cm" svg:x="18.196cm" svg:y="13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out" svg:width="3.175cm" svg:height="0.635cm" svg:x="10.79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5.534cm" svg:height="1.24cm" svg:x="15.031cm" svg:y="6.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5.534cm" svg:height="1.24cm" svg:x="15.731cm" svg:y="17.4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layer="layout" svg:width="5.506cm" svg:height="1.24cm" svg:x="8.331cm" svg:y="17.4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6" draw:layer="layout" svg:width="15.02cm" svg:height="10.588cm" svg:x="3.292cm" svg:y="13.255cm" presentation:class="notes">
            <draw:text-box>
              <text:list text:style-name="L6">
                <text:list-item>
                  <text:p>Teorema de Nyquist</text:p>
                  <text:list>
                    <text:list-item>
                      <text:p>“A frequência de amostragem de um sinal analógico, para que possa posteriormente ser reconstituído com o mínimo de perda de informação, deve ser igual ou maior a duas vezes a maior frequência do espectro desse sinal”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mostragem irregular</text:p>
          </draw:text-box>
        </draw:frame>
        <draw:frame presentation:style-name="pr23" draw:layer="layout" svg:width="26.67cm" svg:height="6.35cm" svg:x="0.635cm" svg:y="3.81cm" presentation:class="outline" presentation:user-transformed="true">
          <draw:text-box>
            <text:list text:style-name="L3">
              <text:list-item>
                <text:p>Frequência de amostragem precisa ser regular</text:p>
                <text:list>
                  <text:list-item>
                    <text:p>Amostragem irregular leva a erros de conversão</text:p>
                  </text:list-item>
                  <text:list-item>
                    <text:p>Atrasos e jitter podem ser aceitáveis para ter uma boa qualidade na conversão de sinal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094cm" svg:height="6.368cm" svg:x="1.255cm" svg:y="11.242cm">
          <draw:image xlink:href="Pictures/1000000000000152000000B2F00AB25A.png" xlink:type="simple" xlink:show="embed" xlink:actuate="onLoad">
            <text:p/>
          </draw:image>
        </draw:frame>
        <draw:frame draw:style-name="gr2" draw:text-style-name="P9" draw:layer="layout" svg:width="12.45cm" svg:height="6.539cm" svg:x="14.575cm" svg:y="11.071cm">
          <draw:image xlink:href="Pictures/1000000000000151000000B178E4B41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Quantização</text:p>
          </draw:text-box>
        </draw:frame>
        <draw:frame presentation:style-name="pr20" draw:layer="layout" svg:width="26.67cm" svg:height="8.255cm" svg:x="0.635cm" svg:y="2.71cm" presentation:class="outline" presentation:user-transformed="true">
          <draw:text-box>
            <text:list text:style-name="L3">
              <text:list-item>
                <text:p>Processo de conversão do sinal analógico para o sinal discreto</text:p>
              </text:list-item>
              <text:list-item>
                <text:p>Passos de quantização</text:p>
                <text:list>
                  <text:list-item>
                    <text:p>Define a quatidade de valores que uma amostra pode assumir</text:p>
                  </text:list-item>
                  <text:list-item>
                    <text:p>Define a resolução da conversão</text:p>
                  </text:list-item>
                </text:list>
              </text:list-item>
            </text:list>
          </draw:text-box>
        </draw:frame>
        <draw:frame draw:style-name="standard" draw:layer="layout" svg:width="17.614cm" svg:height="5.759cm" svg:x="5.193cm" svg:y="12.37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3">
              <table:table-cell>
                <text:p>Tamanho</text:p>
              </table:table-cell>
              <table:table-cell>
                <text:p>Intervalo</text:p>
              </table:table-cell>
              <table:table-cell>
                <text:p>Resolução</text:p>
              </table:table-cell>
              <table:table-cell>
                <text:p>Sinal de 3 V</text:p>
              </table:table-cell>
            </table:table-row>
            <table:table-row table:style-name="ro9" table:default-cell-style-name="ce3">
              <table:table-cell>
                <text:p>8 bits</text:p>
              </table:table-cell>
              <table:table-cell>
                <text:p>0 - 255</text:p>
              </table:table-cell>
              <table:table-cell>
                <text:p>0,00390625</text:p>
              </table:table-cell>
              <table:table-cell>
                <text:p>~ 11,72 mV</text:p>
              </table:table-cell>
            </table:table-row>
            <table:table-row table:style-name="ro9" table:default-cell-style-name="ce3">
              <table:table-cell>
                <text:p>10 bits</text:p>
              </table:table-cell>
              <table:table-cell>
                <text:p>0 - 1023</text:p>
              </table:table-cell>
              <table:table-cell>
                <text:p>0,0009765625</text:p>
              </table:table-cell>
              <table:table-cell>
                <text:p>~ 2,93 mV</text:p>
              </table:table-cell>
            </table:table-row>
            <table:table-row table:style-name="ro9" table:default-cell-style-name="ce3">
              <table:table-cell>
                <text:p>12 bits</text:p>
              </table:table-cell>
              <table:table-cell>
                <text:p>0 - 4095</text:p>
              </table:table-cell>
              <table:table-cell>
                <text:p>0,000244140625</text:p>
              </table:table-cell>
              <table:table-cell>
                <text:p>~ 732,42 uV</text:p>
              </table:table-cell>
            </table:table-row>
            <table:table-row table:style-name="ro10" table:default-cell-style-name="ce3">
              <table:table-cell>
                <text:p>16 bits</text:p>
              </table:table-cell>
              <table:table-cell>
                <text:p>0 - 65535</text:p>
              </table:table-cell>
              <table:table-cell>
                <text:p>0,0000152587890625</text:p>
              </table:table-cell>
              <table:table-cell>
                <text:p>~ 45,78 uV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3T19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Qualidade na conversão</text:p>
          </draw:text-box>
        </draw:frame>
        <draw:frame draw:style-name="gr2" draw:text-style-name="P9" draw:layer="layout" svg:width="8.824cm" svg:height="5.079cm" svg:x="1.27cm" svg:y="8.255cm">
          <draw:image xlink:href="Pictures/1000000000000151000000C26334992A.png" xlink:type="simple" xlink:show="embed" xlink:actuate="onLoad">
            <text:p/>
          </draw:image>
        </draw:frame>
        <draw:frame draw:style-name="gr5" draw:layer="layout" svg:width="10.073cm" svg:height="1.051cm" svg:x="0.822cm" svg:y="13.454cm">
          <draw:text-box>
            <text:p>Baixa taxa de amostragem</text:p>
          </draw:text-box>
        </draw:frame>
        <draw:frame draw:style-name="gr5" draw:layer="layout" svg:width="11.999cm" svg:height="1.051cm" svg:x="14.523cm" svg:y="13.455cm">
          <draw:text-box>
            <text:p>Taxa de amostragem adequada</text:p>
          </draw:text-box>
        </draw:frame>
        <draw:frame draw:style-name="gr5" draw:text-style-name="P24" draw:layer="layout" svg:width="2.119cm" svg:height="1.051cm" svg:x="17.145cm" svg:y="9.458cm">
          <draw:text-box>
            <text:p><text:span text:style-name="T19">figur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Tipos de sensores</text:p>
          </draw:text-box>
        </draw:frame>
        <draw:frame presentation:style-name="pr17" draw:layer="layout" svg:width="26.67cm" svg:height="16.303cm" svg:x="0.635cm" svg:y="3.81cm" presentation:class="outline" presentation:user-transformed="true">
          <draw:text-box>
            <text:list text:style-name="L3">
              <text:list-item>
                <text:p>Sensores podem ser então</text:p>
                <text:list>
                  <text:list-item>
                    <text:p>Analógicos: sistema digital deve ter um ADC</text:p>
                  </text:list-item>
                  <text:list-item>
                    <text:p>Digitais: ADC integrado ao sensor, dados enviados digitalmente sistema</text:p>
                  </text:list-item>
                </text:list>
              </text:list-item>
              <text:list-item>
                <text:p>Tipos de interface:</text:p>
                <text:list>
                  <text:list-item>
                    <text:p>Analógicos</text:p>
                    <text:list>
                      <text:list-item>
                        <text:p>ADC!</text:p>
                      </text:list-item>
                      <text:list-item>
                        <text:p>Variam resistência dum material ou corrente num circuito</text:p>
                      </text:list-item>
                      <text:list-item>
                        <text:p>Ex.: termistores, foto-diodos, etc</text:p>
                      </text:list-item>
                    </text:list>
                  </text:list-item>
                  <text:list-item>
                    <text:p>Digitais</text:p>
                    <text:list>
                      <text:list-item>
                        <text:p>ON/OFF: chaves, boias, etc</text:p>
                      </text:list-item>
                      <text:list-item>
                        <text:p>SPI</text:p>
                      </text:list-item>
                      <text:list-item>
                        <text:p>RS-232 / 485 (UART)</text:p>
                      </text:list-item>
                      <text:list-item>
                        <text:p>I2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Termistore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Curva de resistência</text:p>
              </text:list-item>
              <text:list-item>
                <text:p>Steinhart-hart</text:p>
              </text:list-item>
              <text:list-item>
                <text:p>ADC/circuito divisor de tensão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5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Sensirion SHT1x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Digital</text:p>
              </text:list-item>
              <text:list-item>
                <text:p>Auto-calibrado</text:p>
              </text:list-item>
              <text:list-item>
                <text:p>SPI</text:p>
              </text:list-item>
              <text:list-item>
                <text:p>Temperatura + humidade</text:p>
              </text:list-item>
              <text:list-item>
                <text:p>CRC</text:p>
              </text:list-item>
              <text:list-item>
                <text:p>Aquecedor interno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Sensores analógicos de luz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Foto-resistores</text:p>
                <text:list>
                  <text:list-item>
                    <text:p>Curva de resistência</text:p>
                  </text:list-item>
                  <text:list-item>
                    <text:p>Ampla gama de frequencias (IR, visível, UV)</text:p>
                  </text:list-item>
                  <text:list-item>
                    <text:p>ADC/divisor de tensão</text:p>
                  </text:list-item>
                </text:list>
              </text:list-item>
              <text:list-item>
                <text:p>Foto-diodos</text:p>
                <text:list>
                  <text:list-item>
                    <text:p>Semicondutor responde a estímulo óptico</text:p>
                  </text:list-item>
                  <text:list-item>
                    <text:p>Varia corrent que flui por ele</text:p>
                  </text:list-item>
                  <text:list-item>
                    <text:p>Circuito RC auxiliar varia sua corrente, alterando tensão de saída (sobre um resistor)</text:p>
                  </text:list-item>
                  <text:list-item>
                    <text:p>Mais preci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TAOS TSL2550</text:p>
          </draw:text-box>
        </draw:frame>
        <draw:frame presentation:style-name="pr17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>Dois foto-diodos</text:p>
                <text:list>
                  <text:list-item>
                    <text:p>Um sensível a IR e luz visível</text:p>
                  </text:list-item>
                  <text:list-item>
                    <text:p>Outro sensível primariamente a IR</text:p>
                  </text:list-item>
                  <text:list-item>
                    <text:p>Sensividade equiparada à do olho human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ADC de 12 bits</text:p>
              </text:list-item>
              <text:list-item>
                <text:p>SMBus (2 fios)</text:p>
              </text:list-item>
              <text:list-item>
                <text:p>Comportamento linear</text:p>
              </text:list-item>
              <text:list-item>
                <text:p>Medições em Lux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agnetômetros</text:p>
          </draw:text-box>
        </draw:frame>
        <draw:frame presentation:style-name="pr17" draw:layer="layout" svg:width="26.67cm" svg:height="15.876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16cm" svg:height="9.537cm" svg:x="4.436cm" svg:y="2.791cm" draw:page-number="38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9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Acelerômetros</text:p>
          </draw:text-box>
        </draw:frame>
        <draw:frame presentation:style-name="pr17" draw:layer="layout" svg:width="26.67cm" svg:height="15.876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16cm" svg:height="9.537cm" svg:x="4.436cm" svg:y="2.791cm" draw:page-number="39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0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alibração de sensores</text:p>
          </draw:text-box>
        </draw:frame>
        <draw:frame presentation:style-name="pr17" draw:layer="layout" svg:width="26.67cm" svg:height="15.876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16cm" svg:height="9.537cm" svg:x="4.436cm" svg:y="2.791cm" draw:page-number="40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1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alibração de um termistor</text:p>
          </draw:text-box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41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2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Sensores no EPOSMote: start-up</text:p>
          </draw:text-box>
        </draw:frame>
        <draw:frame presentation:style-name="pr17" draw:layer="layout" svg:width="26.67cm" svg:height="15.876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16cm" svg:height="9.537cm" svg:x="4.436cm" svg:y="2.791cm" draw:page-number="4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3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bstrações de sensores no EPOS</text:p>
          </draw:text-box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4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genda</text:p>
          </draw:text-box>
        </draw:frame>
        <draw:frame presentation:style-name="pr8" draw:id="id38" draw:layer="layout" svg:width="26.67cm" svg:height="2.635cm" svg:x="0.635cm" svg:y="3.811cm" presentation:class="outline" presentation:user-transformed="true">
          <draw:text-box>
            <text:list text:style-name="L3">
              <text:list-item>
                <text:p>Redes de sensores sem-fio e aplicações</text:p>
                <text:list>
                  <text:list-item>
                    <text:p>Ex. 01: programação de aplicações no EPOS</text:p>
                  </text:list-item>
                </text:list>
              </text:list-item>
            </text:list>
          </draw:text-box>
        </draw:frame>
        <draw:frame presentation:style-name="pr9" draw:id="id33" draw:layer="layout" svg:width="26.67cm" svg:height="1.905cm" svg:x="0.635cm" svg:y="17.78cm" presentation:class="outline" presentation:user-transformed="true">
          <draw:text-box>
            <text:list text:style-name="L3">
              <text:list-item>
                <text:p>Gerência do consumo de energia para RSSF</text:p>
              </text:list-item>
            </text:list>
          </draw:text-box>
        </draw:frame>
        <draw:frame presentation:style-name="pr10" draw:id="id34" draw:layer="layout" svg:width="26.67cm" svg:height="2.635cm" svg:x="0.635cm" svg:y="13.97cm" presentation:class="outline" presentation:user-transformed="true">
          <draw:text-box>
            <text:list text:style-name="L3">
              <text:list-item>
                <text:p>Sistemas operacionais para RSSF</text:p>
                <text:list>
                  <text:list-item>
                    <text:p>Ex. 04: gerando EPOS e executando no EPOSMote</text:p>
                  </text:list-item>
                </text:list>
              </text:list-item>
            </text:list>
          </draw:text-box>
        </draw:frame>
        <draw:frame presentation:style-name="pr10" draw:id="id35" draw:layer="layout" svg:width="26.67cm" svg:height="2.635cm" svg:x="0.635cm" svg:y="11.43cm" presentation:class="outline" presentation:user-transformed="true">
          <draw:text-box>
            <text:list text:style-name="L3">
              <text:list-item>
                <text:p>Controle de acesso ao meio (MAC)</text:p>
                <text:list>
                  <text:list-item>
                    <text:p>Ex. 03: configuração do C-MAC no EPOS</text:p>
                  </text:list-item>
                </text:list>
              </text:list-item>
            </text:list>
          </draw:text-box>
        </draw:frame>
        <draw:frame presentation:style-name="pr10" draw:id="id36" draw:layer="layout" svg:width="26.67cm" svg:height="2.635cm" svg:x="0.635cm" svg:y="8.89cm" presentation:class="outline" presentation:user-transformed="true">
          <draw:text-box>
            <text:list text:style-name="L3">
              <text:list-item>
                <text:p>Sensores e aquisição de dados</text:p>
                <text:list>
                  <text:list-item>
                    <text:p>Ex. 02: aquisição de dados no EPOS</text:p>
                  </text:list-item>
                </text:list>
              </text:list-item>
            </text:list>
          </draw:text-box>
        </draw:frame>
        <draw:frame presentation:style-name="pr10" draw:id="id37" draw:layer="layout" svg:width="26.67cm" svg:height="2.635cm" svg:x="0.635cm" svg:y="6.35cm" presentation:class="outline" presentation:user-transformed="true">
          <draw:text-box>
            <text:list text:style-name="L3">
              <text:list-item>
                <text:p>Módulos de sensoriamento</text:p>
                <text:list>
                  <text:list-item>
                    <text:p>Apresentação do EPOS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lighten">
                  <anim:animateColor smil:dur="0.5s" smil:fill="hold" smil:targetElement="id33" smil:attributeName="color" smil:by="hsl(0,12%,25%)" anim:color-interpolation="hsl" anim:color-interpolation-direction="clockwise"/>
                  <anim:animateColor smil:dur="0.5s" smil:fill="hold" smil:targetElement="id33" smil:attributeName="fill-color" smil:by="hsl(0,12%,25%)" anim:color-interpolation="hsl" anim:color-interpolation-direction="clockwise"/>
                  <anim:animateColor smil:dur="0.5s" smil:fill="hold" smil:targetElement="id33" smil:attributeName="stroke-color" smil:by="hsl(0,12%,25%)" anim:color-interpolation="hsl" anim:color-interpolation-direction="clockwise"/>
                  <anim:set smil:dur="0.5s" smil:fill="hold" smil:targetElement="id33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4" smil:attributeName="color" smil:by="hsl(0,12%,25%)" anim:color-interpolation="hsl" anim:color-interpolation-direction="clockwise"/>
                  <anim:animateColor smil:dur="0.5s" smil:fill="hold" smil:targetElement="id34" smil:attributeName="fill-color" smil:by="hsl(0,12%,25%)" anim:color-interpolation="hsl" anim:color-interpolation-direction="clockwise"/>
                  <anim:animateColor smil:dur="0.5s" smil:fill="hold" smil:targetElement="id34" smil:attributeName="stroke-color" smil:by="hsl(0,12%,25%)" anim:color-interpolation="hsl" anim:color-interpolation-direction="clockwise"/>
                  <anim:set smil:dur="0.5s" smil:fill="hold" smil:targetElement="id34" smil:attributeName="fill" smil:to="solid"/>
                </anim:par>
                <anim:par smil:begin="0s" presentation:text-only="true" presentation:node-type="with-previous" presentation:preset-class="emphasis" presentation:preset-id="ooo-emphasis-bold-reveal">
                  <anim:set smil:dur="indefinite" smil:targetElement="id35" smil:attributeName="font-weight" smil:to="bol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36" smil:attributeName="color" smil:by="hsl(0,12%,25%)" anim:color-interpolation="hsl" anim:color-interpolation-direction="clockwise"/>
                  <anim:animateColor smil:dur="0s" smil:fill="hold" smil:targetElement="id36" smil:attributeName="fill-color" smil:by="hsl(0,12%,25%)" anim:color-interpolation="hsl" anim:color-interpolation-direction="clockwise"/>
                  <anim:animateColor smil:dur="0s" smil:fill="hold" smil:targetElement="id36" smil:attributeName="stroke-color" smil:by="hsl(0,12%,25%)" anim:color-interpolation="hsl" anim:color-interpolation-direction="clockwise"/>
                  <anim:set smil:dur="0s" smil:fill="hold" smil:targetElement="id36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7" smil:attributeName="color" smil:by="hsl(0,12%,25%)" anim:color-interpolation="hsl" anim:color-interpolation-direction="clockwise"/>
                  <anim:animateColor smil:dur="0.5s" smil:fill="hold" smil:targetElement="id37" smil:attributeName="fill-color" smil:by="hsl(0,12%,25%)" anim:color-interpolation="hsl" anim:color-interpolation-direction="clockwise"/>
                  <anim:animateColor smil:dur="0.5s" smil:fill="hold" smil:targetElement="id37" smil:attributeName="stroke-color" smil:by="hsl(0,12%,25%)" anim:color-interpolation="hsl" anim:color-interpolation-direction="clockwise"/>
                  <anim:set smil:dur="0.5s" smil:fill="hold" smil:targetElement="id37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38" anim:sub-item="text" smil:attributeName="color" smil:by="hsl(0,12%,25%)" anim:color-interpolation="hsl" anim:color-interpolation-direction="clockwise"/>
                  <anim:animateColor smil:dur="0s" smil:fill="hold" smil:targetElement="id38" anim:sub-item="text" smil:attributeName="fill-color" smil:by="hsl(0,12%,25%)" anim:color-interpolation="hsl" anim:color-interpolation-direction="clockwise"/>
                  <anim:animateColor smil:dur="0s" smil:fill="hold" smil:targetElement="id38" anim:sub-item="text" smil:attributeName="stroke-color" smil:by="hsl(0,12%,25%)" anim:color-interpolation="hsl" anim:color-interpolation-direction="clockwise"/>
                  <anim:set smil:dur="0s" smil:fill="hold" smil:targetElement="id38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44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5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MAC: controle de acesso ao meio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Numa RSSF múltiplos nodos podem iniciar transmissões simultaneamente</text:p>
              </text:list-item>
            </text:list>
            <text:p/>
            <text:list text:continue-numbering="true" text:style-name="L3">
              <text:list-item>
                <text:p>Meio físico compartilhado =&gt; colisão!</text:p>
              </text:list-item>
            </text:list>
            <text:p/>
            <text:list text:continue-numbering="true" text:style-name="L3">
              <text:list-item>
                <text:p>Protocolo que permita múltiplo acesso necessário</text:p>
              </text:list-item>
            </text:list>
            <text:p/>
            <text:list text:continue-numbering="true" text:style-name="L3">
              <text:list-item>
                <text:p>MAC: <text:span text:style-name="T25">Medium Access Control</text:span></text:p>
                <text:list>
                  <text:list-item>
                    <text:p><text:span text:style-name="T27">Algoritmo distribuído que controla o uso do meio fís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5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6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bordagens para MAC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Particionamento de canal: FDMA, TDMA</text:p>
                <text:list>
                  <text:list-item>
                    <text:p>Divide canal disponível</text:p>
                  </text:list-item>
                  <text:list-item>
                    <text:p>Aloca cada divisão para uso exclusivo por um determinado elemento</text:p>
                  </text:list-item>
                </text:list>
              </text:list-item>
              <text:list-item>
                <text:p>Acesso aleatório: CSMA-CA/CD, ALOHA</text:p>
                <text:list>
                  <text:list-item>
                    <text:p>Há colisões</text:p>
                  </text:list-item>
                  <text:list-item>
                    <text:p>Dependendo do protocolo é possível identificar, recuperar, evitar colisões</text:p>
                  </text:list-item>
                </text:list>
              </text:list-item>
              <text:list-item>
                <text:p>Passagem de permissão: Token-Bus/Ring</text:p>
                <text:list>
                  <text:list-item>
                    <text:p>Coordenação estrita do acesso ao canal</text:p>
                  </text:list-item>
                  <text:list-item>
                    <text:p>Evita colisões</text:p>
                  </text:list-item>
                </text:list>
              </text:list-item>
              <text:list-item>
                <text:p>Abordagens híbridas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Time Division Multiple Acces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Nodos compartilham o mesmo canal de frequência</text:p>
              </text:list-item>
              <text:list-item>
                <text:p><text:span text:style-name="T25">Time slots</text:span></text:p>
                <text:list>
                  <text:list-item>
                    <text:p><text:span text:style-name="T27">Acessados exclusivamente por um nodo</text:span></text:p>
                  </text:list-item>
                  <text:list-item>
                    <text:p><text:span text:style-name="T27">Duração determinada</text:span></text:p>
                  </text:list-item>
                  <text:list-item>
                    <text:p><text:span text:style-name="T27">Período determinado</text:span></text:p>
                  </text:list-item>
                </text:list>
              </text:list-item>
              <text:list-item>
                <text:p><text:span text:style-name="T27">Problemas?</text:span></text:p>
                <text:list>
                  <text:list-item>
                    <text:p><text:span text:style-name="T27">Espera pelo </text:span><text:span text:style-name="T25">time slot</text:span></text:p>
                  </text:list-item>
                  <text:list-item>
                    <text:p><text:span text:style-name="T27">Sincronização</text:span></text:p>
                  </text:list-item>
                </text:list>
              </text:list-item>
              <text:list-item>
                <text:p><text:span text:style-name="T27">IEEE 802.15.4</text:span></text:p>
                <text:list>
                  <text:list-item>
                    <text:p><text:span text:style-name="T27">GTS (</text:span><text:span text:style-name="T25">Guaranteed Time Slots</text:span><text:span text:style-name="T27">)</text:span></text:p>
                  </text:list-item>
                  <text:list-item>
                    <text:p><text:span text:style-name="T25">Beaconing</text:span></text:p>
                  </text:list-item>
                </text:list>
              </text:list-item>
            </text:list>
          </draw:text-box>
        </draw:frame>
        <draw:frame draw:style-name="gr5" draw:text-style-name="P24" draw:layer="layout" svg:width="2.398cm" svg:height="1.051cm" svg:x="22.86cm" svg:y="12.065cm">
          <draw:text-box>
            <text:p><text:span text:style-name="T19">Figur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7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8" draw:style-name="dp1" draw:master-page-name="lisha-clear" presentation:presentation-page-layout-name="AL2T1">
        <office:forms form:automatic-focus="false" form:apply-design-mode="false"/>
        <draw:frame presentation:style-name="pr7" draw:text-style-name="P32" draw:layer="layout" svg:width="23.495cm" svg:height="1.906cm" svg:x="0.635cm" svg:y="0.635cm" presentation:class="title" presentation:user-transformed="true">
          <draw:text-box>
            <text:p><text:span text:style-name="T28">Frequency Division Multiple Access</text:span>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Nodos se comunicam simultaneamente em diferentes faixas de frequência</text:p>
              </text:list-item>
              <text:list-item>
                <text:p><text:span text:style-name="T27">Faixa de frequência</text:span></text:p>
                <text:list>
                  <text:list-item>
                    <text:p><text:span text:style-name="T27">Se alocada a um único nodo, não há colisões</text:span></text:p>
                  </text:list-item>
                  <text:list-item>
                    <text:p><text:span text:style-name="T27">Se alocada a mais nodos, necessita técnica adicional</text:span></text:p>
                  </text:list-item>
                </text:list>
              </text:list-item>
              <text:list-item>
                <text:p><text:span text:style-name="T27">Problema: </text:span><text:span text:style-name="T25">crosstalk</text:span></text:p>
                <text:list>
                  <text:list-item>
                    <text:p><text:span text:style-name="T25">Sinal em uma faixa de frequência interfere no sinal de faixa adjascente</text:span></text:p>
                  </text:list-item>
                  <text:list-item>
                    <text:p><text:span text:style-name="T25">Causa: erros de modulação ou demodulação</text:span></text:p>
                  </text:list-item>
                  <text:list-item>
                    <text:p><text:span text:style-name="T25">Solução: minimizado com uso de componentes de melhor qualidade</text:span></text:p>
                  </text:list-item>
                </text:list>
              </text:list-item>
            </text:list>
          </draw:text-box>
        </draw:frame>
        <draw:frame draw:style-name="gr5" draw:text-style-name="P29" draw:layer="layout" svg:width="2.398cm" svg:height="1.051cm" svg:x="23.495cm" svg:y="18.634cm">
          <draw:text-box>
            <text:p><text:span text:style-name="T23">Figur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8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9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<text:span text:style-name="T27">(</text:span><text:span text:style-name="T25">slotted</text:span><text:span text:style-name="T27">) ALOHA</text:span></text:p>
          </draw:text-box>
        </draw:frame>
        <draw:frame presentation:style-name="pr17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>MAC da ALOHAnet</text:p>
                <text:list>
                  <text:list-item>
                    <text:p>1<text:span text:style-name="T29">a</text:span><text:span text:style-name="T30"> demonstração de uma rede digital sem-fio</text:span></text:p>
                  </text:list-item>
                </text:list>
              </text:list-item>
              <text:list-item>
                <text:p><text:span text:style-name="T30">Protocolo simples: </text:span><text:span text:style-name="T31">Pure </text:span><text:span text:style-name="T32">ALOHA</text:span></text:p>
                <text:list>
                  <text:list-item>
                    <text:p><text:span text:style-name="T30">Nodos enviam dados a qualquer momento</text:span></text:p>
                  </text:list-item>
                  <text:list-item>
                    <text:p><text:span text:style-name="T30">Se há colisão, tenta novamente no futuro</text:span></text:p>
                  </text:list-item>
                  <text:list-item>
                    <text:p><text:span text:style-name="T30">Não há verificação de canal ocupado</text:span></text:p>
                  </text:list-item>
                </text:list>
              </text:list-item>
              <text:list-item>
                <text:p><text:span text:style-name="T31">slotted </text:span><text:span text:style-name="T32">ALOHA</text:span></text:p>
                <text:list>
                  <text:list-item>
                    <text:p><text:span text:style-name="T32">Tempo dividido em fatias de tamanhos iguais</text:span></text:p>
                  </text:list-item>
                  <text:list-item>
                    <text:p><text:span text:style-name="T32">Transmissão pode começar apenas no início das fatias</text:span></text:p>
                  </text:list-item>
                  <text:list-item>
                    <text:p><text:span text:style-name="T32">Se só um nodo inicia transmissão, encerra sem colidir</text:span></text:p>
                  </text:list-item>
                </text:list>
              </text:list-item>
              <text:list-item>
                <text:p><text:span text:style-name="T32">Em ambos: qualidade do canal depende da eficiência do algoritmo de </text:span><text:span text:style-name="T31">backoff </text:span><text:span text:style-name="T32">utilizado</text:span></text:p>
              </text:list-item>
            </text:list>
          </draw:text-box>
        </draw:frame>
        <draw:frame draw:style-name="gr5" draw:text-style-name="P29" draw:layer="layout" svg:width="2.398cm" svg:height="1.051cm" svg:x="22.86cm" svg:y="10.16cm">
          <draw:text-box>
            <text:p><text:span text:style-name="T23">Figur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9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0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arrier Sense Multiple Access</text:p>
          </draw:text-box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50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1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SMA/CD (Collision Detection)</text:p>
          </draw:text-box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51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2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SMA/CA (Collision Avoidance)</text:p>
          </draw:text-box>
        </draw:frame>
        <draw:frame presentation:style-name="pr17" draw:layer="layout" svg:width="26.67cm" svg:height="15.876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16cm" svg:height="9.537cm" svg:x="4.436cm" svg:y="2.791cm" draw:page-number="5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3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ACs para RSSF</text:p>
          </draw:text-box>
        </draw:frame>
        <draw:frame presentation:style-name="pr17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>Módulos de RSSF têm recursos limitados</text:p>
                <text:list>
                  <text:list-item>
                    <text:p>Baixa capacidade de processamento</text:p>
                  </text:list-item>
                  <text:list-item>
                    <text:p>Baixa potência de transmissão</text:p>
                  </text:list-item>
                  <text:list-item>
                    <text:p><text:span text:style-name="T19">Fonte limitada de energia!</text:span></text:p>
                  </text:list-item>
                </text:list>
              </text:list-item>
              <text:list-item>
                <text:p><text:span text:style-name="T33">MACs precisam</text:span></text:p>
                <text:list>
                  <text:list-item>
                    <text:p><text:span text:style-name="T33">Utilizar rádio de modo eficiente</text:span></text:p>
                  </text:list-item>
                  <text:list-item>
                    <text:p><text:span text:style-name="T33">Minimizar gasto de energia</text:span></text:p>
                  </text:list-item>
                </text:list>
              </text:list-item>
              <text:list-item>
                <text:p><text:span text:style-name="T33">Para reduzir gasto de energia compromete-se</text:span></text:p>
                <text:list>
                  <text:list-item>
                    <text:p><text:span text:style-name="T33">Latência</text:span></text:p>
                  </text:list-item>
                  <text:list-item>
                    <text:p><text:span text:style-name="T33">Vazão</text:span></text:p>
                  </text:list-item>
                  <text:list-item>
                    <text:p><text:span text:style-name="T33">Disponibil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ACs para RSSF</text:p>
          </draw:text-box>
        </draw:frame>
        <draw:frame presentation:style-name="pr17" draw:layer="layout" svg:width="26.67cm" svg:height="16.575cm" svg:x="0.635cm" svg:y="3.41cm" presentation:class="outline" presentation:user-transformed="true">
          <draw:text-box>
            <text:list text:style-name="L3">
              <text:list-item>
                <text:p><text:span text:style-name="T33">Fontes de sobrecusto de energia [Langendoen and Halkes 2005]</text:span></text:p>
              </text:list-item>
              <text:list-item>
                <text:p><text:span text:style-name="T34">Colisões: causam retransmissões</text:span></text:p>
              </text:list-item>
              <text:list-item>
                <text:p><text:span text:style-name="T34">Sobrecusto de controle: pacotes de controle não carregam informação útil</text:span></text:p>
              </text:list-item>
              <text:list-item>
                <text:p><text:span text:style-name="T35">Escuta ociosa (</text:span><text:span text:style-name="T36">idle listening</text:span><text:span text:style-name="T35">): ouvir por pacotes que não foram enviados</text:span></text:p>
              </text:list-item>
              <text:list-item>
                <text:p><text:span text:style-name="T36">Overhearing</text:span><text:span text:style-name="T35">: receber/ouvir pacotes que não são destinados ao nodo</text:span></text:p>
              </text:list-item>
              <text:list-item>
                <text:p><text:span text:style-name="T35">Propostas de MAC por software:</text:span></text:p>
                <text:list>
                  <text:list-item>
                    <text:p><text:span text:style-name="T35">B-MAC, X-MAC, S-MAC, T-MAC, Z-MAC</text:span></text:p>
                  </text:list-item>
                  <text:list-item>
                    <text:p><text:span text:style-name="T35">IEEE 802.15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4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5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B-MAC [Polastre et al. 2004]</text:p>
          </draw:text-box>
        </draw:frame>
        <draw:frame presentation:style-name="pr21" draw:text-style-name="P33" draw:layer="layout" svg:width="26.67cm" svg:height="14.093cm" svg:x="0.635cm" svg:y="6.01cm" presentation:class="outline" presentation:user-transformed="true">
          <draw:text-box>
            <text:list text:style-name="L3">
              <text:list-item>
                <text:p><text:span text:style-name="T27">CSMA</text:span></text:p>
              </text:list-item>
              <text:list-item>
                <text:p><text:span text:style-name="T27">Reconfiguração online</text:span></text:p>
                <text:list>
                  <text:list-item>
                    <text:p><text:span text:style-name="T27">CCA (</text:span><text:span text:style-name="T25">Clear Channel Assessment</text:span><text:span text:style-name="T27">)</text:span></text:p>
                  </text:list-item>
                  <text:list-item>
                    <text:p><text:span text:style-name="T27">Reconhecimento de pacotes (ACK)</text:span></text:p>
                  </text:list-item>
                  <text:list-item>
                    <text:p><text:span text:style-name="T27">Tamanho de preâmbulo</text:span></text:p>
                  </text:list-item>
                  <text:list-item>
                    <text:p><text:span text:style-name="T27">Intervalo entre escutas</text:span></text:p>
                  </text:list-item>
                </text:list>
              </text:list-item>
              <text:list-item>
                <text:p><text:span text:style-name="T27">Limitações</text:span></text:p>
                <text:list>
                  <text:list-item>
                    <text:p><text:span text:style-name="T27">Receptores têm que aguardar o final do preâmbulo</text:span></text:p>
                  </text:list-item>
                  <text:list-item>
                    <text:p><text:span text:style-name="T25">Overhearing</text:span></text:p>
                  </text:list-item>
                  <text:list-item>
                    <text:p><text:span text:style-name="T27">Resolvidos pelo X-MAC [Buettner et al. 2006]</text:span></text:p>
                  </text:list-item>
                  <text:list-item>
                    <text:p><text:span text:style-name="T27">Estação escondida/exposta!</text:span></text:p>
                  </text:list-item>
                </text:list>
              </text:list-item>
            </text:list>
          </draw:text-box>
        </draw:frame>
        <draw:frame draw:style-name="gr5" draw:text-style-name="P24" draw:layer="layout" svg:width="2.398cm" svg:height="1.051cm" svg:x="10.16cm" svg:y="3.81cm">
          <draw:text-box>
            <text:p><text:span text:style-name="T19">Figur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5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6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S-MAC [Ye et al. 2002]</text:p>
          </draw:text-box>
        </draw:frame>
        <draw:frame presentation:style-name="pr17" draw:layer="layout" svg:width="26.67cm" svg:height="16.033cm" svg:x="0.635cm" svg:y="3.81cm" presentation:class="outline" presentation:user-transformed="true">
          <draw:text-box>
            <text:list text:style-name="L3">
              <text:list-item>
                <text:p>CSMA + RTS/CTS</text:p>
              </text:list-item>
              <text:list-item>
                <text:p>Troca de informação de sincronização</text:p>
              </text:list-item>
              <text:list-item>
                <text:p>Limitações</text:p>
                <text:list>
                  <text:list-item>
                    <text:p>Não configurável</text:p>
                  </text:list-item>
                  <text:list-item>
                    <text:p><text:span text:style-name="T25">Duty cycle</text:span><text:span text:style-name="T27"> fixo =&gt; </text:span><text:span text:style-name="T25">idle listening</text:span></text:p>
                  </text:list-item>
                </text:list>
              </text:list-item>
            </text:list>
            <text:p><text:span text:style-name="T27"/></text:p>
            <text:list text:continue-numbering="true" text:style-name="L3">
              <text:list-item>
                <text:p><text:span text:style-name="T27">T-MAC [Dam and Langendoen 2003]</text:span></text:p>
                <text:list>
                  <text:list-item>
                    <text:p><text:span text:style-name="T27">S-MAC com adaptação dinâmica do </text:span><text:span text:style-name="T25">duty cycle</text:span></text:p>
                  </text:list-item>
                  <text:list-item>
                    <text:p><text:span text:style-name="T27">Mecanismo baseado em timeouts</text:span></text:p>
                  </text:list-item>
                </text:list>
              </text:list-item>
            </text:list>
            <text:p><text:span text:style-name="T27"/></text:p>
            <text:list text:continue-numbering="true" text:style-name="L3">
              <text:list-item>
                <text:p><text:span text:style-name="T27">Limitação: sincronização</text:span></text:p>
                <text:list>
                  <text:list-item>
                    <text:p><text:span text:style-name="T27">Custosa e inefici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Z-MAC [Rhee et al. 2008]</text:p>
          </draw:text-box>
        </draw:frame>
        <draw:frame presentation:style-name="pr24" draw:layer="layout" svg:width="26.67cm" svg:height="11.071cm" svg:x="0.635cm" svg:y="3.81cm" presentation:class="outline" presentation:user-transformed="true">
          <draw:text-box>
            <text:list text:style-name="L3">
              <text:list-item>
                <text:p>Híbrido: TDMA + CSMA</text:p>
              </text:list-item>
              <text:list-item>
                <text:p>TDMA como mecanismo primário</text:p>
              </text:list-item>
              <text:list-item>
                <text:p>Nodo “dono” deve iniciar transmissão no início de sua fatia de tempo</text:p>
              </text:list-item>
              <text:list-item>
                <text:p>Se “dono” não utiliza a fatia, outros nodos disputam o meio com CSMA</text:p>
              </text:list-item>
              <text:list-item>
                <text:p>Limitação:</text:p>
                <text:list>
                  <text:list-item>
                    <text:p>Alocação estática das fatias de tempo</text:p>
                  </text:list-item>
                </text:list>
              </text:list-item>
            </text:list>
          </draw:text-box>
        </draw:frame>
        <draw:frame draw:style-name="gr5" draw:text-style-name="P24" draw:layer="layout" svg:width="2.398cm" svg:height="1.051cm" svg:x="12.065cm" svg:y="16.51cm">
          <draw:text-box>
            <text:p><text:span text:style-name="T19">Figur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57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8" draw:style-name="dp1" draw:master-page-name="lisha-clear" presentation:presentation-page-layout-name="AL7T14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IEEE 802.15.4 [IEEE CS 2006]</text:p>
          </draw:text-box>
        </draw:frame>
        <draw:frame presentation:style-name="pr25" draw:layer="layout" svg:width="26.67cm" svg:height="7.953cm" svg:x="0.635cm" svg:y="12.101cm" presentation:class="outline">
          <draw:text-box>
            <text:list text:style-name="L3">
              <text:list-item>
                <text:p>2 períodos distintos: CAP e CFP</text:p>
              </text:list-item>
              <text:list-item>
                <text:p>CAP: Contention Access Period</text:p>
                <text:list>
                  <text:list-item>
                    <text:p>CSMA/CA (RTS/CTS) + ACK</text:p>
                  </text:list-item>
                </text:list>
              </text:list-item>
              <text:list-item>
                <text:p>CFP: Contention Free Period</text:p>
                <text:list>
                  <text:list-item>
                    <text:p><text:span text:style-name="T25">Beaconing</text:span></text:p>
                  </text:list-item>
                  <text:list-item>
                    <text:p><text:span text:style-name="T27">GTS: </text:span><text:span text:style-name="T25">Guaranteed Time Slot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3.761cm" svg:height="6.746cm" svg:x="2.12cm" svg:y="3.984cm">
          <draw:image xlink:href="../../Downloads/das6606-artigo-ieee802_15_4/fig/beaconing.png" xlink:type="simple" xlink:show="embed" xlink:actuate="onLoad">
            <text:p/>
          </draw:image>
        </draw:frame>
        <draw:frame draw:style-name="gr5" draw:text-style-name="P34" draw:layer="layout" svg:width="7.508cm" svg:height="0.788cm" svg:x="20.32cm" svg:y="10.795cm">
          <draw:text-box>
            <text:p><text:span text:style-name="T37">Marco Naeve, Eaton Corp.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58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9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Qual MAC utilizar?</text:p>
          </draw:text-box>
        </draw:frame>
        <draw:frame presentation:style-name="pr9" draw:layer="layout" svg:width="26.67cm" svg:height="1.905cm" svg:x="0.635cm" svg:y="3.81cm" presentation:class="outline" presentation:user-transformed="true">
          <draw:text-box>
            <text:list text:style-name="L3">
              <text:list-item>
                <text:p>Aplicações distintas =&gt; diferentes requisitos</text:p>
              </text:list-item>
            </text:list>
          </draw:text-box>
        </draw:frame>
        <draw:frame draw:style-name="gr18" draw:text-style-name="P19" draw:layer="layout" svg:width="25.4cm" svg:height="1.051cm" svg:x="1.3cm" svg:y="17cm">
          <draw:text-box>
            <text:p text:style-name="P1"><text:span text:style-name="T13">Taxonomia para aplicações de RSSF [Mottola and Picco 2010]</text:span></text:p>
          </draw:text-box>
        </draw:frame>
        <draw:frame draw:style-name="gr2" draw:text-style-name="P9" draw:layer="layout" svg:width="26.192cm" svg:height="9.208cm" svg:x="0.903cm" svg:y="6.295cm">
          <draw:image xlink:href="Pictures/10000000000004E9000001EA6F8E683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59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0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Qual MAC utilizar?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Requisitos distintos =&gt; diferentes protocolos</text:p>
              </text:list-item>
              <text:list-item>
                <text:p>Categorias:</text:p>
                <text:list>
                  <text:list-item>
                    <text:p>Verificação do meio (<text:span text:style-name="T25">channel pooling</text:span><text:span text:style-name="T27">)</text:span></text:p>
                  </text:list-item>
                  <text:list-item>
                    <text:p><text:span text:style-name="T25">Scheduled contention</text:span></text:p>
                  </text:list-item>
                  <text:list-item>
                    <text:p>Baseados em TDMA</text:p>
                  </text:list-item>
                  <text:list-item>
                    <text:p>Híbrido</text:p>
                  </text:list-item>
                </text:list>
                <text:p/>
              </text:list-item>
              <text:list-item>
                <text:p>Configurable Medium Access Control Protocol</text:p>
                <text:list>
                  <text:list-item>
                    <text:p>C-MAC</text:p>
                  </text:list-item>
                  <text:list-item>
                    <text:p>Protocolos específicos para aplicação</text:p>
                  </text:list-item>
                  <text:list-item>
                    <text:p>Configurabilidade sem prejudicar desempen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60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1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hannel polling</text:p>
          </draw:text-box>
        </draw:frame>
        <draw:frame draw:style-name="gr2" draw:text-style-name="P9" draw:layer="layout" svg:width="17.92cm" svg:height="12.664cm" svg:x="5.04cm" svg:y="4.168cm">
          <draw:image xlink:href="Pictures/20000002000001FC00000167A8849E01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1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2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Scheduled contention</text:p>
          </draw:text-box>
        </draw:frame>
        <draw:frame draw:style-name="gr2" draw:text-style-name="P9" draw:layer="layout" svg:width="14.04cm" svg:height="17.497cm" svg:x="6.98cm" svg:y="2.352cm">
          <draw:image xlink:href="Pictures/200000020000018E000001F0EF206C81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2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3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Baseado em TDMA</text:p>
          </draw:text-box>
        </draw:frame>
        <draw:frame draw:style-name="gr2" draw:text-style-name="P9" draw:layer="layout" svg:width="10.618cm" svg:height="15.133cm" svg:x="8.691cm" svg:y="2.934cm">
          <draw:image xlink:href="Pictures/200000020000012D000001AD63A3D609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3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</text:p>
          </draw:text-box>
        </draw:frame>
        <draw:frame draw:style-name="gr2" draw:text-style-name="P9" draw:layer="layout" svg:width="13.934cm" svg:height="18.661cm" svg:x="7.033cm" svg:y="1.17cm">
          <draw:image xlink:href="Pictures/200000020000018B0000021139CBF699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4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5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</text:p>
          </draw:text-box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draw:frame draw:style-name="gr2" draw:text-style-name="P9" draw:layer="layout" svg:width="10.723cm" svg:height="8.325cm" svg:x="1.505cm" svg:y="7.216cm">
          <draw:image xlink:href="Pictures/2000000200000130000000ECCB104057.eps" xlink:type="simple" xlink:show="embed" xlink:actuate="onLoad">
            <text:p/>
          </draw:image>
        </draw:frame>
        <draw:frame draw:style-name="gr2" draw:text-style-name="P9" draw:layer="layout" svg:width="12.628cm" svg:height="13.334cm" svg:x="14.405cm" svg:y="4.711cm">
          <draw:image xlink:href="Pictures/20000002000001660000017AD98601C7.eps" xlink:type="simple" xlink:show="embed" xlink:actuate="onLoad">
            <text:p/>
          </draw:image>
        </draw:frame>
        <draw:line draw:style-name="gr19" draw:layer="layout" svg:x1="13.5cm" svg:y1="4.845cm" svg:x2="13.5cm" svg:y2="18.815cm">
          <text:p/>
        </draw:line>
        <draw:frame draw:style-name="gr5" draw:text-style-name="P23" draw:layer="layout" svg:width="7.055cm" svg:height="1.051cm" svg:x="3.339cm" svg:y="16.045cm">
          <draw:text-box>
            <text:p><text:span text:style-name="T13">Synchronous Sync</text:span></text:p>
          </draw:text-box>
        </draw:frame>
        <draw:frame draw:style-name="gr5" draw:text-style-name="P23" draw:layer="layout" svg:width="7.478cm" svg:height="1.051cm" svg:x="16.98cm" svg:y="18.615cm">
          <draw:text-box>
            <text:p><text:span text:style-name="T13">Asynchronous Sync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65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6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</text:p>
          </draw:text-box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draw:line draw:style-name="gr19" draw:layer="layout" svg:x1="2.296cm" svg:y1="10.723cm" svg:x2="26.426cm" svg:y2="10.723cm">
          <text:p/>
        </draw:line>
        <draw:frame draw:style-name="gr2" draw:text-style-name="P9" draw:layer="layout" svg:width="14.639cm" svg:height="4.691cm" svg:x="7.042cm" svg:y="3.804cm">
          <draw:image xlink:href="Pictures/200000020000019F000000857FB65AA0.eps" xlink:type="simple" xlink:show="embed" xlink:actuate="onLoad">
            <text:p/>
          </draw:image>
        </draw:frame>
        <draw:frame draw:style-name="gr2" draw:text-style-name="P9" draw:layer="layout" svg:width="13.263cm" svg:height="7.795cm" svg:x="7.73cm" svg:y="11.133cm">
          <draw:image xlink:href="Pictures/2000000200000178000000DD418FEAC6.eps" xlink:type="simple" xlink:show="embed" xlink:actuate="onLoad">
            <text:p/>
          </draw:image>
        </draw:frame>
        <draw:frame draw:style-name="gr5" draw:text-style-name="P23" draw:layer="layout" svg:width="5.361cm" svg:height="1.051cm" svg:x="11.681cm" svg:y="9.109cm">
          <draw:text-box>
            <text:p><text:span text:style-name="T13">Rx Contention</text:span></text:p>
          </draw:text-box>
        </draw:frame>
        <draw:frame draw:style-name="gr5" draw:text-style-name="P23" draw:layer="layout" svg:width="5.268cm" svg:height="1.051cm" svg:x="11.727cm" svg:y="18.415cm">
          <draw:text-box>
            <text:p><text:span text:style-name="T13">Tx Contention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66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experiment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Confirgurações avaliadas</text:p>
                <text:list>
                  <text:list-item>
                    <text:p>Beacon-enabled IEEE 802.15.4</text:p>
                  </text:list-item>
                  <text:list-item>
                    <text:p>Non-beacon IEEE 802.15.4</text:p>
                  </text:list-item>
                  <text:list-item>
                    <text:p>Non-beacon IEEE 802.15.4 without CSMA-CA</text:p>
                  </text:list-item>
                  <text:list-item>
                    <text:p>Non-beacon IEEE 802.15.4 without ACK</text:p>
                  </text:list-item>
                  <text:list-item>
                    <text:p>Non-beacon IEEE 802.15.4 without both CSMA-CA <text:tab/>and 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67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8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-MAC: experimentos</text:p>
          </draw:text-box>
        </draw:frame>
        <draw:frame presentation:style-name="pr26" draw:layer="layout" svg:width="26.67cm" svg:height="1.407cm" svg:x="0.635cm" svg:y="3.81cm" presentation:class="outline" presentation:user-transformed="true">
          <draw:text-box>
            <text:list text:style-name="L3">
              <text:list-item>
                <text:p>Parâmetros de configuração e topologia de rede</text:p>
              </text:list-item>
            </text:list>
          </draw:text-box>
        </draw:frame>
        <draw:frame draw:style-name="standard" draw:layer="layout" svg:width="18.986cm" svg:height="10.111cm" svg:x="1.007cm" svg:y="6.91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1">
              <table:table-cell table:style-name="ce8">
                <text:p text:style-name="P35"><text:span text:style-name="T38">Parameter</text:span></text:p>
              </table:table-cell>
              <table:table-cell table:style-name="ce9">
                <text:p text:style-name="P36"><text:span text:style-name="T38">Value</text:span></text:p>
              </table:table-cell>
            </table:table-row>
            <table:table-row table:style-name="ro12">
              <table:table-cell table:style-name="ce10">
                <text:p text:style-name="P35"><text:span text:style-name="T38">Compiler</text:span></text:p>
              </table:table-cell>
              <table:table-cell table:style-name="ce11">
                <text:p text:style-name="P36"><text:span text:style-name="T38">GCC 4.0.2</text:span></text:p>
              </table:table-cell>
            </table:table-row>
            <table:table-row table:style-name="ro12">
              <table:table-cell table:style-name="ce12">
                <text:p text:style-name="P35"><text:span text:style-name="T38">Microcontroller clock</text:span></text:p>
              </table:table-cell>
              <table:table-cell table:style-name="ce13">
                <text:p text:style-name="P36"><text:span text:style-name="T38">1 MHz</text:span></text:p>
              </table:table-cell>
            </table:table-row>
            <table:table-row table:style-name="ro12">
              <table:table-cell table:style-name="ce12">
                <text:p text:style-name="P35"><text:span text:style-name="T38">Packet size</text:span></text:p>
              </table:table-cell>
              <table:table-cell table:style-name="ce13">
                <text:p text:style-name="P36"><text:span text:style-name="T38">64 bytes</text:span></text:p>
              </table:table-cell>
            </table:table-row>
            <table:table-row table:style-name="ro12">
              <table:table-cell table:style-name="ce10">
                <text:p text:style-name="P35"><text:span text:style-name="T38">Tx power</text:span></text:p>
              </table:table-cell>
              <table:table-cell table:style-name="ce11">
                <text:p text:style-name="P36"><text:span text:style-name="T38">3 dBm</text:span></text:p>
              </table:table-cell>
            </table:table-row>
            <table:table-row table:style-name="ro13">
              <table:table-cell table:style-name="ce14">
                <text:p text:style-name="P35"><text:span text:style-name="T38">Beacon order</text:span></text:p>
              </table:table-cell>
              <table:table-cell table:style-name="ce15">
                <text:p text:style-name="P36"><text:span text:style-name="T38">7</text:span></text:p>
              </table:table-cell>
            </table:table-row>
            <table:table-row table:style-name="ro14">
              <table:table-cell table:style-name="ce12">
                <text:p text:style-name="P35"><text:span text:style-name="T38">Superframe order</text:span></text:p>
              </table:table-cell>
              <table:table-cell table:style-name="ce13">
                <text:p text:style-name="P36"><text:span text:style-name="T38">4</text:span></text:p>
              </table:table-cell>
            </table:table-row>
            <table:table-row table:style-name="ro13">
              <table:table-cell table:style-name="ce14">
                <text:p text:style-name="P35"><text:span text:style-name="T38">Duty cycle</text:span></text:p>
              </table:table-cell>
              <table:table-cell table:style-name="ce15">
                <text:p text:style-name="P36"><text:span text:style-name="T38">12%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custom-shape draw:style-name="gr20" draw:text-style-name="P9" draw:id="id2" draw:layer="layout" svg:width="1.27cm" svg:height="1.27cm" svg:x="22.86cm" svg:y="11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9" draw:id="id4" draw:layer="layout" svg:width="1.27cm" svg:height="1.27cm" svg:x="22.86cm" svg:y="8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9" draw:id="id5" draw:layer="layout" svg:width="1.27cm" svg:height="1.27cm" svg:x="25.36cm" svg:y="11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9" draw:id="id3" draw:layer="layout" svg:width="1.27cm" svg:height="1.27cm" svg:x="22.86cm" svg:y="13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9" draw:id="id1" draw:layer="layout" svg:width="1.27cm" svg:height="1.27cm" svg:x="20.36cm" svg:y="11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layer="layout" draw:type="line" svg:x1="21.63cm" svg:y1="11.965cm" svg:x2="22.86cm" svg:y2="11.965cm" draw:start-shape="id1" draw:start-glue-point="10" draw:end-shape="id2" draw:end-glue-point="6" svg:d="m21630 11965h1230">
            <text:p/>
          </draw:connector>
          <draw:connector draw:style-name="gr23" draw:layer="layout" draw:type="line" svg:x1="23.495cm" svg:y1="12.6cm" svg:x2="23.495cm" svg:y2="13.83cm" draw:start-shape="id2" draw:start-glue-point="8" draw:end-shape="id3" draw:end-glue-point="4" svg:d="m23495 12600v1230">
            <text:p/>
          </draw:connector>
          <draw:connector draw:style-name="gr24" draw:layer="layout" draw:type="line" svg:x1="23.495cm" svg:y1="10.1cm" svg:x2="23.495cm" svg:y2="11.33cm" draw:start-shape="id4" draw:start-glue-point="8" draw:end-shape="id2" draw:end-glue-point="4" svg:d="m23495 10100v1230">
            <text:p/>
          </draw:connector>
          <draw:connector draw:style-name="gr25" draw:layer="layout" draw:type="line" svg:x1="24.13cm" svg:y1="11.965cm" svg:x2="25.36cm" svg:y2="11.965cm" draw:start-shape="id2" draw:start-glue-point="10" draw:end-shape="id5" draw:end-glue-point="6" svg:d="m24130 11965h1230">
            <text:p/>
          </draw:connector>
          <draw:connector draw:style-name="gr26" draw:layer="layout" draw:type="line" svg:x1="20.995cm" svg:y1="12.6cm" svg:x2="22.86cm" svg:y2="14.465cm" draw:start-shape="id1" draw:start-glue-point="8" draw:end-shape="id3" draw:end-glue-point="6" svg:d="m20995 12600 1865 1865">
            <text:p/>
          </draw:connector>
          <draw:connector draw:style-name="gr27" draw:layer="layout" draw:type="line" svg:x1="20.995cm" svg:y1="11.33cm" svg:x2="22.86cm" svg:y2="9.465cm" draw:start-shape="id1" draw:start-glue-point="4" draw:end-shape="id4" draw:end-glue-point="6" svg:d="m20995 11330 1865-1865">
            <text:p/>
          </draw:connector>
          <draw:connector draw:style-name="gr28" draw:layer="layout" draw:type="line" svg:x1="24.13cm" svg:y1="9.465cm" svg:x2="25.995cm" svg:y2="11.33cm" draw:start-shape="id4" draw:start-glue-point="10" draw:end-shape="id5" draw:end-glue-point="4" svg:d="m24130 9465 1865 1865">
            <text:p/>
          </draw:connector>
          <draw:connector draw:style-name="gr29" draw:layer="layout" draw:type="line" svg:x1="24.13cm" svg:y1="14.465cm" svg:x2="25.995cm" svg:y2="12.6cm" draw:start-shape="id3" draw:start-glue-point="10" draw:end-shape="id5" draw:end-glue-point="8" svg:d="m24130 14465 1865-1865">
            <text:p/>
          </draw:connector>
        </draw:g>
        <presentation:notes draw:style-name="dp2">
          <draw:page-thumbnail draw:style-name="gr1" draw:layer="layout" svg:width="12.716cm" svg:height="9.537cm" svg:x="4.436cm" svg:y="2.791cm" draw:page-number="68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9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resultad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Uso de memória</text:p>
              </text:list-item>
            </text:list>
          </draw:text-box>
        </draw:frame>
        <draw:frame draw:style-name="standard" draw:layer="layout" svg:width="24.857cm" svg:height="7.583cm" svg:x="1.572cm" svg:y="6.709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0"/>
            <table:table-row table:style-name="ro11" table:default-cell-style-name="ce9">
              <table:table-cell table:style-name="ce8">
                <text:p text:style-name="P35"><text:span text:style-name="T38">Configuration</text:span></text:p>
              </table:table-cell>
              <table:table-cell>
                <text:p text:style-name="P36"><text:span text:style-name="T38">Code (bytes)</text:span></text:p>
              </table:table-cell>
              <table:table-cell>
                <text:p text:style-name="P36"><text:span text:style-name="T38">Data (bytes)</text:span></text:p>
              </table:table-cell>
            </table:table-row>
            <table:table-row table:style-name="ro12" table:default-cell-style-name="ce11">
              <table:table-cell table:style-name="ce10">
                <text:p text:style-name="P35"><text:span text:style-name="T38">No CSMA-CA / ACK</text:span></text:p>
              </table:table-cell>
              <table:table-cell>
                <text:p text:style-name="P36"><text:span text:style-name="T38">3248</text:span></text:p>
              </table:table-cell>
              <table:table-cell>
                <text:p text:style-name="P36"><text:span text:style-name="T38">185</text:span></text:p>
              </table:table-cell>
            </table:table-row>
            <table:table-row table:style-name="ro12" table:default-cell-style-name="ce13">
              <table:table-cell table:style-name="ce12">
                <text:p text:style-name="P35"><text:span text:style-name="T38">No ACK</text:span></text:p>
              </table:table-cell>
              <table:table-cell>
                <text:p text:style-name="P36"><text:span text:style-name="T38">3572</text:span></text:p>
              </table:table-cell>
              <table:table-cell>
                <text:p text:style-name="P36"><text:span text:style-name="T38">185</text:span></text:p>
              </table:table-cell>
            </table:table-row>
            <table:table-row table:style-name="ro12" table:default-cell-style-name="ce13">
              <table:table-cell table:style-name="ce12">
                <text:p text:style-name="P35"><text:span text:style-name="T38">No CSMA-CA</text:span></text:p>
              </table:table-cell>
              <table:table-cell>
                <text:p text:style-name="P36"><text:span text:style-name="T38">3768</text:span></text:p>
              </table:table-cell>
              <table:table-cell>
                <text:p text:style-name="P36"><text:span text:style-name="T38">202</text:span></text:p>
              </table:table-cell>
            </table:table-row>
            <table:table-row table:style-name="ro12" table:default-cell-style-name="ce11">
              <table:table-cell table:style-name="ce10">
                <text:p text:style-name="P35"><text:span text:style-name="T38">CSMA-CA / ACK enabled</text:span></text:p>
              </table:table-cell>
              <table:table-cell>
                <text:p text:style-name="P36"><text:span text:style-name="T38">4092</text:span></text:p>
              </table:table-cell>
              <table:table-cell>
                <text:p text:style-name="P36"><text:span text:style-name="T38">202</text:span></text:p>
              </table:table-cell>
            </table:table-row>
            <table:table-row table:style-name="ro13" table:default-cell-style-name="ce15">
              <table:table-cell table:style-name="ce14">
                <text:p text:style-name="P35"><text:span text:style-name="T38">CSMA-CA / ACK beacons enabled</text:span></text:p>
              </table:table-cell>
              <table:table-cell>
                <text:p text:style-name="P36"><text:span text:style-name="T38">5344</text:span></text:p>
              </table:table-cell>
              <table:table-cell>
                <text:p text:style-name="P36"><text:span text:style-name="T38">21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6.1cm" svg:height="3.791cm" svg:x="0.95cm" svg:y="15.206cm">
          <table:table table:template-name="default" table:use-first-row-styles="true" table:use-banding-rows-styles="true">
            <table:table-column table:style-name="co21"/>
            <table:table-column table:style-name="co20"/>
            <table:table-column table:style-name="co20"/>
            <table:table-column table:style-name="co22"/>
            <table:table-row table:style-name="ro11" table:default-cell-style-name="ce9">
              <table:table-cell table:style-name="ce8">
                <text:p text:style-name="P35"><text:span text:style-name="T38">Configuration</text:span></text:p>
              </table:table-cell>
              <table:table-cell>
                <text:p text:style-name="P36"><text:span text:style-name="T38">Code (bytes)</text:span></text:p>
              </table:table-cell>
              <table:table-cell>
                <text:p text:style-name="P36"><text:span text:style-name="T38">Data (bytes)</text:span></text:p>
              </table:table-cell>
              <table:table-cell>
                <text:p text:style-name="P36"><text:span text:style-name="T38">RTT (ms)</text:span></text:p>
              </table:table-cell>
            </table:table-row>
            <table:table-row table:style-name="ro11" table:default-cell-style-name="ce11">
              <table:table-cell table:style-name="ce10">
                <text:p text:style-name="P35"><text:span text:style-name="T38">C-MAC IEEE 802.15.4</text:span></text:p>
              </table:table-cell>
              <table:table-cell>
                <text:p text:style-name="P36"><text:span text:style-name="T38">4092</text:span></text:p>
              </table:table-cell>
              <table:table-cell>
                <text:p text:style-name="P36"><text:span text:style-name="T38">202</text:span></text:p>
              </table:table-cell>
              <table:table-cell>
                <text:p text:style-name="P36"><text:span text:style-name="T38">79</text:span></text:p>
              </table:table-cell>
            </table:table-row>
            <table:table-row table:style-name="ro13" table:default-cell-style-name="ce15">
              <table:table-cell table:style-name="ce14">
                <text:p text:style-name="P35"><text:span text:style-name="T38">ZigBeeNet IEEE 802.15.4</text:span></text:p>
              </table:table-cell>
              <table:table-cell>
                <text:p text:style-name="P36"><text:span text:style-name="T38">26776</text:span></text:p>
              </table:table-cell>
              <table:table-cell>
                <text:p text:style-name="P36"><text:span text:style-name="T38">289</text:span></text:p>
              </table:table-cell>
              <table:table-cell>
                <text:p text:style-name="P36"><text:span text:style-name="T38">6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69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0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resultad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Vazão média na rede (escala logaritmica)</text:p>
              </text:list-item>
            </text:list>
          </draw:text-box>
        </draw:frame>
        <draw:frame draw:style-name="gr2" draw:text-style-name="P9" draw:layer="layout" svg:width="16.862cm" svg:height="13.44cm" svg:x="5.569cm" svg:y="5.48cm">
          <draw:image xlink:href="Pictures/20000002000001DE0000017DB517AD0B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0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1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resultad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Taxa média de perda de pacotes</text:p>
              </text:list-item>
            </text:list>
          </draw:text-box>
        </draw:frame>
        <draw:frame draw:style-name="gr2" draw:text-style-name="P9" draw:layer="layout" svg:width="16.756cm" svg:height="12.593cm" svg:x="5.622cm" svg:y="5.504cm">
          <draw:image xlink:href="Pictures/20000002000001DB000001658FDD7A46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1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2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resultad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Energia consumida por byte recebido pelo coordenador</text:p>
              </text:list-item>
            </text:list>
          </draw:text-box>
        </draw:frame>
        <draw:frame draw:style-name="gr2" draw:text-style-name="P9" draw:layer="layout" svg:width="16.756cm" svg:height="12.593cm" svg:x="5.634cm" svg:y="6.678cm">
          <draw:image xlink:href="Pictures/20000002000001DB00000165820B4AD8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2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3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resultad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Energia consumida por byte enviado nas folhas</text:p>
              </text:list-item>
            </text:list>
          </draw:text-box>
        </draw:frame>
        <draw:frame draw:style-name="gr2" draw:text-style-name="P9" draw:layer="layout" svg:width="16.756cm" svg:height="12.593cm" svg:x="5.634cm" svg:y="5.678cm">
          <draw:image xlink:href="Pictures/20000002000001DB0000016545259140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3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C-MAC: resultado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Round-trip time</text:p>
              </text:list-item>
            </text:list>
          </draw:text-box>
        </draw:frame>
        <draw:frame draw:style-name="gr2" draw:text-style-name="P9" draw:layer="layout" svg:width="22.365cm" svg:height="13.722cm" svg:x="2.818cm" svg:y="5.839cm">
          <draw:image xlink:href="Pictures/200000020000027A00000185F1ABBB18.eps" xlink:type="simple" xlink:show="embed" xlink:actuate="onLoad">
            <text:p/>
          </draw:image>
        </draw:frame>
        <draw:frame draw:style-name="gr2" draw:text-style-name="P9" draw:layer="layout" svg:width="10.829cm" svg:height="1.975cm" svg:x="12.031cm" svg:y="2.54cm">
          <draw:image xlink:href="Pictures/200000020000013300000038BB6DB2D6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4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5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-MAC: conclusões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C-MAC está operacional</text:p>
                <text:list>
                  <text:list-item>
                    <text:p>Configuração não é automatizada, mas é fácil</text:p>
                  </text:list-item>
                  <text:list-item>
                    <text:p>Configurabilidade permitida através de técnicas de metaprogramação estática</text:p>
                    <text:p/>
                  </text:list-item>
                </text:list>
              </text:list-item>
              <text:list-item>
                <text:p>Quão difícil é implementar um novo MAC?</text:p>
                <text:list>
                  <text:list-item>
                    <text:p>Primeiro, o desenvolvedor necessita aprender como utilizar o framework</text:p>
                  </text:list-item>
                  <text:list-item>
                    <text:p>Daí, isto deve ser bastante dir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5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6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 presentation:user-transformed="true">
          <draw:text-box>
            <text:p>Ex 3: utilizando o C-MAC no EPOS</text:p>
          </draw:text-box>
        </draw:frame>
        <draw:frame presentation:style-name="pr18" draw:layer="layout" svg:width="26.67cm" svg:height="15.876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16cm" svg:height="9.537cm" svg:x="4.436cm" svg:y="2.791cm" draw:page-number="7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genda</text:p>
          </draw:text-box>
        </draw:frame>
        <draw:frame presentation:style-name="pr8" draw:id="id44" draw:layer="layout" svg:width="26.67cm" svg:height="2.635cm" svg:x="0.635cm" svg:y="3.811cm" presentation:class="outline" presentation:user-transformed="true">
          <draw:text-box>
            <text:list text:style-name="L3">
              <text:list-item>
                <text:p>Redes de sensores sem-fio e aplicações</text:p>
                <text:list>
                  <text:list-item>
                    <text:p>Ex. 01: programação de aplicações no EPOS</text:p>
                  </text:list-item>
                </text:list>
              </text:list-item>
            </text:list>
          </draw:text-box>
        </draw:frame>
        <draw:frame presentation:style-name="pr9" draw:id="id39" draw:layer="layout" svg:width="26.67cm" svg:height="1.905cm" svg:x="0.635cm" svg:y="17.78cm" presentation:class="outline" presentation:user-transformed="true">
          <draw:text-box>
            <text:list text:style-name="L3">
              <text:list-item>
                <text:p>Gerência do consumo de energia para RSSF</text:p>
              </text:list-item>
            </text:list>
          </draw:text-box>
        </draw:frame>
        <draw:frame presentation:style-name="pr10" draw:id="id40" draw:layer="layout" svg:width="26.67cm" svg:height="2.635cm" svg:x="0.635cm" svg:y="13.97cm" presentation:class="outline" presentation:user-transformed="true">
          <draw:text-box>
            <text:list text:style-name="L3">
              <text:list-item>
                <text:p>Sistemas operacionais para RSSF</text:p>
                <text:list>
                  <text:list-item>
                    <text:p>Ex. 04: gerando EPOS e executando no EPOSMote</text:p>
                  </text:list-item>
                </text:list>
              </text:list-item>
            </text:list>
          </draw:text-box>
        </draw:frame>
        <draw:frame presentation:style-name="pr10" draw:id="id41" draw:layer="layout" svg:width="26.67cm" svg:height="2.635cm" svg:x="0.635cm" svg:y="11.43cm" presentation:class="outline" presentation:user-transformed="true">
          <draw:text-box>
            <text:list text:style-name="L3">
              <text:list-item>
                <text:p>Controle de acesso ao meio (MAC)</text:p>
                <text:list>
                  <text:list-item>
                    <text:p>Ex. 03: configuração do C-MAC no EPOS</text:p>
                  </text:list-item>
                </text:list>
              </text:list-item>
            </text:list>
          </draw:text-box>
        </draw:frame>
        <draw:frame presentation:style-name="pr10" draw:id="id42" draw:layer="layout" svg:width="26.67cm" svg:height="2.635cm" svg:x="0.635cm" svg:y="8.89cm" presentation:class="outline" presentation:user-transformed="true">
          <draw:text-box>
            <text:list text:style-name="L3">
              <text:list-item>
                <text:p>Sensores e aquisição de dados</text:p>
                <text:list>
                  <text:list-item>
                    <text:p>Ex. 02: aquisição de dados no EPOS</text:p>
                  </text:list-item>
                </text:list>
              </text:list-item>
            </text:list>
          </draw:text-box>
        </draw:frame>
        <draw:frame presentation:style-name="pr10" draw:id="id43" draw:layer="layout" svg:width="26.67cm" svg:height="2.635cm" svg:x="0.635cm" svg:y="6.35cm" presentation:class="outline" presentation:user-transformed="true">
          <draw:text-box>
            <text:list text:style-name="L3">
              <text:list-item>
                <text:p>Módulos de sensoriamento</text:p>
                <text:list>
                  <text:list-item>
                    <text:p>Apresentação do EPOS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lighten">
                  <anim:animateColor smil:dur="0.5s" smil:fill="hold" smil:targetElement="id39" smil:attributeName="color" smil:by="hsl(0,12%,25%)" anim:color-interpolation="hsl" anim:color-interpolation-direction="clockwise"/>
                  <anim:animateColor smil:dur="0.5s" smil:fill="hold" smil:targetElement="id39" smil:attributeName="fill-color" smil:by="hsl(0,12%,25%)" anim:color-interpolation="hsl" anim:color-interpolation-direction="clockwise"/>
                  <anim:animateColor smil:dur="0.5s" smil:fill="hold" smil:targetElement="id39" smil:attributeName="stroke-color" smil:by="hsl(0,12%,25%)" anim:color-interpolation="hsl" anim:color-interpolation-direction="clockwise"/>
                  <anim:set smil:dur="0.5s" smil:fill="hold" smil:targetElement="id39" smil:attributeName="fill" smil:to="solid"/>
                </anim:par>
                <anim:par smil:begin="0s" presentation:text-only="true" presentation:node-type="with-previous" presentation:preset-class="emphasis" presentation:preset-id="ooo-emphasis-bold-reveal">
                  <anim:set smil:dur="indefinite" smil:targetElement="id40" smil:attributeName="font-weight" smil:to="bol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41" smil:attributeName="color" smil:by="hsl(0,12%,25%)" anim:color-interpolation="hsl" anim:color-interpolation-direction="clockwise"/>
                  <anim:animateColor smil:dur="0.5s" smil:fill="hold" smil:targetElement="id41" smil:attributeName="fill-color" smil:by="hsl(0,12%,25%)" anim:color-interpolation="hsl" anim:color-interpolation-direction="clockwise"/>
                  <anim:animateColor smil:dur="0.5s" smil:fill="hold" smil:targetElement="id41" smil:attributeName="stroke-color" smil:by="hsl(0,12%,25%)" anim:color-interpolation="hsl" anim:color-interpolation-direction="clockwise"/>
                  <anim:set smil:dur="0.5s" smil:fill="hold" smil:targetElement="id41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42" smil:attributeName="color" smil:by="hsl(0,12%,25%)" anim:color-interpolation="hsl" anim:color-interpolation-direction="clockwise"/>
                  <anim:animateColor smil:dur="0s" smil:fill="hold" smil:targetElement="id42" smil:attributeName="fill-color" smil:by="hsl(0,12%,25%)" anim:color-interpolation="hsl" anim:color-interpolation-direction="clockwise"/>
                  <anim:animateColor smil:dur="0s" smil:fill="hold" smil:targetElement="id42" smil:attributeName="stroke-color" smil:by="hsl(0,12%,25%)" anim:color-interpolation="hsl" anim:color-interpolation-direction="clockwise"/>
                  <anim:set smil:dur="0s" smil:fill="hold" smil:targetElement="id42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43" smil:attributeName="color" smil:by="hsl(0,12%,25%)" anim:color-interpolation="hsl" anim:color-interpolation-direction="clockwise"/>
                  <anim:animateColor smil:dur="0.5s" smil:fill="hold" smil:targetElement="id43" smil:attributeName="fill-color" smil:by="hsl(0,12%,25%)" anim:color-interpolation="hsl" anim:color-interpolation-direction="clockwise"/>
                  <anim:animateColor smil:dur="0.5s" smil:fill="hold" smil:targetElement="id43" smil:attributeName="stroke-color" smil:by="hsl(0,12%,25%)" anim:color-interpolation="hsl" anim:color-interpolation-direction="clockwise"/>
                  <anim:set smil:dur="0.5s" smil:fill="hold" smil:targetElement="id43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44" anim:sub-item="text" smil:attributeName="color" smil:by="hsl(0,12%,25%)" anim:color-interpolation="hsl" anim:color-interpolation-direction="clockwise"/>
                  <anim:animateColor smil:dur="0s" smil:fill="hold" smil:targetElement="id44" anim:sub-item="text" smil:attributeName="fill-color" smil:by="hsl(0,12%,25%)" anim:color-interpolation="hsl" anim:color-interpolation-direction="clockwise"/>
                  <anim:animateColor smil:dur="0s" smil:fill="hold" smil:targetElement="id44" anim:sub-item="text" smil:attributeName="stroke-color" smil:by="hsl(0,12%,25%)" anim:color-interpolation="hsl" anim:color-interpolation-direction="clockwise"/>
                  <anim:set smil:dur="0s" smil:fill="hold" smil:targetElement="id44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77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8" draw:style-name="dp1" draw:master-page-name="lisha-clear" presentation:presentation-page-layout-name="AL2T1">
        <office:forms form:automatic-focus="false" form:apply-design-mode="false"/>
        <draw:frame presentation:style-name="pr15" draw:layer="layout" svg:width="23.495cm" svg:height="1.906cm" svg:x="0.635cm" svg:y="0.635cm" presentation:class="title">
          <draw:text-box>
            <text:p>Sistemas Operacionais para RSSF</text:p>
          </draw:text-box>
        </draw:frame>
        <draw:frame presentation:style-name="pr17" draw:layer="layout" svg:width="26.67cm" svg:height="17.175cm" svg:x="0.635cm" svg:y="2.81cm" presentation:class="outline" presentation:user-transformed="true">
          <draw:text-box>
            <text:list text:style-name="L3">
              <text:list-item>
                <text:p>SO abstrai HW para aplicações</text:p>
              </text:list-item>
              <text:list-item>
                <text:p>Características do hardware de RSSF</text:p>
                <text:list>
                  <text:list-item>
                    <text:p>Dimensões reduzidas: diminuir potência</text:p>
                  </text:list-item>
                  <text:list-item>
                    <text:p>Baixo consumo de energia:</text:p>
                    <text:list>
                      <text:list-item>
                        <text:p>manter ligado apenas o que está em uso</text:p>
                      </text:list-item>
                      <text:list-item>
                        <text:p>degradação de desempenho geralmente aceitável</text:p>
                      </text:list-item>
                      <text:list-item>
                        <text:p>explorar ao máximos modos de operação de baixo consumo</text:p>
                      </text:list-item>
                    </text:list>
                  </text:list-item>
                  <text:list-item>
                    <text:p>Modularidade</text:p>
                    <text:list>
                      <text:list-item>
                        <text:p>hardware bastante heterogêneo</text:p>
                      </text:list-item>
                      <text:list-item>
                        <text:p>necessidade de abstrair diferenças arquiteturais</text:p>
                      </text:list-item>
                    </text:list>
                  </text:list-item>
                  <text:list-item>
                    <text:p>canal de comunicação adaptável</text:p>
                    <text:list>
                      <text:list-item>
                        <text:p>independente da configuração do canal</text:p>
                      </text:list-item>
                      <text:list-item>
                        <text:p>funcionalidades básicas devem ser mantidas</text:p>
                      </text:list-item>
                      <text:list-item>
                        <text:p>configuração não deve afetar semântica da aplicação, apenas qualid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8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9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Sistemas Operacionais para RSSF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Considerando o estado atual de</text:p>
                <text:list>
                  <text:list-item>
                    <text:p>Pesquisas</text:p>
                  </text:list-item>
                  <text:list-item>
                    <text:p>Tecnologias</text:p>
                  </text:list-item>
                  <text:list-item>
                    <text:p>Aplicações</text:p>
                  </text:list-item>
                </text:list>
              </text:list-item>
              <text:list-item>
                <text:p>Requisitos de SO para RSSF [Wanner and Fröhlich 2008]</text:p>
                <text:list>
                  <text:list-item>
                    <text:p>Funcionalidade básica de SO</text:p>
                  </text:list-item>
                  <text:list-item>
                    <text:p>Gerenciamento do consumo de energia</text:p>
                  </text:list-item>
                  <text:list-item>
                    <text:p>Reprogramação em campo</text:p>
                  </text:list-item>
                  <text:list-item>
                    <text:p>Abstração uniforme de sensores heterogêneos</text:p>
                  </text:list-item>
                  <text:list-item>
                    <text:p>Pilha de protocolos de comunicação configurável</text:p>
                  </text:list-item>
                  <text:list-item>
                    <text:p>Operação sob restrição de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9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0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Funcionalidades básicas de SO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Abstração de hardware</text:p>
                <text:list>
                  <text:list-item>
                    <text:p>Interfaces padrão para aplicação (API)</text:p>
                  </text:list-item>
                  <text:list-item>
                    <text:p>Garantir portabilidade entre plataformas</text:p>
                  </text:list-item>
                </text:list>
              </text:list-item>
              <text:list-item>
                <text:p>Gerenciamento de processos</text:p>
                <text:list>
                  <text:list-item>
                    <text:p>Geralmente no modelo “monotarefa, multi-thread”</text:p>
                  </text:list-item>
                  <text:list-item>
                    <text:p>Escalonamento de “tempo real”</text:p>
                  </text:list-item>
                </text:list>
              </text:list-item>
              <text:list-item>
                <text:p>Gerenciamento de memória</text:p>
                <text:list>
                  <text:list-item>
                    <text:p>Alocação dinâmica com recursos restritos?</text:p>
                  </text:list-item>
                </text:list>
              </text:list-item>
              <text:list-item>
                <text:p>Serviços de temporização</text:p>
                <text:list>
                  <text:list-item>
                    <text:p>Para escalonamento</text:p>
                  </text:list-item>
                  <text:list-item>
                    <text:p>Tarefas de natureza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0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1" draw:style-name="dp1" draw:master-page-name="lisha-clear" presentation:presentation-page-layout-name="AL2T1">
        <office:forms form:automatic-focus="false" form:apply-design-mode="false"/>
        <draw:frame presentation:style-name="pr7" draw:text-style-name="P37" draw:layer="layout" svg:width="23.495cm" svg:height="3.269cm" svg:x="0.635cm" svg:y="-0.047cm" presentation:class="title" presentation:user-transformed="true">
          <draw:text-box>
            <text:p><text:span text:style-name="T39">Gerenciamento do consumo</text:span><text:span text:style-name="T39"><text:line-break/></text:span><text:span text:style-name="T39">de energia</text:span></text:p>
          </draw:text-box>
        </draw:frame>
        <draw:frame presentation:style-name="pr17" draw:layer="layout" svg:width="26.67cm" svg:height="15.876cm" svg:x="0.635cm" svg:y="3.81cm" presentation:class="outline">
          <draw:text-box>
            <text:list text:style-name="L3">
              <text:list-item>
                <text:p>Bateria</text:p>
                <text:list>
                  <text:list-item>
                    <text:p>Vida útil da rede = vida útil da bateria</text:p>
                    <text:list>
                      <text:list-item>
                        <text:p><text:span text:style-name="T25">“</text:span><text:span text:style-name="T25">uma corrente é tão forte quanto seu elo mais fraco”</text:span></text:p>
                      </text:list-item>
                    </text:list>
                  </text:list-item>
                  <text:list-item>
                    <text:p><text:span text:style-name="T27">Fator limitante no dimensionamento do sistema</text:span></text:p>
                  </text:list-item>
                </text:list>
              </text:list-item>
              <text:list-item>
                <text:p><text:span text:style-name="T27">Sistema operacional deve</text:span></text:p>
                <text:list>
                  <text:list-item>
                    <text:p><text:span text:style-name="T27">Manter ligados apenas dispositivos necessários</text:span></text:p>
                  </text:list-item>
                  <text:list-item>
                    <text:p><text:span text:style-name="T27">Complexidade deve ser abstraída da aplicação</text:span></text:p>
                  </text:list-item>
                </text:list>
              </text:list-item>
              <text:list-item>
                <text:p><text:span text:style-name="T27">Ler temperatura</text:span></text:p>
                <text:list>
                  <text:list-item>
                    <text:p><text:span text:style-name="T27">Timer =&gt; Liga CPU =&gt; Liga sensor =&gt; Lê valor</text:span></text:p>
                    <text:p><text:span text:style-name="T27">=&gt; Desliga sensor =&gt; Liga rádio =&gt; Envia leitura</text:span></text:p>
                    <text:p><text:span text:style-name="T27">=&gt; Desliga rádio =&gt; Desliga CPU</text:span></text:p>
                  </text:list-item>
                  <text:list-item>
                    <text:p><text:span text:style-name="T27">Timer =&gt; Lê valor =&gt; Envia lei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1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2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Reprogramação em campo</text:p>
          </draw:text-box>
        </draw:frame>
        <draw:frame presentation:style-name="pr17" draw:layer="layout" svg:width="26.67cm" svg:height="16.321cm" svg:x="0.635cm" svg:y="3.61cm" presentation:class="outline" presentation:user-transformed="true">
          <draw:text-box>
            <text:list text:style-name="L3">
              <text:list-item>
                <text:p>RSSF</text:p>
                <text:list>
                  <text:list-item>
                    <text:p>Grande volume de nodos</text:p>
                  </text:list-item>
                  <text:list-item>
                    <text:p>Em regiões inóspitas</text:p>
                  </text:list-item>
                  <text:list-item>
                    <text:p>Requisitos e/ou parâmetros de operação mudam</text:p>
                  </text:list-item>
                </text:list>
              </text:list-item>
              <text:list-item>
                <text:p>A reprogramação de uma rede já implantada se torna essencial!</text:p>
                <text:list>
                  <text:list-item>
                    <text:p>Prolonga vida útil do sistema</text:p>
                  </text:list-item>
                  <text:list-item>
                    <text:p>Permite a correção de bugs</text:p>
                  </text:list-item>
                </text:list>
              </text:list-item>
              <text:list-item>
                <text:p>Porém, deve ser utilizada com cautela</text:p>
                <text:list>
                  <text:list-item>
                    <text:p>Gera um “stall” na rede, durante propagação</text:p>
                  </text:list-item>
                  <text:list-item>
                    <text:p>Ineficiente energeticamente</text:p>
                    <text:list>
                      <text:list-item>
                        <text:p>Sobreuso do rádio</text:p>
                      </text:list-item>
                      <text:list-item>
                        <text:p>Escritas na memória de programa (EEPROM/Flas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3" draw:style-name="dp1" draw:master-page-name="lisha-clear" presentation:presentation-page-layout-name="AL4T3">
        <office:forms form:automatic-focus="false" form:apply-design-mode="false"/>
        <draw:frame presentation:style-name="pr15" draw:layer="layout" svg:width="23.495cm" svg:height="3.269cm" svg:x="0.635cm" svg:y="-0.047cm" presentation:class="title">
          <draw:text-box>
            <text:p>Abstração uniforme de<text:line-break/>sensores heterogêneos</text:p>
          </draw:text-box>
        </draw:frame>
        <draw:frame presentation:style-name="pr18" draw:layer="layout" svg:width="13.014cm" svg:height="16.161cm" svg:x="0.635cm" svg:y="3.81cm" presentation:class="outline">
          <draw:text-box>
            <text:list text:style-name="L3">
              <text:list-item>
                <text:p>Modularidade =&gt; heterogeneidade</text:p>
              </text:list-item>
              <text:list-item>
                <text:p>Portabilidade comprometida</text:p>
              </text:list-item>
              <text:list-item>
                <text:p>CPU e rádio variam entre plataformas</text:p>
              </text:list-item>
              <text:list-item>
                <text:p>Mas sensores variam muito mais</text:p>
                <text:list>
                  <text:list-item>
                    <text:p>Interface de acesso</text:p>
                  </text:list-item>
                  <text:list-item>
                    <text:p>Características operacionais</text:p>
                  </text:list-item>
                  <text:list-item>
                    <text:p>Curvas de resposta</text:p>
                  </text:list-item>
                </text:list>
              </text:list-item>
            </text:list>
          </draw:text-box>
        </draw:frame>
        <draw:frame presentation:style-name="pr17" draw:layer="layout" svg:width="13.014cm" svg:height="15.876cm" svg:x="14.3cm" svg:y="3.81cm" presentation:class="outline">
          <draw:text-box>
            <text:list text:style-name="L3">
              <text:list-item>
                <text:p>Figura: termistor x sht1x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4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placeholder="true">
          <draw:text-box/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8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5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placeholder="true">
          <draw:text-box/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8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6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 presentation:placeholder="true">
          <draw:text-box/>
        </draw:frame>
        <draw:frame presentation:style-name="pr17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8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7" draw:style-name="dp1" draw:master-page-name="lisha-clear" presentation:presentation-page-layout-name="AL2T1">
        <office:forms form:automatic-focus="false" form:apply-design-mode="false"/>
        <draw:frame presentation:style-name="pr7" draw:layer="layout" svg:width="23.495cm" svg:height="1.906cm" svg:x="0.635cm" svg:y="0.635cm" presentation:class="title">
          <draw:text-box>
            <text:p>Agenda</text:p>
          </draw:text-box>
        </draw:frame>
        <draw:frame presentation:style-name="pr8" draw:id="id50" draw:layer="layout" svg:width="26.67cm" svg:height="2.635cm" svg:x="0.635cm" svg:y="3.811cm" presentation:class="outline" presentation:user-transformed="true">
          <draw:text-box>
            <text:list text:style-name="L3">
              <text:list-item>
                <text:p>Redes de sensores sem-fio e aplicações</text:p>
                <text:list>
                  <text:list-item>
                    <text:p>Ex. 01: programação de aplicações no EPOS</text:p>
                  </text:list-item>
                </text:list>
              </text:list-item>
            </text:list>
          </draw:text-box>
        </draw:frame>
        <draw:frame presentation:style-name="pr9" draw:id="id45" draw:layer="layout" svg:width="26.67cm" svg:height="1.905cm" svg:x="0.635cm" svg:y="17.78cm" presentation:class="outline" presentation:user-transformed="true">
          <draw:text-box>
            <text:list text:style-name="L3">
              <text:list-item>
                <text:p>Gerência do consumo de energia para RSSF</text:p>
              </text:list-item>
            </text:list>
          </draw:text-box>
        </draw:frame>
        <draw:frame presentation:style-name="pr10" draw:id="id46" draw:layer="layout" svg:width="26.67cm" svg:height="2.635cm" svg:x="0.635cm" svg:y="13.97cm" presentation:class="outline" presentation:user-transformed="true">
          <draw:text-box>
            <text:list text:style-name="L3">
              <text:list-item>
                <text:p>Sistemas operacionais para RSSF</text:p>
                <text:list>
                  <text:list-item>
                    <text:p>Ex. 04: gerando EPOS e executando no EPOSMote</text:p>
                  </text:list-item>
                </text:list>
              </text:list-item>
            </text:list>
          </draw:text-box>
        </draw:frame>
        <draw:frame presentation:style-name="pr10" draw:id="id47" draw:layer="layout" svg:width="26.67cm" svg:height="2.635cm" svg:x="0.635cm" svg:y="11.43cm" presentation:class="outline" presentation:user-transformed="true">
          <draw:text-box>
            <text:list text:style-name="L3">
              <text:list-item>
                <text:p>Controle de acesso ao meio (MAC)</text:p>
                <text:list>
                  <text:list-item>
                    <text:p>Ex. 03: configuração do C-MAC no EPOS</text:p>
                  </text:list-item>
                </text:list>
              </text:list-item>
            </text:list>
          </draw:text-box>
        </draw:frame>
        <draw:frame presentation:style-name="pr10" draw:id="id48" draw:layer="layout" svg:width="26.67cm" svg:height="2.635cm" svg:x="0.635cm" svg:y="8.89cm" presentation:class="outline" presentation:user-transformed="true">
          <draw:text-box>
            <text:list text:style-name="L3">
              <text:list-item>
                <text:p>Sensores e aquisição de dados</text:p>
                <text:list>
                  <text:list-item>
                    <text:p>Ex. 02: aquisição de dados no EPOS</text:p>
                  </text:list-item>
                </text:list>
              </text:list-item>
            </text:list>
          </draw:text-box>
        </draw:frame>
        <draw:frame presentation:style-name="pr10" draw:id="id49" draw:layer="layout" svg:width="26.67cm" svg:height="2.635cm" svg:x="0.635cm" svg:y="6.35cm" presentation:class="outline" presentation:user-transformed="true">
          <draw:text-box>
            <text:list text:style-name="L3">
              <text:list-item>
                <text:p>Módulos de sensoriamento</text:p>
                <text:list>
                  <text:list-item>
                    <text:p>Apresentação do EPOS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text-only="true" presentation:node-type="with-previous" presentation:preset-class="emphasis" presentation:preset-id="ooo-emphasis-bold-reveal">
                  <anim:set smil:dur="indefinite" smil:targetElement="id45" smil:attributeName="font-weight" smil:to="bol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46" smil:attributeName="color" smil:by="hsl(0,12%,25%)" anim:color-interpolation="hsl" anim:color-interpolation-direction="clockwise"/>
                  <anim:animateColor smil:dur="0s" smil:fill="hold" smil:targetElement="id46" smil:attributeName="fill-color" smil:by="hsl(0,12%,25%)" anim:color-interpolation="hsl" anim:color-interpolation-direction="clockwise"/>
                  <anim:animateColor smil:dur="0s" smil:fill="hold" smil:targetElement="id46" smil:attributeName="stroke-color" smil:by="hsl(0,12%,25%)" anim:color-interpolation="hsl" anim:color-interpolation-direction="clockwise"/>
                  <anim:set smil:dur="0s" smil:fill="hold" smil:targetElement="id46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47" smil:attributeName="color" smil:by="hsl(0,12%,25%)" anim:color-interpolation="hsl" anim:color-interpolation-direction="clockwise"/>
                  <anim:animateColor smil:dur="0.5s" smil:fill="hold" smil:targetElement="id47" smil:attributeName="fill-color" smil:by="hsl(0,12%,25%)" anim:color-interpolation="hsl" anim:color-interpolation-direction="clockwise"/>
                  <anim:animateColor smil:dur="0.5s" smil:fill="hold" smil:targetElement="id47" smil:attributeName="stroke-color" smil:by="hsl(0,12%,25%)" anim:color-interpolation="hsl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48" smil:attributeName="color" smil:by="hsl(0,12%,25%)" anim:color-interpolation="hsl" anim:color-interpolation-direction="clockwise"/>
                  <anim:animateColor smil:dur="0s" smil:fill="hold" smil:targetElement="id48" smil:attributeName="fill-color" smil:by="hsl(0,12%,25%)" anim:color-interpolation="hsl" anim:color-interpolation-direction="clockwise"/>
                  <anim:animateColor smil:dur="0s" smil:fill="hold" smil:targetElement="id48" smil:attributeName="stroke-color" smil:by="hsl(0,12%,25%)" anim:color-interpolation="hsl" anim:color-interpolation-direction="clockwise"/>
                  <anim:set smil:dur="0s" smil:fill="hold" smil:targetElement="id48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49" smil:attributeName="color" smil:by="hsl(0,12%,25%)" anim:color-interpolation="hsl" anim:color-interpolation-direction="clockwise"/>
                  <anim:animateColor smil:dur="0.5s" smil:fill="hold" smil:targetElement="id49" smil:attributeName="fill-color" smil:by="hsl(0,12%,25%)" anim:color-interpolation="hsl" anim:color-interpolation-direction="clockwise"/>
                  <anim:animateColor smil:dur="0.5s" smil:fill="hold" smil:targetElement="id49" smil:attributeName="stroke-color" smil:by="hsl(0,12%,25%)" anim:color-interpolation="hsl" anim:color-interpolation-direction="clockwise"/>
                  <anim:set smil:dur="0.5s" smil:fill="hold" smil:targetElement="id49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s" smil:fill="hold" smil:targetElement="id50" anim:sub-item="text" smil:attributeName="color" smil:by="hsl(0,12%,25%)" anim:color-interpolation="hsl" anim:color-interpolation-direction="clockwise"/>
                  <anim:animateColor smil:dur="0s" smil:fill="hold" smil:targetElement="id50" anim:sub-item="text" smil:attributeName="fill-color" smil:by="hsl(0,12%,25%)" anim:color-interpolation="hsl" anim:color-interpolation-direction="clockwise"/>
                  <anim:animateColor smil:dur="0s" smil:fill="hold" smil:targetElement="id50" anim:sub-item="text" smil:attributeName="stroke-color" smil:by="hsl(0,12%,25%)" anim:color-interpolation="hsl" anim:color-interpolation-direction="clockwise"/>
                  <anim:set smil:dur="0s" smil:fill="hold" smil:targetElement="id50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87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8" draw:style-name="dp1" draw:master-page-name="lisha-clear" presentation:presentation-page-layout-name="AL3T19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onsumo de energia em RSSF</text:p>
          </draw:text-box>
        </draw:frame>
        <presentation:notes draw:style-name="dp2">
          <draw:page-thumbnail draw:style-name="gr1" draw:layer="layout" svg:width="12.716cm" svg:height="9.537cm" svg:x="4.436cm" svg:y="2.791cm" draw:page-number="88" presentation:class="page"/>
          <draw:frame presentation:style-name="pr6" draw:text-style-name="P23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"/>
    <draw:marker draw:name="Arrowheads_20_15" draw:display-name="Arrowheads 15" svg:viewBox="0 0 20 30" svg:d="m10 0-10 30h20z"/>
    <draw:marker draw:name="Arrowheads_20_16" draw:display-name="Arrowheads 16" svg:viewBox="0 0 20 30" svg:d="m10 0-10 30h20z"/>
    <draw:marker draw:name="Arrowheads_20_44" draw:display-name="Arrowheads 44" svg:viewBox="0 0 20 30" svg:d="m10 0-10 30h20z"/>
    <draw:marker draw:name="Arrowheads_20_45" draw:display-name="Arrowheads 45" svg:viewBox="0 0 20 30" svg:d="m10 0-10 30h20z"/>
    <draw:marker draw:name="Arrowheads_20_46" draw:display-name="Arrowheads 46" svg:viewBox="0 0 20 30" svg:d="m10 0-10 30h20z"/>
    <draw:marker draw:name="Arrowheads_20_47" draw:display-name="Arrowheads 47" svg:viewBox="0 0 20 30" svg:d="m10 0-10 30h20z"/>
    <draw:marker draw:name="Arrowheads_20_48" draw:display-name="Arrowheads 48" svg:viewBox="0 0 20 30" svg:d="m10 0-10 30h20z"/>
    <draw:marker draw:name="Arrowheads_20_49" draw:display-name="Arrowheads 49" svg:viewBox="0 0 20 30" svg:d="m10 0-10 30h20z"/>
    <draw:marker draw:name="Arrowheads_20_50" draw:display-name="Arrowheads 50" svg:viewBox="0 0 20 30" svg:d="m10 0-10 30h20z"/>
    <draw:marker draw:name="Arrowheads_20_51" draw:display-name="Arrowheads 51" svg:viewBox="0 0 20 30" svg:d="m10 0-10 30h20z"/>
    <draw:marker draw:name="Arrowheads_20_52" draw:display-name="Arrowheads 52" svg:viewBox="0 0 20 30" svg:d="m10 0-10 30h20z"/>
    <draw:marker draw:name="Arrowheads_20_53" draw:display-name="Arrowheads 53" svg:viewBox="0 0 20 30" svg:d="m10 0-10 30h20z"/>
    <draw:marker draw:name="Arrowheads_20_54" draw:display-name="Arrowheads 54" svg:viewBox="0 0 20 30" svg:d="m10 0-10 30h20z"/>
    <draw:marker draw:name="Arrowheads_20_55" draw:display-name="Arrowheads 55" svg:viewBox="0 0 20 30" svg:d="m10 0-10 30h20z"/>
    <draw:marker draw:name="Arrowheads_20_56" draw:display-name="Arrowheads 56" svg:viewBox="0 0 20 30" svg:d="m10 0-10 30h20z"/>
    <draw:marker draw:name="Arrowheads_20_57" draw:display-name="Arrowheads 57" svg:viewBox="0 0 20 30" svg:d="m10 0-10 30h20z"/>
    <draw:marker draw:name="Arrowheads_20_58" draw:display-name="Arrowheads 58" svg:viewBox="0 0 20 30" svg:d="m10 0-10 30h20z"/>
    <draw:marker draw:name="Arrowheads_20_59" draw:display-name="Arrowheads 59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pt" fo:country="BR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7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text:enable-numbering="true" fo:margin-left="1.2cm" fo:margin-right="0cm" fo:margin-top="0cm" fo:margin-bottom="0.5cm" fo:text-align="start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8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1" draw:layer="backgroundobjects" svg:width="7.42cm" svg:height="0.53cm" svg:x="0.7cm" svg:y="20cm">
        <draw:text-box>
          <text:p text:style-name="MP1"><text:span text:style-name="MT1">28/10/2010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1" draw:layer="backgroundobjects" svg:width="15.24cm" svg:height="0.53cm" svg:x="6.35cm" svg:y="20cm">
        <draw:text-box>
          <text:p text:style-name="MP6"><text:span text:style-name="MT1">Arliones Hoeller Jr (http://www.lisha.ufsc.br/Arliones)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8-04-26T10:15:33</meta:creation-date>
    <dc:date>2010-10-27T19:56:29</dc:date>
    <meta:editing-cycles>148</meta:editing-cycles>
    <meta:editing-duration>PT44H45M44S</meta:editing-duration>
    <meta:document-statistic meta:object-count="56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>
  <semantics>
    <mrow>
      <msub>
        <mi>W</mi>
        <mi>o</mi>
      </msub>
      <mo stretchy="false">≥</mo>
      <mrow>
        <mn>2</mn>
        <mi mathvariant="normal">×</mi>
        <mi>W</mi>
      </mrow>
    </mrow>
    <annotation encoding="StarMath 5.0">W_o geslant 2 times W</annotation>
  </semantics>
</math>
</file>

<file path=Object 3/content.xml><?xml version="1.0" encoding="utf-8"?>
<math xmlns="http://www.w3.org/1998/Math/MathML">
  <semantics>
    <mrow>
      <mrow>
        <msub>
          <mi>W</mi>
          <mi>o</mi>
        </msub>
        <mo stretchy="false">≥</mo>
        <mn>400</mn>
      </mrow>
      <mi mathvariant="italic">kHz</mi>
    </mrow>
    <annotation encoding="StarMath 5.0">W_o geslant 400 kHz</annotation>
  </semantics>
</math>
</file>

<file path=Object 4/content.xml><?xml version="1.0" encoding="utf-8"?>
<math xmlns="http://www.w3.org/1998/Math/MathML">
  <semantics>
    <mrow>
      <mrow>
        <msub>
          <mi>W</mi>
          <mi>b</mi>
        </msub>
        <mi mathvariant="normal">=</mi>
        <mn>200</mn>
      </mrow>
      <mi mathvariant="italic">kHz</mi>
    </mrow>
    <annotation encoding="StarMath 5.0">W_b = 200 kHz</annotation>
  </semantics>
</math>
</file>

<file path=Object 5/content.xml><?xml version="1.0" encoding="utf-8"?>
<math xmlns="http://www.w3.org/1998/Math/MathML">
  <semantics>
    <mrow>
      <mrow>
        <msub>
          <mi>W</mi>
          <mi>a</mi>
        </msub>
        <mi mathvariant="normal">=</mi>
        <mn>100</mn>
      </mrow>
      <mi mathvariant="italic">kHz</mi>
    </mrow>
    <annotation encoding="StarMath 5.0">W_a = 100 kHz</annotation>
  </semantics>
</math>
</file>