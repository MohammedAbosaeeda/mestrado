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width="0.076cm" draw:marker-start-width="0.313cm" draw:marker-end="Arrow_20_concave" draw:marker-end-width="0.356cm" draw:textarea-horizontal-align="center" draw:textarea-vertical-align="middle" fo:padding-top="0.162cm" fo:padding-bottom="0.162cm" fo:padding-left="0.287cm" fo:padding-right="0.287cm"/>
    </style:style>
    <style:style style:name="gr3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_20__28_var_29_"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_20__28_var_29_"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solid" draw:stroke-dash="Ultrafine_20_Dashed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fo:font-size="10pt" style:font-size-asian="10pt" style:font-size-complex="10pt"/>
    </style:style>
    <style:style style:name="P3" style:family="paragraph">
      <style:paragraph-properties fo:text-align="center"/>
      <style:text-properties fo:font-family="Helvetica" style:font-family-generic="swis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family="Helvetica" style:font-family-generic="swiss" fo:font-size="10pt" style:font-size-asian="10pt" style:font-size-complex="10pt"/>
    </style:style>
    <style:style style:name="T2" style:family="text">
      <style:text-properties fo:font-family="Helvetica" style:font-family-generic="swiss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341cm" svg:height="2.876cm" svg:x="2.22cm" svg:y="1.99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.89cm" svg:y1="4.871cm" svg:x2="3.89cm" svg:y2="9.342cm" draw:start-shape="id1" draw:start-glue-point="2" draw:end-shape="id2" draw:end-glue-point="0" svg:d="m3890 4871v4471">
          <text:p/>
        </draw:connector>
        <draw:custom-shape draw:style-name="gr3" draw:text-style-name="P2" draw:id="id3" draw:layer="layout" svg:width="2.617cm" svg:height="0.903cm" svg:x="9.791cm" svg:y="5.408cm">
          <draw:glue-point draw:id="4" svg:x="-2.35cm" svg:y="5.149cm"/>
          <draw:glue-point draw:id="5" svg:x="2.693cm" svg:y="4.839cm"/>
          <text:p text:style-name="P1"><text:span text:style-name="T1">HLS: </text:span></text:p>
          <text:p text:style-name="P1"><text:span text:style-name="T1">Catapult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5" draw:layer="layout" svg:width="2.617cm" svg:height="0.903cm" svg:x="11.388cm" svg:y="9.342cm">
          <text:p text:style-name="P1"><text:span text:style-name="T1">RTL synthesis: </text:span></text:p>
          <text:p text:style-name="P1"><text:span text:style-name="T1">ISE</text:span></text:p>
          <draw:enhanced-geometry svg:viewBox="0 0 21600 21600" draw:type="rectangle" draw:enhanced-path="M 0 0 L 21600 0 21600 21600 0 21600 0 0 Z N"/>
        </draw:custom-shape>
        <draw:g draw:id="id4">
          <draw:custom-shape draw:style-name="gr4" draw:text-style-name="P3" draw:layer="layout" svg:width="3.032cm" svg:height="0.9cm" svg:x="11.18cm" svg:y="6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032cm" svg:height="0.9cm" svg:x="11.18cm" svg:y="7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3.032cm" svg:height="0.9cm" svg:x="11.18cm" svg:y="7.104cm">
            <text:p text:style-name="P1"><text:span text:style-name="T2">VHDL/Verilo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3" draw:id="id6" draw:layer="layout" svg:width="2.83cm" svg:height="1.456cm" svg:x="11.281cm" svg:y="11.426cm">
          <text:p text:style-name="P1"><text:span text:style-name="T2">HW</text:span></text:p>
          <text:p text:style-name="P1"><text:span text:style-name="T2">(FPGA bit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803cm" svg:y1="6.295cm" svg:x2="12.696cm" svg:y2="6.904cm" draw:start-shape="id3" draw:start-glue-point="5" draw:end-shape="id4" draw:end-glue-point="0" svg:d="m11803 6295 893 609">
          <text:p/>
        </draw:connector>
        <draw:connector draw:style-name="gr2" draw:text-style-name="P1" draw:layer="layout" draw:type="line" svg:x1="12.696cm" svg:y1="8.004cm" svg:x2="12.696cm" svg:y2="9.342cm" draw:start-shape="id4" draw:start-glue-point="2" draw:end-shape="id5" draw:end-glue-point="0" svg:d="m12696 8004v1338">
          <text:p/>
        </draw:connector>
        <draw:connector draw:style-name="gr2" draw:text-style-name="P1" draw:layer="layout" draw:type="line" svg:x1="12.696cm" svg:y1="10.245cm" svg:x2="12.695cm" svg:y2="11.426cm" draw:start-shape="id5" draw:start-glue-point="2" draw:end-shape="id6" draw:end-glue-point="4" svg:d="m12696 10245-1 1181">
          <text:p/>
        </draw:connector>
        <draw:custom-shape draw:style-name="gr3" draw:text-style-name="P2" draw:id="id2" draw:layer="layout" svg:width="2.617cm" svg:height="0.903cm" svg:x="2.582cm" svg:y="9.342cm">
          <text:p text:style-name="P1"><text:span text:style-name="T1">Compiler: </text:span></text:p>
          <text:p text:style-name="P1"><text:span text:style-name="T1">g++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id="id7" draw:layer="layout" svg:width="2.83cm" svg:height="1.456cm" svg:x="2.475cm" svg:y="11.426cm">
          <text:p text:style-name="P1"><text:span text:style-name="T2">SW</text:span></text:p>
          <text:p text:style-name="P1"><text:span text:style-name="T2">(system imag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89cm" svg:y1="10.245cm" svg:x2="3.889cm" svg:y2="11.426cm" draw:start-shape="id2" draw:start-glue-point="2" draw:end-shape="id7" draw:end-glue-point="4" svg:d="m3890 10245-1 1181">
          <text:p/>
        </draw:connector>
        <draw:custom-shape draw:style-name="gr3" draw:text-style-name="P2" draw:id="id8" draw:layer="layout" svg:width="2.17cm" svg:height="1.94cm" svg:x="8.397cm" svg:y="8.823cm">
          <text:p text:style-name="P1"><text:span text:style-name="T1">HW IPs</text:span></text:p>
          <text:p text:style-name="P1"><text:span text:style-name="T1">and model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id="id18" draw:layer="layout" svg:width="2.17cm" svg:height="1.94cm" svg:x="5.969cm" svg:y="8.823cm">
          <text:p text:style-name="P1"><text:span text:style-name="T1">EPOS</text:span></text:p>
          <text:p text:style-name="P1"><text:span text:style-name="T1">library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draw:id="id11">
          <draw:glue-point draw:id="4" svg:x="-3.037cm" svg:y="4.172cm"/>
          <draw:glue-point draw:id="5" svg:x="-3.598cm" svg:y="3.727cm"/>
          <draw:glue-point draw:id="6" svg:x="3.618cm" svg:y="3.827cm"/>
          <draw:glue-point draw:id="7" svg:x="-1.837cm" svg:y="4.872cm"/>
          <draw:glue-point draw:id="8" svg:x="1.998cm" svg:y="4.872cm"/>
          <draw:custom-shape draw:style-name="gr4" draw:text-style-name="P3" draw:layer="layout" svg:width="3.032cm" svg:height="0.9cm" svg:x="2.374cm" svg:y="2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032cm" svg:height="0.9cm" svg:x="2.374cm" svg:y="2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3.032cm" svg:height="0.9cm" svg:x="2.374cm" svg:y="2.339cm">
            <text:p text:style-name="P1"><text:span text:style-name="T2">C++ SW cod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12">
          <draw:glue-point draw:id="4" svg:x="-3.037cm" svg:y="4.172cm"/>
          <draw:glue-point draw:id="5" svg:x="-3.598cm" svg:y="3.727cm"/>
          <draw:glue-point draw:id="6" svg:x="3.618cm" svg:y="3.827cm"/>
          <draw:glue-point draw:id="7" svg:x="-1.837cm" svg:y="4.872cm"/>
          <draw:glue-point draw:id="8" svg:x="1.998cm" svg:y="4.872cm"/>
          <draw:custom-shape draw:style-name="gr4" draw:text-style-name="P3" draw:layer="layout" svg:width="3.032cm" svg:height="0.9cm" svg:x="9.583cm" svg:y="2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032cm" svg:height="0.9cm" svg:x="9.583cm" svg:y="2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3.032cm" svg:height="0.9cm" svg:x="9.583cm" svg:y="2.339cm">
            <text:p text:style-name="P1"><text:span text:style-name="T2">C++ HW cod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" draw:text-style-name="P1" draw:layer="layout" draw:type="line" svg:x1="10.567cm" svg:y1="9.793cm" svg:x2="11.388cm" svg:y2="9.793cm" draw:start-shape="id8" draw:end-shape="id5" draw:end-glue-point="3" svg:d="m10567 9793h821">
          <text:p/>
        </draw:connector>
        <draw:g draw:id="id17">
          <draw:custom-shape draw:style-name="gr4" draw:text-style-name="P3" draw:layer="layout" svg:width="3.032cm" svg:height="0.9cm" svg:x="7.966cm" svg:y="6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032cm" svg:height="0.9cm" svg:x="7.966cm" svg:y="6.9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3.032cm" svg:height="0.9cm" svg:x="7.966cm" svg:y="7.092cm">
            <text:p text:style-name="P1"><text:span text:style-name="T2">SystemC model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14">
          <draw:glue-point draw:id="4" svg:x="-3.037cm" svg:y="4.172cm"/>
          <draw:glue-point draw:id="5" svg:x="-3.598cm" svg:y="3.727cm"/>
          <draw:glue-point draw:id="6" svg:x="3.618cm" svg:y="3.827cm"/>
          <draw:glue-point draw:id="7" svg:x="-1.837cm" svg:y="4.872cm"/>
          <draw:glue-point draw:id="8" svg:x="1.998cm" svg:y="4.872cm"/>
          <draw:custom-shape draw:style-name="gr6" draw:text-style-name="P3" draw:layer="layout" svg:width="3.032cm" svg:height="0.9cm" svg:x="9.583cm" svg:y="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3.032cm" svg:height="0.9cm" svg:x="9.583cm" svg:y="3.7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3.032cm" svg:height="0.9cm" svg:x="9.583cm" svg:y="3.838cm">
            <text:p text:style-name="P1"><text:span text:style-name="T2">HW proxys/agent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13">
          <draw:glue-point draw:id="4" svg:x="-3.037cm" svg:y="4.172cm"/>
          <draw:glue-point draw:id="5" svg:x="-3.598cm" svg:y="3.727cm"/>
          <draw:glue-point draw:id="6" svg:x="3.618cm" svg:y="3.827cm"/>
          <draw:glue-point draw:id="7" svg:x="-1.837cm" svg:y="4.872cm"/>
          <draw:glue-point draw:id="8" svg:x="1.998cm" svg:y="4.872cm"/>
          <draw:custom-shape draw:style-name="gr6" draw:text-style-name="P3" draw:layer="layout" svg:width="3.032cm" svg:height="0.9cm" svg:x="2.374cm" svg:y="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3.032cm" svg:height="0.9cm" svg:x="2.374cm" svg:y="3.7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3.032cm" svg:height="0.9cm" svg:x="2.374cm" svg:y="3.838cm">
            <text:p text:style-name="P1"><text:span text:style-name="T2">SW proxys/agent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2" draw:id="id10" draw:layer="layout" svg:width="2.617cm" svg:height="0.903cm" svg:x="6.199cm" svg:y="3.737cm">
          <draw:glue-point draw:id="4" svg:x="-5.036cm" svg:y="-5.171cm"/>
          <draw:glue-point draw:id="5" svg:x="4.978cm" svg:y="-5.282cm"/>
          <draw:glue-point draw:id="6" svg:x="-5.082cm" svg:y="5.116cm"/>
          <draw:glue-point draw:id="7" svg:x="4.978cm" svg:y="5.116cm"/>
          <draw:glue-point draw:id="8" svg:x="-2.311cm" svg:y="5.26cm"/>
          <draw:glue-point draw:id="9" svg:x="2.693cm" svg:y="4.972cm"/>
          <text:p text:style-name="P1"><text:span text:style-name="T1">EPOS</text:span></text:p>
          <text:p text:style-name="P1"><text:span text:style-name="T1">analyser</text:span></text:p>
          <draw:enhanced-geometry svg:viewBox="0 0 21600 21600" draw:type="rectangle" draw:enhanced-path="M 0 0 L 21600 0 21600 21600 0 21600 0 0 Z N"/>
        </draw:custom-shape>
        <draw:g draw:id="id9">
          <draw:glue-point draw:id="4" svg:x="-3.037cm" svg:y="4.172cm"/>
          <draw:glue-point draw:id="5" svg:x="-3.598cm" svg:y="3.727cm"/>
          <draw:glue-point draw:id="6" svg:x="3.618cm" svg:y="3.827cm"/>
          <draw:glue-point draw:id="7" svg:x="-1.837cm" svg:y="4.872cm"/>
          <draw:glue-point draw:id="8" svg:x="1.998cm" svg:y="4.872cm"/>
          <draw:custom-shape draw:style-name="gr5" draw:text-style-name="P3" draw:layer="layout" svg:width="3.032cm" svg:height="0.9cm" svg:x="5.991cm" svg:y="2.239cm">
            <text:p text:style-name="P1"><text:span text:style-name="T2">Proxy/Agent</text:span></text:p>
            <text:p text:style-name="P1"><text:span text:style-name="T2">framework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" draw:text-style-name="P1" draw:layer="layout" draw:type="line" svg:x1="7.507cm" svg:y1="3.139cm" svg:x2="7.507cm" svg:y2="3.737cm" draw:start-shape="id9" draw:start-glue-point="2" draw:end-shape="id10" svg:d="m7507 3139v598">
          <text:p/>
        </draw:connector>
        <draw:connector draw:style-name="gr2" draw:text-style-name="P1" draw:layer="layout" draw:type="line" svg:x1="4.986cm" svg:y1="3.109cm" svg:x2="6.199cm" svg:y2="3.737cm" draw:start-shape="id11" draw:start-glue-point="6" draw:end-shape="id10" draw:end-glue-point="4" svg:d="m4986 3109 1213 628">
          <text:p/>
        </draw:connector>
        <draw:connector draw:style-name="gr2" draw:text-style-name="P1" draw:layer="layout" draw:type="line" svg:x1="10.009cm" svg:y1="3.098cm" svg:x2="8.809cm" svg:y2="3.737cm" draw:start-shape="id12" draw:start-glue-point="5" draw:end-shape="id10" draw:end-glue-point="5" svg:d="m10009 3098-1200 639">
          <text:p/>
        </draw:connector>
        <draw:connector draw:style-name="gr2" draw:text-style-name="P1" draw:layer="layout" draw:type="line" svg:x1="6.199cm" svg:y1="4.188cm" svg:x2="5.406cm" svg:y2="4.188cm" draw:start-shape="id10" draw:start-glue-point="3" draw:end-shape="id13" draw:end-glue-point="1" svg:d="m6199 4188h-793">
          <text:p/>
        </draw:connector>
        <draw:connector draw:style-name="gr2" draw:text-style-name="P1" draw:layer="layout" draw:type="line" svg:x1="8.816cm" svg:y1="4.188cm" svg:x2="9.583cm" svg:y2="4.188cm" draw:start-shape="id10" draw:start-glue-point="1" draw:end-shape="id14" svg:d="m8816 4188h767">
          <text:p/>
        </draw:connector>
        <draw:custom-shape draw:style-name="gr8" draw:text-style-name="P2" draw:id="id15" draw:layer="layout" svg:width="2.669cm" svg:height="1.1cm" svg:x="8.148cm" svg:y="11.604cm">
          <draw:glue-point draw:id="10" svg:x="-2.465cm" svg:y="-4.972cm"/>
          <draw:glue-point draw:id="11" svg:x="3.237cm" svg:y="-5.072cm"/>
          <draw:glue-point draw:id="12" svg:x="3.165cm" svg:y="4.945cm"/>
          <draw:glue-point draw:id="13" svg:x="-2.442cm" svg:y="5.09cm"/>
          <text:p text:style-name="P1"><text:span text:style-name="T1">Virtual</text:span></text:p>
          <text:p text:style-name="P1"><text:span text:style-name="T1">platfor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322.911051212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id="id16" draw:layer="layout" svg:width="2.669cm" svg:height="1.1cm" svg:x="8.089cm" svg:y="13.017cm">
          <draw:glue-point draw:id="10" svg:x="-2.427cm" svg:y="-5.054cm"/>
          <draw:glue-point draw:id="11" svg:x="3.162cm" svg:y="-4.963cm"/>
          <text:p text:style-name="P1"><text:span text:style-name="T1">Physical</text:span></text:p>
          <text:p text:style-name="P1"><text:span text:style-name="T1">platfor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322.911051212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" draw:text-style-name="P1" draw:layer="layout" draw:type="line" svg:x1="5.305cm" svg:y1="12.153cm" svg:x2="8.148cm" svg:y2="12.154cm" draw:start-shape="id7" draw:start-glue-point="10" draw:end-shape="id15" draw:end-glue-point="3" svg:d="m5305 12153 2843 1">
          <text:p/>
        </draw:connector>
        <draw:connector draw:style-name="gr2" draw:text-style-name="P1" draw:layer="layout" draw:type="line" svg:x1="4.89cm" svg:y1="12.668cm" svg:x2="8.089cm" svg:y2="13.676cm" draw:start-shape="id7" draw:start-glue-point="9" draw:end-shape="id16" draw:end-glue-point="6" svg:d="m4890 12668 3199 1008">
          <text:p/>
        </draw:connector>
        <draw:connector draw:style-name="gr2" draw:text-style-name="P1" draw:layer="layout" draw:type="line" svg:x1="12.695cm" svg:y1="12.882cm" svg:x2="10.758cm" svg:y2="13.456cm" draw:start-shape="id6" draw:start-glue-point="8" draw:end-shape="id16" draw:end-glue-point="9" svg:d="m12695 12882-1937 574">
          <text:p/>
        </draw:connector>
        <draw:connector draw:style-name="gr2" draw:text-style-name="P1" draw:layer="layout" draw:type="line" svg:x1="10.485cm" svg:y1="6.311cm" svg:x2="9.482cm" svg:y2="6.892cm" draw:start-shape="id3" draw:start-glue-point="4" draw:end-shape="id17" draw:end-glue-point="0" svg:d="m10485 6311-1003 581">
          <text:p/>
        </draw:connector>
        <draw:connector draw:style-name="gr2" draw:text-style-name="P1" draw:layer="layout" draw:type="line" svg:x1="5.969cm" svg:y1="9.792cm" svg:x2="5.199cm" svg:y2="9.793cm" draw:start-shape="id18" draw:start-glue-point="6" draw:end-shape="id2" svg:d="m5969 9792-770 1">
          <text:p/>
        </draw:connector>
        <draw:connector draw:style-name="gr2" draw:text-style-name="P1" draw:layer="layout" draw:type="line" svg:x1="9.481cm" svg:y1="10.763cm" svg:x2="9.482cm" svg:y2="11.604cm" draw:start-shape="id8" draw:start-glue-point="7" draw:end-shape="id15" draw:end-glue-point="0" svg:d="m9481 10763 1 841">
          <text:p/>
        </draw:connector>
        <draw:connector draw:style-name="gr2" draw:text-style-name="P1" draw:layer="layout" draw:type="line" svg:x1="9.482cm" svg:y1="7.992cm" svg:x2="9.481cm" svg:y2="8.823cm" draw:start-shape="id17" draw:start-glue-point="2" draw:end-shape="id8" draw:end-glue-point="5" svg:d="m9482 7992-1 831">
          <text:p/>
        </draw:connector>
        <draw:custom-shape draw:style-name="gr1" draw:text-style-name="P1" draw:id="id19" draw:layer="layout" svg:width="3.363cm" svg:height="2.897cm" svg:x="9.418cm" svg:y="1.973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099cm" svg:y1="4.87cm" svg:x2="11.099cm" svg:y2="5.408cm" draw:start-shape="id19" draw:start-glue-point="2" draw:end-shape="id3" draw:end-glue-point="0" svg:d="m11099 4870v538">
          <text:p/>
        </draw:connector>
        <draw:custom-shape draw:style-name="gr1" draw:text-style-name="P1" draw:id="id20" draw:layer="layout" svg:width="3.341cm" svg:height="2.876cm" svg:x="22.773cm" svg:y="4.027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4.443cm" svg:y1="6.903cm" svg:x2="24.443cm" svg:y2="8.974cm" draw:start-shape="id20" draw:start-glue-point="2" draw:end-shape="id21" draw:end-glue-point="0" svg:d="m24443 6903v2071">
          <text:p/>
        </draw:connector>
        <draw:custom-shape draw:style-name="gr3" draw:text-style-name="P2" draw:id="id22" draw:layer="layout" svg:width="2.617cm" svg:height="0.903cm" svg:x="30.344cm" svg:y="7.44cm">
          <draw:glue-point draw:id="4" svg:x="-2.35cm" svg:y="5.149cm"/>
          <draw:glue-point draw:id="5" svg:x="2.693cm" svg:y="4.839cm"/>
          <text:p text:style-name="P1"><text:span text:style-name="T1">HLS: </text:span></text:p>
          <text:p text:style-name="P1"><text:span text:style-name="T1">Catapult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24" draw:layer="layout" svg:width="2.617cm" svg:height="0.903cm" svg:x="30.341cm" svg:y="11.174cm">
          <text:p text:style-name="P1"><text:span text:style-name="T1">RTL synthesis: </text:span></text:p>
          <text:p text:style-name="P1"><text:span text:style-name="T1">ISE</text:span></text:p>
          <draw:enhanced-geometry svg:viewBox="0 0 21600 21600" draw:type="rectangle" draw:enhanced-path="M 0 0 L 21600 0 21600 21600 0 21600 0 0 Z N"/>
        </draw:custom-shape>
        <draw:g draw:id="id23">
          <draw:custom-shape draw:style-name="gr4" draw:text-style-name="P3" draw:layer="layout" svg:width="3.032cm" svg:height="0.9cm" svg:x="30.133cm" svg:y="8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032cm" svg:height="0.9cm" svg:x="30.133cm" svg:y="9.0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3.032cm" svg:height="0.9cm" svg:x="30.133cm" svg:y="9.136cm">
            <text:p text:style-name="P1"><text:span text:style-name="T2">VHDL/Verilo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3" draw:id="id25" draw:layer="layout" svg:width="2.83cm" svg:height="1.456cm" svg:x="30.234cm" svg:y="12.858cm">
          <text:p text:style-name="P1"><text:span text:style-name="T2">HW</text:span></text:p>
          <text:p text:style-name="P1"><text:span text:style-name="T2">(FPGA bit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1.652cm" svg:y1="8.343cm" svg:x2="31.649cm" svg:y2="8.936cm" draw:start-shape="id22" draw:start-glue-point="2" draw:end-shape="id23" draw:end-glue-point="0" svg:d="m31652 8343-3 593">
          <text:p/>
        </draw:connector>
        <draw:connector draw:style-name="gr2" draw:text-style-name="P1" draw:layer="layout" draw:type="line" svg:x1="31.649cm" svg:y1="10.036cm" svg:x2="31.649cm" svg:y2="11.174cm" draw:start-shape="id23" draw:start-glue-point="2" draw:end-shape="id24" draw:end-glue-point="0" svg:d="m31649 10036v1138">
          <text:p/>
        </draw:connector>
        <draw:connector draw:style-name="gr2" draw:text-style-name="P1" draw:layer="layout" draw:type="line" svg:x1="31.649cm" svg:y1="12.077cm" svg:x2="31.648cm" svg:y2="12.858cm" draw:start-shape="id24" draw:start-glue-point="2" draw:end-shape="id25" draw:end-glue-point="4" svg:d="m31649 12077-1 781">
          <text:p/>
        </draw:connector>
        <draw:custom-shape draw:style-name="gr3" draw:text-style-name="P2" draw:id="id21" draw:layer="layout" svg:width="2.617cm" svg:height="0.903cm" svg:x="23.135cm" svg:y="8.974cm">
          <text:p text:style-name="P1"><text:span text:style-name="T1">Compiler: </text:span></text:p>
          <text:p text:style-name="P1"><text:span text:style-name="T1">g++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id="id26" draw:layer="layout" svg:width="2.83cm" svg:height="1.456cm" svg:x="23.028cm" svg:y="12.858cm">
          <text:p text:style-name="P1"><text:span text:style-name="T2">SW</text:span></text:p>
          <text:p text:style-name="P1"><text:span text:style-name="T2">(system imag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4.443cm" svg:y1="9.877cm" svg:x2="24.442cm" svg:y2="12.858cm" draw:start-shape="id21" draw:start-glue-point="2" draw:end-shape="id26" draw:end-glue-point="4" svg:d="m24443 9877-1 2981">
          <text:p/>
        </draw:connector>
        <draw:custom-shape draw:style-name="gr3" draw:text-style-name="P2" draw:id="id27" draw:layer="layout" svg:width="2.17cm" svg:height="1.94cm" svg:x="26.936cm" svg:y="10.655cm">
          <text:p text:style-name="P1"><text:span text:style-name="T1">HW IP</text:span></text:p>
          <text:p text:style-name="P1"><text:span text:style-name="T1">libr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id="id34" draw:layer="layout" svg:width="2.17cm" svg:height="1.94cm" svg:x="26.936cm" svg:y="8.455cm">
          <text:p text:style-name="P1"><text:span text:style-name="T1">EPOS</text:span></text:p>
          <text:p text:style-name="P1"><text:span text:style-name="T1">library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draw:id="id30">
          <draw:glue-point draw:id="4" svg:x="-3.037cm" svg:y="4.172cm"/>
          <draw:glue-point draw:id="5" svg:x="-3.598cm" svg:y="3.727cm"/>
          <draw:glue-point draw:id="6" svg:x="3.618cm" svg:y="3.827cm"/>
          <draw:glue-point draw:id="7" svg:x="-1.837cm" svg:y="4.872cm"/>
          <draw:glue-point draw:id="8" svg:x="1.998cm" svg:y="4.872cm"/>
          <draw:custom-shape draw:style-name="gr4" draw:text-style-name="P3" draw:layer="layout" svg:width="3.032cm" svg:height="0.9cm" svg:x="22.927cm" svg:y="4.1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032cm" svg:height="0.9cm" svg:x="22.927cm" svg:y="4.2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3.032cm" svg:height="0.9cm" svg:x="22.927cm" svg:y="4.371cm">
            <text:p text:style-name="P1"><text:span text:style-name="T2">C++ SW cod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31">
          <draw:glue-point draw:id="4" svg:x="-3.037cm" svg:y="4.172cm"/>
          <draw:glue-point draw:id="5" svg:x="-3.598cm" svg:y="3.727cm"/>
          <draw:glue-point draw:id="6" svg:x="3.618cm" svg:y="3.827cm"/>
          <draw:glue-point draw:id="7" svg:x="-1.837cm" svg:y="4.872cm"/>
          <draw:glue-point draw:id="8" svg:x="1.998cm" svg:y="4.872cm"/>
          <draw:custom-shape draw:style-name="gr4" draw:text-style-name="P3" draw:layer="layout" svg:width="3.032cm" svg:height="0.9cm" svg:x="30.136cm" svg:y="4.1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032cm" svg:height="0.9cm" svg:x="30.136cm" svg:y="4.2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3.032cm" svg:height="0.9cm" svg:x="30.136cm" svg:y="4.371cm">
            <text:p text:style-name="P1"><text:span text:style-name="T2">C++ HW cod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" draw:text-style-name="P1" draw:layer="layout" draw:type="line" svg:x1="29.106cm" svg:y1="11.625cm" svg:x2="30.341cm" svg:y2="11.625cm" draw:start-shape="id27" draw:end-shape="id24" draw:end-glue-point="3" svg:d="m29106 11625h1235">
          <text:p/>
        </draw:connector>
        <draw:g draw:id="id33">
          <draw:glue-point draw:id="4" svg:x="-3.037cm" svg:y="4.172cm"/>
          <draw:glue-point draw:id="5" svg:x="-3.598cm" svg:y="3.727cm"/>
          <draw:glue-point draw:id="6" svg:x="3.618cm" svg:y="3.827cm"/>
          <draw:glue-point draw:id="7" svg:x="-1.837cm" svg:y="4.872cm"/>
          <draw:glue-point draw:id="8" svg:x="1.998cm" svg:y="4.872cm"/>
          <draw:custom-shape draw:style-name="gr6" draw:text-style-name="P3" draw:layer="layout" svg:width="3.032cm" svg:height="0.9cm" svg:x="30.136cm" svg:y="5.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3.032cm" svg:height="0.9cm" svg:x="30.136cm" svg:y="5.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3.032cm" svg:height="0.9cm" svg:x="30.136cm" svg:y="5.87cm">
            <text:p text:style-name="P1"><text:span text:style-name="T2">HW proxys/agent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32">
          <draw:glue-point draw:id="4" svg:x="-3.037cm" svg:y="4.172cm"/>
          <draw:glue-point draw:id="5" svg:x="-3.598cm" svg:y="3.727cm"/>
          <draw:glue-point draw:id="6" svg:x="3.618cm" svg:y="3.827cm"/>
          <draw:glue-point draw:id="7" svg:x="-1.837cm" svg:y="4.872cm"/>
          <draw:glue-point draw:id="8" svg:x="1.998cm" svg:y="4.872cm"/>
          <draw:custom-shape draw:style-name="gr6" draw:text-style-name="P3" draw:layer="layout" svg:width="3.032cm" svg:height="0.9cm" svg:x="22.927cm" svg:y="5.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3.032cm" svg:height="0.9cm" svg:x="22.927cm" svg:y="5.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3.032cm" svg:height="0.9cm" svg:x="22.927cm" svg:y="5.87cm">
            <text:p text:style-name="P1"><text:span text:style-name="T2">SW proxys/agent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2" draw:id="id29" draw:layer="layout" svg:width="2.617cm" svg:height="0.903cm" svg:x="26.752cm" svg:y="5.769cm">
          <draw:glue-point draw:id="4" svg:x="-5.036cm" svg:y="-5.171cm"/>
          <draw:glue-point draw:id="5" svg:x="4.978cm" svg:y="-5.282cm"/>
          <draw:glue-point draw:id="6" svg:x="-5.082cm" svg:y="5.116cm"/>
          <draw:glue-point draw:id="7" svg:x="4.978cm" svg:y="5.116cm"/>
          <draw:glue-point draw:id="8" svg:x="-2.311cm" svg:y="5.26cm"/>
          <draw:glue-point draw:id="9" svg:x="2.693cm" svg:y="4.972cm"/>
          <text:p text:style-name="P1"><text:span text:style-name="T1">EPOS</text:span></text:p>
          <text:p text:style-name="P1"><text:span text:style-name="T1">analyser</text:span></text:p>
          <draw:enhanced-geometry svg:viewBox="0 0 21600 21600" draw:type="rectangle" draw:enhanced-path="M 0 0 L 21600 0 21600 21600 0 21600 0 0 Z N"/>
        </draw:custom-shape>
        <draw:g draw:id="id28">
          <draw:glue-point draw:id="4" svg:x="-3.037cm" svg:y="4.172cm"/>
          <draw:glue-point draw:id="5" svg:x="-3.598cm" svg:y="3.727cm"/>
          <draw:glue-point draw:id="6" svg:x="3.618cm" svg:y="3.827cm"/>
          <draw:glue-point draw:id="7" svg:x="-1.837cm" svg:y="4.872cm"/>
          <draw:glue-point draw:id="8" svg:x="1.998cm" svg:y="4.872cm"/>
          <draw:custom-shape draw:style-name="gr5" draw:text-style-name="P3" draw:layer="layout" svg:width="3.032cm" svg:height="0.9cm" svg:x="26.544cm" svg:y="4.271cm">
            <text:p text:style-name="P1"><text:span text:style-name="T2">Proxy/Agent</text:span></text:p>
            <text:p text:style-name="P1"><text:span text:style-name="T2">framework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" draw:text-style-name="P1" draw:layer="layout" draw:type="line" svg:x1="28.06cm" svg:y1="5.171cm" svg:x2="28.06cm" svg:y2="5.769cm" draw:start-shape="id28" draw:start-glue-point="2" draw:end-shape="id29" svg:d="m28060 5171v598">
          <text:p/>
        </draw:connector>
        <draw:connector draw:style-name="gr2" draw:text-style-name="P1" draw:layer="layout" draw:type="line" svg:x1="25.539cm" svg:y1="5.141cm" svg:x2="26.752cm" svg:y2="5.769cm" draw:start-shape="id30" draw:start-glue-point="6" draw:end-shape="id29" draw:end-glue-point="4" svg:d="m25539 5141 1213 628">
          <text:p/>
        </draw:connector>
        <draw:connector draw:style-name="gr2" draw:text-style-name="P1" draw:layer="layout" draw:type="line" svg:x1="30.562cm" svg:y1="5.13cm" svg:x2="29.362cm" svg:y2="5.769cm" draw:start-shape="id31" draw:start-glue-point="5" draw:end-shape="id29" draw:end-glue-point="5" svg:d="m30562 5130-1200 639">
          <text:p/>
        </draw:connector>
        <draw:connector draw:style-name="gr2" draw:text-style-name="P1" draw:layer="layout" draw:type="line" svg:x1="26.752cm" svg:y1="6.22cm" svg:x2="25.959cm" svg:y2="6.22cm" draw:start-shape="id29" draw:start-glue-point="3" draw:end-shape="id32" draw:end-glue-point="1" svg:d="m26752 6220h-793">
          <text:p/>
        </draw:connector>
        <draw:connector draw:style-name="gr2" draw:text-style-name="P1" draw:layer="layout" draw:type="line" svg:x1="29.369cm" svg:y1="6.22cm" svg:x2="30.136cm" svg:y2="6.22cm" draw:start-shape="id29" draw:start-glue-point="1" draw:end-shape="id33" svg:d="m29369 6220h767">
          <text:p/>
        </draw:connector>
        <draw:connector draw:style-name="gr2" draw:text-style-name="P1" draw:layer="layout" draw:type="line" svg:x1="26.936cm" svg:y1="9.424cm" svg:x2="25.752cm" svg:y2="9.425cm" draw:start-shape="id34" draw:start-glue-point="6" draw:end-shape="id21" svg:d="m26936 9424-1184 1">
          <text:p/>
        </draw:connector>
        <draw:custom-shape draw:style-name="gr1" draw:text-style-name="P1" draw:id="id35" draw:layer="layout" svg:width="3.363cm" svg:height="2.897cm" svg:x="29.971cm" svg:y="4.00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1.652cm" svg:y1="6.902cm" svg:x2="31.652cm" svg:y2="7.44cm" draw:start-shape="id35" draw:start-glue-point="2" draw:end-shape="id22" draw:end-glue-point="0" svg:d="m31652 6902v5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2-11-30T20:45:42</dc:date>
    <meta:editing-duration>PT15H34M21S</meta:editing-duration>
    <meta:editing-cycles>131</meta:editing-cycles>
    <meta:generator>OpenOffice.org/3.1$Unix OpenOffice.org_project/310m19$Build-9420</meta:generator>
    <meta:print-date>2011-08-20T15:00:02</meta:print-date>
    <dc:creator>Tiago Mück</dc:creator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