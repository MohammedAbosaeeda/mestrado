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 style:list-style-name="L1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 style:list-style-name="L1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 style:list-style-name="L1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2cm" draw:marker-start="StrokedTriangle" draw:marker-start-width="0.23cm" draw:marker-end-width="0.23cm" draw:textarea-horizontal-align="center" draw:textarea-vertical-align="bottom" fo:padding-top="0.135cm" fo:padding-bottom="0.135cm" fo:padding-left="0.26cm" fo:padding-right="0.26cm"/>
    </style:style>
    <style:style style:name="gr7" style:family="graphic" style:parent-style-name="standard">
      <style:graphic-properties svg:stroke-width="0.02cm" draw:marker-start="FilledDiamond" draw:marker-start-width="0.23cm" draw:marker-end="Line_20_Arrow" draw:marker-end-width="0.23cm" draw:textarea-horizontal-align="center" draw:textarea-vertical-align="bottom" fo:padding-top="0.135cm" fo:padding-bottom="0.135cm" fo:padding-left="0.26cm" fo:padding-right="0.26cm"/>
    </style:style>
    <style:style style:name="gr8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1.55cm"/>
    </style:style>
    <style:style style:name="gr10" style:family="graphic" style:parent-style-name="standard">
      <style:graphic-properties draw:stroke="dash" draw:stroke-dash="Ultrafine_20_Dashed" svg:stroke-width="0.02cm" draw:marker-start="StrokedCircle" draw:marker-start-width="0.23cm" draw:marker-end-width="0.23cm" draw:textarea-horizontal-align="center" draw:textarea-vertical-align="bottom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margin-left="0cm" fo:margin-right="0cm" fo:margin-top="0.1cm" fo:margin-bottom="0.1cm" fo:line-height="100%" fo:text-align="start" fo:text-indent="0cm"/>
    </style:style>
    <style:style style:name="P4" style:family="paragraph">
      <style:paragraph-properties fo:text-align="center"/>
      <style:text-properties fo:font-family="Helvetica" style:font-family-generic="swiss" fo:font-size="10pt" style:font-size-asian="10pt" style:font-size-complex="10pt"/>
    </style:style>
    <style:style style:name="P5" style:family="paragraph">
      <style:paragraph-properties fo:margin-left="0cm" fo:margin-right="0cm" fo:margin-top="0.1cm" fo:margin-bottom="0.1cm" fo:line-height="100%" fo:text-align="start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start"/>
      <style:text-properties fo:font-family="Helvetica" style:font-family-generic="swiss" fo:font-size="10pt" style:font-size-asian="10pt" style:font-size-complex="10pt"/>
    </style:style>
    <style:style style:name="T1" style:family="text"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0000" style:text-outline="false" style:text-line-through-style="none" fo:font-family="Helvetica" style:font-family-generic="swiss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Helvetica" style:font-family-generic="swiss" fo:font-size="10pt" style:font-size-asian="10pt" style:font-size-complex="10pt"/>
    </style:style>
    <style:style style:name="T4" style:family="text"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family="Helvetica" style:font-family-generic="swiss" fo:font-size="10pt" style:font-size-asian="10pt" style:font-size-complex="10pt"/>
    </style:style>
    <style:style style:name="T6" style:family="text">
      <style:text-properties fo:font-family="Helvetica" style:font-family-generic="swiss"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family="Helvetica" style:font-family-generic="swis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3">
          <draw:glue-point draw:id="4" svg:x="-1.019cm" svg:y="4.99cm"/>
          <draw:custom-shape draw:style-name="gr1" draw:text-style-name="P2" draw:layer="layout" svg:width="5.73cm" svg:height="1cm" svg:x="17.139cm" svg:y="9.579cm">
            <text:p text:style-name="P1"><text:span text:style-name="T1">Debugged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5.73cm" svg:height="1.44cm" svg:x="17.139cm" svg:y="10.579cm">
            <text:p text:style-name="P3"><text:span text:style-name="T2">+trigger_out : sc_out&lt;bool&gt;</text:span></text:p>
            <text:p text:style-name="P3"><text:span text:style-name="T2">+data_out : sc_out&lt;sc_uint&lt;...&gt; &gt;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5.73cm" svg:height="1.236cm" svg:x="17.138cm" svg:y="12.019cm">
            <text:p text:style-name="P5"><text:span text:style-name="T3">+ enter(...)</text:span></text:p>
            <text:p text:style-name="P5"><text:span text:style-name="T3">+ leave(...)</text:span></text:p>
            <draw:enhanced-geometry svg:viewBox="0 0 21600 21600" draw:type="rectangle" draw:enhanced-path="M 0 0 L 21600 0 21600 21600 0 21600 0 0 Z N"/>
          </draw:custom-shape>
        </draw:g>
        <draw:g draw:id="id5">
          <draw:glue-point draw:id="4" svg:x="-1.019cm" svg:y="4.99cm"/>
          <draw:custom-shape draw:style-name="gr1" draw:text-style-name="P2" draw:layer="layout" svg:width="2.44cm" svg:height="1cm" svg:x="18.8cm" svg:y="6.248cm">
            <text:p text:style-name="P1"><text:span text:style-name="T1">Trac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2.44cm" svg:height="0.886cm" svg:x="18.8cm" svg:y="7.2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6">
          <draw:glue-point draw:id="4" svg:x="-1.019cm" svg:y="4.99cm"/>
          <draw:custom-shape draw:style-name="gr1" draw:text-style-name="P2" draw:layer="layout" svg:width="2.44cm" svg:height="1cm" svg:x="21.526cm" svg:y="6.248cm">
            <text:p text:style-name="P1"><text:span text:style-name="T4">Watch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2.44cm" svg:height="0.886cm" svg:x="21.526cm" svg:y="7.2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4">
          <draw:glue-point draw:id="4" svg:x="-1.019cm" svg:y="4.99cm"/>
          <draw:custom-shape draw:style-name="gr1" draw:text-style-name="P2" draw:layer="layout" svg:width="2.44cm" svg:height="1cm" svg:x="16.041cm" svg:y="6.248cm">
            <text:p text:style-name="P1"><text:span text:style-name="T4">Profil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2.44cm" svg:height="0.886cm" svg:x="16.041cm" svg:y="7.2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2">
          <draw:glue-point draw:id="4" svg:x="-1.019cm" svg:y="4.99cm"/>
          <draw:custom-shape draw:style-name="gr1" draw:text-style-name="P2" draw:layer="layout" svg:width="5.73cm" svg:height="1cm" svg:x="9.799cm" svg:y="8.904cm">
            <text:p text:style-name="P1"><text:span text:style-name="T1">Scheduler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5.73cm" svg:height="0.661cm" svg:x="9.799cm" svg:y="9.9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5.73cm" svg:height="4.299cm" svg:x="9.797cm" svg:y="10.561cm">
            <text:p text:style-name="P5"><text:span text:style-name="T3">+</text:span><text:span text:style-name="T5"> &lt;&lt;SC_CTHREAD&gt;&gt; controller()</text:span></text:p>
            <text:p text:style-name="P6"><text:span text:style-name="T6">+ insert()</text:span></text:p>
            <text:p text:style-name="P6"><text:span text:style-name="T6">+ remove()</text:span></text:p>
            <text:p text:style-name="P6"><text:span text:style-name="T6">+ suspend()</text:span></text:p>
            <text:p text:style-name="P6"><text:span text:style-name="T6">+ remove()</text:span></text:p>
            <text:p text:style-name="P6"><text:span text:style-name="T6">+ chosen()</text:span></text:p>
            <text:p text:style-name="P6"><text:span text:style-name="T6">+ choose()</text:span></text:p>
            <text:p text:style-name="P6"><text:span text:style-name="T6">+ choose()</text:span></text:p>
            <text:p text:style-name="P6"><text:span text:style-name="T6">+ choose_another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7">
          <draw:glue-point draw:id="4" svg:x="-1.019cm" svg:y="4.99cm"/>
          <draw:glue-point draw:id="5" svg:x="0.568cm" svg:y="-1.349cm"/>
          <draw:custom-shape draw:style-name="gr1" draw:text-style-name="P2" draw:layer="layout" svg:width="3.781cm" svg:height="1cm" svg:x="11.997cm" svg:y="16.101cm">
            <text:p text:style-name="P1"><text:span text:style-name="T1">AdaptedScheduler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3.781cm" svg:height="0.661cm" svg:x="11.997cm" svg:y="17.1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3.781cm" svg:height="3.818cm" svg:x="11.996cm" svg:y="17.758cm">
            <text:p text:style-name="P5"><text:span text:style-name="T7">+ insert()</text:span></text:p>
            <text:p text:style-name="P7"><text:span text:style-name="T7">+ remove()</text:span></text:p>
            <text:p text:style-name="P7"><text:span text:style-name="T7">+ suspend()</text:span></text:p>
            <text:p text:style-name="P7"><text:span text:style-name="T7">+ remove()</text:span></text:p>
            <text:p text:style-name="P7"><text:span text:style-name="T7">+ chosen()</text:span></text:p>
            <text:p text:style-name="P7"><text:span text:style-name="T7">+ choose()</text:span></text:p>
            <text:p text:style-name="P7"><text:span text:style-name="T7">+ choose()</text:span></text:p>
            <text:p text:style-name="P7"><text:span text:style-name="T7">+ choose_another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">
          <draw:custom-shape draw:style-name="gr1" draw:text-style-name="P2" draw:layer="layout" svg:width="2.45cm" svg:height="1cm" svg:x="11.438cm" svg:y="6.374cm">
            <text:p text:style-name="P1"><text:span text:style-name="T1">sc_modul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45cm" svg:height="0.5cm" svg:x="11.438cm" svg:y="7.374cm">
            <text:p/>
            <draw:enhanced-geometry svg:viewBox="0 0 21600 21600" draw:type="rectangle" draw:enhanced-path="M 0 0 L 21600 0 21600 21600 0 21600 0 0 Z N"/>
          </draw:custom-shape>
        </draw:g>
        <draw:connector draw:style-name="gr6" draw:text-style-name="P8" draw:layer="layout" svg:x1="12.663cm" svg:y1="7.874cm" svg:x2="12.663cm" svg:y2="8.904cm" draw:start-shape="id1" draw:start-glue-point="2" draw:end-shape="id2" draw:end-glue-point="0" svg:d="m12663 7874v1030">
          <text:p/>
        </draw:connector>
        <draw:connector draw:style-name="gr7" draw:text-style-name="P8" draw:layer="layout" svg:x1="20.003cm" svg:y1="9.579cm" svg:x2="17.261cm" svg:y2="8.134cm" draw:start-shape="id3" draw:start-glue-point="0" draw:end-shape="id4" draw:end-glue-point="2" svg:d="m20003 9579v-722h-2742v-723">
          <text:p/>
        </draw:connector>
        <draw:connector draw:style-name="gr7" draw:text-style-name="P8" draw:layer="layout" svg:x1="20.003cm" svg:y1="9.579cm" svg:x2="20.02cm" svg:y2="8.134cm" draw:start-shape="id3" draw:start-glue-point="0" draw:end-shape="id5" draw:end-glue-point="2" svg:d="m20003 9579v-722h17v-723">
          <text:p/>
        </draw:connector>
        <draw:connector draw:style-name="gr7" draw:text-style-name="P8" draw:layer="layout" svg:x1="20.003cm" svg:y1="9.579cm" svg:x2="22.746cm" svg:y2="8.134cm" draw:start-shape="id3" draw:start-glue-point="0" draw:end-shape="id6" draw:end-glue-point="2" svg:d="m20003 9579v-722h2743v-723">
          <text:p/>
        </draw:connector>
        <draw:connector draw:style-name="gr6" draw:text-style-name="P8" draw:layer="layout" draw:line-skew="0.803cm" svg:x1="20.003cm" svg:y1="13.255cm" svg:x2="13.887cm" svg:y2="16.101cm" draw:start-shape="id3" draw:start-glue-point="2" draw:end-shape="id7" svg:d="m20003 13255v2226h-6116v620">
          <text:p/>
        </draw:connector>
        <draw:connector draw:style-name="gr6" draw:text-style-name="P8" draw:layer="layout" svg:x1="12.663cm" svg:y1="14.86cm" svg:x2="13.887cm" svg:y2="16.101cm" draw:start-shape="id2" draw:start-glue-point="2" draw:end-shape="id7" draw:end-glue-point="0" svg:d="m12663 14860v620h1224v621">
          <text:p/>
        </draw:connector>
        <draw:g draw:id="id8">
          <draw:custom-shape draw:style-name="gr8" draw:text-style-name="P1" draw:layer="layout" svg:width="4.55cm" svg:height="1.884cm" draw:transform="rotate (3.1415926535892) translate (22.009cm 19.887cm)">
            <text:p/>
            <draw:enhanced-geometry svg:viewBox="0 0 21600 21600" draw:mirror-horizontal="true" draw:glue-points="10800 0 0 10800 10800 21600 21600 10800" draw:text-areas="0 0 21600 ?f11" draw:type="paper" draw:modifiers="16977.0768797522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9" draw:text-style-name="P9" draw:layer="layout" svg:width="4.613cm" svg:height="1.8cm" svg:x="17.396cm" svg:y="18.087cm">
            <draw:text-box>
              <text:p text:style-name="P6"><text:span text:style-name="T3">Debugged::enter(...);</text:span></text:p>
              <text:p text:style-name="P6"><text:span text:style-name="T3">Scheduler::insert();</text:span></text:p>
              <text:p text:style-name="P6"><text:span text:style-name="T3">Debugged::leave(...);</text:span></text:p>
            </draw:text-box>
          </draw:frame>
        </draw:g>
        <draw:connector draw:style-name="gr10" draw:text-style-name="P8" draw:layer="layout" svg:x1="14.101cm" svg:y1="18.1cm" svg:x2="17.396cm" svg:y2="18.945cm" draw:start-shape="id7" draw:start-glue-point="5" draw:end-shape="id8" svg:d="m14101 18100h2498v845h79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FilledDiamond" svg:viewBox="0 0 10 20" svg:d="m5 0 5 10-5 10-5-1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trokedCircle" svg:viewBox="0 0 100 100" svg:d="m100 50v4l-1 5-1 4-1 4-2 4-2 4-2 4-3 3-3 3-3 3-3 3-4 2-4 2-4 2-4 1-4 1-5 1h-4-4l-5-1-4-1-4-1-4-2-4-2-4-2-3-3-3-3-3-3-3-3-2-4-2-4-2-4-1-4-1-4-1-5v-4-4l1-5 1-4 1-4 2-4 2-4 2-4 3-3 3-3 3-3 3-3 4-2 4-2 4-2 4-1 4-1 5-1h4 4l5 1 4 1 4 1 4 2 4 2 4 2 3 3 3 3 3 3 3 3 2 4 2 4 2 4 1 4 1 4 1 5v4h-3v-4l-1-4-1-4-1-4-1-4-2-4-2-3-3-3-3-3-3-3-3-3-3-2-4-2-4-1-4-1-4-1-4-1h-4-4l-4 1-4 1-4 1-4 1-4 2-3 2-3 3-3 3-3 3-3 3-2 3-2 4-1 4-1 4-1 4-1 4v4 4l1 4 1 4 1 4 1 4 2 4 2 3 3 3 3 3 3 3 3 3 3 2 4 2 4 1 4 1 4 1 4 1h4 4l4-1 4-1 4-1 4-1 4-2 3-2 3-3 3-3 3-3 3-3 2-3 2-4 1-4 1-4 1-4 1-4v-4z"/>
    <draw:marker draw:name="StrokedTriangle" svg:viewBox="0 0 100 100" svg:d="m0 100 50-100 50 96h-4l-46-92-46 92h96v4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iago Mück</meta:initial-creator>
    <meta:creation-date>2011-01-28T14:48:19</meta:creation-date>
    <dc:date>2011-02-02T14:54:08</dc:date>
    <dc:creator>Tiago Mück</dc:creator>
    <meta:editing-duration>PT02H19M27S</meta:editing-duration>
    <meta:editing-cycles>36</meta:editing-cycles>
    <meta:generator>OpenOffice.org/3.1$Unix OpenOffice.org_project/310m19$Build-9420</meta:generator>
    <meta:document-statistic meta:object-count="34"/>
  </office:meta>
</office:document-meta>
</file>